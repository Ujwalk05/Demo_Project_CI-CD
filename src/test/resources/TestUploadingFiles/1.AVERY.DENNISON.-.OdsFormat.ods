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5.766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4.32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3.725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CL_20_Rate_20_Fil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표준_5f_0034OFFER_28_NEW_29_" style:data-style-name="N2">
      <style:table-cell-properties fo:border-bottom="none" fo:background-color="#c5e0b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Normal_20_2" style:data-style-name="N10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Normal_20_2" style:data-style-name="N10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Normal_20_2" style:data-style-name="N0">
      <style:table-cell-properties fo:border-bottom="0.74pt solid #000000" fo:background-color="#c5e0b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 style:data-style-name="N0">
      <style:table-cell-properties fo:background-color="#c5e0b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 style:data-style-name="N0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 style:data-style-name="N0">
      <style:table-cell-properties fo:border-bottom="0.74pt solid #000000" fo:background-color="#c5e0b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표준_5f_0034OFFER_28_NEW_29_" style:data-style-name="N0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표준_5f_0034OFFER_28_NEW_29_" style:data-style-name="N0">
      <style:table-cell-properties fo:background-color="#c5e0b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표준_5f_0034OFFER_28_NEW_29_" style:data-style-name="N2">
      <style:table-cell-properties fo:border-bottom="none" fo:background-color="#b4c6e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Normal_20_2" style:data-style-name="N0">
      <style:table-cell-properties fo:border-bottom="0.74pt solid #000000" fo:background-color="#b4c6e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fo:border-bottom="0.74pt solid #000000" fo:background-color="#b4c6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_20_2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표준_5f_0034OFFER_28_NEW_29_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 style:data-style-name="N120">
      <style:table-cell-properties fo:border-bottom="0.74pt solid #000000" fo:background-color="#b4c6e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20_2" style:data-style-name="N12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5f_0034OFFER_28_NEW_29_" style:data-style-name="N2">
      <style:table-cell-properties fo:border-bottom="none" fo:background-color="#fee598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표준_5f_0034OFFER_28_NEW_29_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12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20_2" style:data-style-name="N12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Normal_20_2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2" style:data-style-name="N1">
      <style:table-cell-properties fo:border-bottom="1.76pt solid #000000" fo:background-color="#007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d8d8d8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Normal_20_2" style:data-style-name="N1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Normal_20_2" style:data-style-name="N1">
      <style:table-cell-properties fo:background-color="#007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표준_5f_0034OFFER_28_NEW_29_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표준_5f_0034OFFER_28_NEW_29_" style:data-style-name="N2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Normal_20_2" style:data-style-name="N100">
      <style:table-cell-properties fo:border-bottom="1.76pt solid #000000" fo:background-color="#c8c8c8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Normal_20_2" style:data-style-name="N129">
      <style:table-cell-properties fo:border-bottom="0.74pt solid #000000" fo:background-color="#c8c8c8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29">
      <style:table-cell-properties fo:background-color="#c8c8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20_2" style:data-style-name="N100">
      <style:table-cell-properties fo:border-bottom="0.74pt solid #000000" fo:background-color="#c8c8c8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Normal_20_2" style:data-style-name="N100">
      <style:table-cell-properties fo:border-bottom="1.76pt solid #000000" fo:background-color="#c8c8c8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Normal_20_2" style:data-style-name="N100">
      <style:table-cell-properties fo:border-bottom="1.76pt solid #000000" fo:background-color="#7b7b7b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Normal_20_2" style:data-style-name="N129">
      <style:table-cell-properties fo:border-bottom="0.74pt solid #000000" fo:background-color="#7b7b7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20_2" style:data-style-name="N129">
      <style:table-cell-properties fo:background-color="#7b7b7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Normal_20_2" style:data-style-name="N1">
      <style:table-cell-properties fo:border-bottom="0.74pt solid #000000" fo:background-color="#c8c8c8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Normal_20_2" style:data-style-name="N1">
      <style:table-cell-properties fo:background-color="#c8c8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Normal_20_2" style:data-style-name="N1">
      <style:table-cell-properties fo:background-color="#c8c8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표준_5f_0034OFFER_28_NEW_29_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20_2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Normal_20_2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Normal_20_2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Normal_20_2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2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표준_5f_0034OFFER_28_NEW_29_" style:data-style-name="N0">
      <style:table-cell-properties fo:background-color="#8eb4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표준_5f_0034OFFER_28_NEW_29_" style:data-style-name="N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2" style:family="table-cell" style:parent-style-name="Normal_20_2" style:data-style-name="N1">
      <style:table-cell-properties fo:background-color="#dad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20_2" style:data-style-name="N1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표준_5f_0034OFFER_28_NEW_29_" style:data-style-name="N10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Normal_20_2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Normal_20_2" style:data-style-name="N130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8" style:family="table-cell" style:parent-style-name="표준_5f_0034OFFER_28_NEW_29_" style:data-style-name="N100">
      <style:table-cell-properties fo:border-bottom="0.74pt solid #000000" fo:background-color="#ff66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Normal_20_2" style:data-style-name="N100">
      <style:table-cell-properties fo:border-bottom="1.76pt solid #000000" fo:background-color="#ff66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표준_5f_0034OFFER_28_NEW_29_" style:data-style-name="N10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Normal_20_2" style:data-style-name="N10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표준_5f_0034OFFER_28_NEW_29_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3" style:family="table-cell" style:parent-style-name="Normal_20_2" style:data-style-name="N131">
      <style:table-cell-properties fo:border-bottom="0.74pt solid #000000" fo:background-color="#dadada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Normal_20_2" style:data-style-name="N131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Normal_20_2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Normal_20_2" style:data-style-name="N134">
      <style:table-cell-properties fo:background-color="#dad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Comma" style:data-style-name="N133">
      <style:table-cell-properties fo:background-color="#d7e4b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Normal_20_2" style:data-style-name="N139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Normal_20_2" style:data-style-name="N140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" style:data-style-name="N133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Normal_20_2" style:data-style-name="N135">
      <style:table-cell-properties fo:background-color="#d9d9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2" style:data-style-name="N134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Comma" style:data-style-name="N133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Normal_20_2" style:data-style-name="N100">
      <style:table-cell-properties fo:border-bottom="0.74pt solid #000000" fo:background-color="#dadada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Normal_20_2" style:data-style-name="N100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Normal_20_2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Comma" style:data-style-name="N100">
      <style:table-cell-properties fo:background-color="#dad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표준_5f_0034OFFER_28_NEW_29_" style:data-style-name="N100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Normal_20_2" style:data-style-name="N100">
      <style:table-cell-properties fo:border-bottom="1.76pt solid #000000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Normal_20_2" style:data-style-name="N131">
      <style:table-cell-properties fo:border-bottom="0.74pt solid #000000" fo:background-color="#dadad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Normal_20_2" style:data-style-name="N132">
      <style:table-cell-properties fo:border-bottom="0.74pt solid #000000" fo:background-color="#dadad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Normal_20_2" style:data-style-name="N132">
      <style:table-cell-properties fo:background-color="#dad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Normal_20_2" style:data-style-name="N13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Normal_20_2" style:data-style-name="N133">
      <style:table-cell-properties fo:border-bottom="0.74pt solid #000000" fo:background-color="#dadad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Normal_20_2" style:data-style-name="N133">
      <style:table-cell-properties fo:background-color="#dad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Comma" style:data-style-name="N133">
      <style:table-cell-properties fo:background-color="#dad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표준_5f_0034OFFER_28_NEW_29_" style:data-style-name="N0">
      <style:table-cell-properties fo:background-color="#e6b9b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Normal_20_2" style:data-style-name="N1">
      <style:table-cell-properties fo:border-bottom="0.74pt solid #000000" fo:background-color="#fbe4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Normal_20_2" style:data-style-name="N1">
      <style:table-cell-properties fo:background-color="#fbe4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Normal_20_2" style:data-style-name="N1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Normal_20_2" style:data-style-name="N1">
      <style:table-cell-properties fo:border-bottom="0.74pt solid #000000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Normal_20_2" style:data-style-name="N1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Normal_20_2" style:data-style-name="N133">
      <style:table-cell-properties fo:border-bottom="0.74pt solid #000000" fo:background-color="#fbe4d5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Normal_20_2" style:data-style-name="N133">
      <style:table-cell-properties fo:background-color="#fbe4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Normal_20_2" style:data-style-name="N133">
      <style:table-cell-properties fo:background-color="#fde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Comma" style:data-style-name="N133">
      <style:table-cell-properties fo:background-color="#fbe4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Normal_20_2" style:data-style-name="N100">
      <style:table-cell-properties fo:border-bottom="0.74pt solid #000000" fo:background-color="#fbe4d5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Normal_20_2" style:data-style-name="N100">
      <style:table-cell-properties fo:background-color="#fbe4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Normal_20_2" style:data-style-name="N100">
      <style:table-cell-properties fo:background-color="#fde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Normal_20_2" style:data-style-name="N100">
      <style:table-cell-properties fo:background-color="#fbe4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Normal_20_2" style:data-style-name="N1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Normal_20_2" style:data-style-name="N133">
      <style:table-cell-properties fo:border-bottom="0.74pt solid #000000" fo:background-color="#fbe4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20_2" style:data-style-name="N133">
      <style:table-cell-properties fo:background-color="#fbe4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Normal_20_2" style:data-style-name="N100">
      <style:table-cell-properties fo:background-color="#f2dcd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Normal_20_2" style:data-style-name="N1">
      <style:table-cell-properties fo:background-color="#fbe4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Normal_20_2" style:data-style-name="N133">
      <style:table-cell-properties fo:border-bottom="0.74pt solid #000000" fo:background-color="#fbe4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Normal_20_2" style:data-style-name="N133">
      <style:table-cell-properties fo:background-color="#fbe4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표준_5f_0034OFFER_28_NEW_29_" style:data-style-name="N0">
      <style:table-cell-properties fo:background-color="#d7e4b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Normal_20_2" style:data-style-name="N1">
      <style:table-cell-properties fo:border-bottom="0.74pt solid #000000" fo:background-color="#bdd6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Normal_20_2" style:data-style-name="N1">
      <style:table-cell-properties fo:background-color="#bdd6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Normal_20_2" style:data-style-name="N1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Normal_20_2" style:data-style-name="N1">
      <style:table-cell-properties fo:border-bottom="0.74pt solid #000000" fo:background-color="#bdd6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Normal_20_2" style:data-style-name="N1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Normal_20_2" style:data-style-name="N134">
      <style:table-cell-properties fo:border-bottom="0.74pt solid #000000" fo:background-color="#bdd6e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Normal_20_2" style:data-style-name="N134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 style:data-style-name="N136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Normal_20_2" style:data-style-name="N133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Comma" style:data-style-name="N138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Normal_20_2" style:data-style-name="N135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Normal_20_2" style:data-style-name="N138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표준_5f_0034OFFER_28_NEW_29_" style:data-style-name="N10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Normal_20_2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표준_5f_0034OFFER_28_NEW_29_" style:data-style-name="N4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표준_5f_0034OFFER_28_NEW_29_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표준_5f_0034OFFER_28_NEW_29_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Normal_20_2" style:data-style-name="N100">
      <style:table-cell-properties fo:border-bottom="0.74pt solid #000000" fo:background-color="#bdd6e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Normal_20_2" style:data-style-name="N100">
      <style:table-cell-properties fo:background-color="#bdd6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Normal_20_2" style:data-style-name="N100">
      <style:table-cell-properties fo:border-bottom="0.74pt solid #000000" fo:background-color="#bdd6e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Normal_20_2" style:data-style-name="N133">
      <style:table-cell-properties fo:border-bottom="0.74pt solid #000000" fo:background-color="#bdd6e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Normal_20_2" style:data-style-name="N132">
      <style:table-cell-properties fo:border-bottom="0.74pt solid #000000" fo:background-color="#bdd6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Normal_20_2" style:data-style-name="N132">
      <style:table-cell-properties fo:background-color="#bdd6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표준_5f_0034OFFER_28_NEW_29_" style:data-style-name="N100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Normal_20_2" style:data-style-name="N100">
      <style:table-cell-properties fo:border-bottom="1.76pt solid #000000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Normal_20_2" style:data-style-name="N133">
      <style:table-cell-properties fo:border-bottom="0.74pt solid #000000" fo:background-color="#bdd6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표준_5f_0034OFFER_28_NEW_29_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7" style:family="table-cell" style:parent-style-name="Normal_20_2" style:data-style-name="N13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Normal_20_2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104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ff0000"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0000" style:font-name="Cambria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  <style:style style:name="T4" style:family="text">
      <style:text-properties fo:color="#ffffff"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ffffff" style:font-name="Cambria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00" style:font-name="Cambria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8" style:family="text">
      <style:text-properties fo:color="#000000"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9" style:family="text">
      <style:text-properties fo:color="#000000" style:font-name="Cambria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  <style:style style:name="T10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fo:color="#0000ff"/>
    </style:style>
    <style:style style:name="T13" style:family="text">
      <style:text-properties fo:color="#c00000"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decimal-number() and cell-content()&gt;=0" table:allow-empty-cell="true" table:base-cell-address="'FCL Rate File'.BD14">
          <table:help-message table:display="true"/>
          <table:error-message table:message-type="stop" table:display="true"/>
        </table:content-validation>
      </table:content-validations>
      <table:table table:name="FCL Rate File" table:style-name="ta1">
        <office:forms form:automatic-focus="false" form:apply-design-mode="false"/>
        <table:table-column table:style-name="co1" table:number-columns-repeated="49" table:default-cell-style-name="Default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1" table:default-cell-style-name="Default"/>
        <table:table-column table:style-name="co8" table:default-cell-style-name="ce67"/>
        <table:table-column table:style-name="co1" table:number-columns-repeated="1632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Origin</text:p>
          </table:table-cell>
          <table:covered-table-cell table:number-columns-repeated="6" table:style-name="ce1"/>
          <table:table-cell table:style-name="ce11" office:value-type="string" calcext:value-type="string" table:number-columns-spanned="5" table:number-rows-spanned="2">
            <text:p>Destination</text:p>
          </table:table-cell>
          <table:covered-table-cell table:number-columns-repeated="4" table:style-name="ce11"/>
          <table:table-cell table:style-name="ce20" office:value-type="string" calcext:value-type="string" table:number-columns-spanned="9" table:number-rows-spanned="2">
            <text:p>Volume Details</text:p>
          </table:table-cell>
          <table:covered-table-cell table:number-columns-repeated="8" table:style-name="ce20"/>
          <table:table-cell table:style-name="ce39" office:value-type="string" calcext:value-type="string" table:number-columns-spanned="25" table:number-rows-spanned="2">
            <text:p>Total Cost Summary By Segment</text:p>
          </table:table-cell>
          <table:covered-table-cell table:number-columns-repeated="24" table:style-name="ce39"/>
          <table:table-cell table:style-name="ce51" table:number-columns-spanned="2" table:number-rows-spanned="2"/>
          <table:covered-table-cell table:style-name="ce51"/>
          <table:table-cell table:style-name="ce60" office:value-type="string" calcext:value-type="string" table:number-columns-spanned="21" table:number-rows-spanned="1">
            <text:p>Origin Handling</text:p>
          </table:table-cell>
          <table:covered-table-cell table:number-columns-repeated="20" table:style-name="ce60"/>
          <table:table-cell table:style-name="ce98" office:value-type="string" calcext:value-type="string" table:number-columns-spanned="13" table:number-rows-spanned="1">
            <text:p>Ocean Freight &amp; Surcharges</text:p>
          </table:table-cell>
          <table:covered-table-cell table:number-columns-repeated="12" table:style-name="ce98"/>
          <table:table-cell table:style-name="ce119" office:value-type="string" calcext:value-type="string" table:number-columns-spanned="14" table:number-rows-spanned="1">
            <text:p>Destination Charges</text:p>
          </table:table-cell>
          <table:covered-table-cell table:number-columns-repeated="13" table:style-name="ce119"/>
          <table:table-cell table:style-name="ce146" table:number-columns-repeated="2"/>
          <table:table-cell table:number-columns-repeated="16286"/>
        </table:table-row>
        <table:table-row table:style-name="ro2">
          <table:covered-table-cell table:number-columns-repeated="7" table:style-name="ce1"/>
          <table:covered-table-cell table:number-columns-repeated="5" table:style-name="ce11"/>
          <table:covered-table-cell table:number-columns-repeated="9" table:style-name="ce20"/>
          <table:covered-table-cell table:number-columns-repeated="25" table:style-name="ce39"/>
          <table:covered-table-cell table:number-columns-repeated="2" table:style-name="ce51"/>
          <table:table-cell table:style-name="ce61"/>
          <table:table-cell table:style-name="ce63" office:value-type="string" calcext:value-type="string" table:number-columns-spanned="3" table:number-rows-spanned="1">
            <text:p>Pickup All-In Price including FSC</text:p>
          </table:table-cell>
          <table:covered-table-cell table:number-columns-repeated="2" table:style-name="ce63"/>
          <table:table-cell table:style-name="ce63" office:value-type="string" calcext:value-type="string" table:number-columns-spanned="2" table:number-rows-spanned="1">
            <text:p>SOLAS</text:p>
          </table:table-cell>
          <table:covered-table-cell table:style-name="ce63"/>
          <table:table-cell table:style-name="ce61"/>
          <table:table-cell table:style-name="ce72"/>
          <table:table-cell table:style-name="ce63" office:value-type="string" calcext:value-type="string" table:number-columns-spanned="2" table:number-rows-spanned="1">
            <text:p><text:span text:style-name="T6">Origin THC</text:span></text:p>
            <text:p><text:span text:style-name="T7">Terminal Handling Charge</text:span></text:p>
          </table:table-cell>
          <table:covered-table-cell table:style-name="ce63"/>
          <table:table-cell table:style-name="ce61" table:number-columns-repeated="3"/>
          <table:table-cell table:style-name="ce63" office:value-type="string" calcext:value-type="string" table:number-columns-spanned="3" table:number-rows-spanned="1">
            <text:p><text:span text:style-name="T6">Other Fees</text:span></text:p>
            <text:p><text:span text:style-name="T7">Per Unit</text:span></text:p>
          </table:table-cell>
          <table:covered-table-cell table:number-columns-repeated="2" table:style-name="ce63"/>
          <table:table-cell table:style-name="ce63" office:value-type="string" calcext:value-type="string" table:number-columns-spanned="2" table:number-rows-spanned="1">
            <text:p><text:span text:style-name="T6">Other Fees</text:span></text:p>
            <text:p><text:span text:style-name="T7">Per B/L</text:span></text:p>
          </table:table-cell>
          <table:covered-table-cell table:style-name="ce63"/>
          <table:table-cell table:style-name="ce88" office:value-type="string" calcext:value-type="string" table:number-columns-spanned="3" table:number-rows-spanned="1">
            <text:p>Total Origin Cost <text:s text:c="8"/></text:p>
          </table:table-cell>
          <table:covered-table-cell table:number-columns-repeated="2" table:style-name="ce88"/>
          <table:table-cell table:style-name="ce61"/>
          <table:table-cell table:style-name="ce103" office:value-type="string" calcext:value-type="string" table:number-columns-spanned="2" table:number-rows-spanned="1">
            <text:p><text:span text:style-name="T10">Freight</text:span></text:p>
            <text:p><text:span text:style-name="T11">All-In Price (Additional Fees Included)</text:span></text:p>
          </table:table-cell>
          <table:covered-table-cell table:style-name="ce103"/>
          <table:table-cell table:style-name="ce61" table:number-columns-repeated="2"/>
          <table:table-cell table:style-name="ce63" office:value-type="string" calcext:value-type="string" table:number-columns-spanned="3" table:number-rows-spanned="1">
            <text:p><text:span text:style-name="T6">Other Fees</text:span></text:p>
            <text:p><text:span text:style-name="T7">Per Unit</text:span></text:p>
          </table:table-cell>
          <table:covered-table-cell table:number-columns-repeated="2" table:style-name="ce63"/>
          <table:table-cell table:style-name="ce63" office:value-type="string" calcext:value-type="string" table:number-columns-spanned="2" table:number-rows-spanned="1">
            <text:p><text:span text:style-name="T6">Other Fees</text:span></text:p>
            <text:p><text:span text:style-name="T7">Per B/L</text:span></text:p>
          </table:table-cell>
          <table:covered-table-cell table:style-name="ce63"/>
          <table:table-cell table:style-name="ce112" office:value-type="string" calcext:value-type="string" table:number-columns-spanned="3" table:number-rows-spanned="1">
            <text:p>Total Ocean Cost</text:p>
          </table:table-cell>
          <table:covered-table-cell table:number-columns-repeated="2" table:style-name="ce112"/>
          <table:table-cell table:style-name="ce61"/>
          <table:table-cell table:style-name="ce124" office:value-type="string" calcext:value-type="string">
            <text:p>Delivery</text:p>
            <text:p>All-In Price Including FSC</text:p>
            <text:p/>
          </table:table-cell>
          <table:table-cell table:style-name="ce63" office:value-type="string" calcext:value-type="string" table:number-columns-spanned="2" table:number-rows-spanned="1">
            <text:p>Customs Clearance</text:p>
          </table:table-cell>
          <table:covered-table-cell table:style-name="ce63"/>
          <table:table-cell table:style-name="ce135" office:value-type="string" calcext:value-type="string">
            <text:p>Destination THC</text:p>
            <text:p>Terminal Handling Fee</text:p>
          </table:table-cell>
          <table:table-cell table:style-name="ce136"/>
          <table:table-cell table:style-name="ce63" office:value-type="string" calcext:value-type="string" table:number-columns-spanned="2" table:number-rows-spanned="1">
            <text:p><text:span text:style-name="T6">Other Fees</text:span></text:p>
            <text:p><text:span text:style-name="T7">Per Unit</text:span>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<text:span text:style-name="T6">Other Fees</text:span></text:p>
            <text:p><text:span text:style-name="T7">Per B/L</text:span></text:p>
          </table:table-cell>
          <table:covered-table-cell table:number-columns-repeated="2" table:style-name="ce63"/>
          <table:table-cell table:style-name="ce112" office:value-type="string" calcext:value-type="string" table:number-columns-spanned="3" table:number-rows-spanned="1">
            <text:p>Total Destination Cost </text:p>
            <text:p>Destination Currency</text:p>
          </table:table-cell>
          <table:covered-table-cell table:number-columns-repeated="2" table:style-name="ce112"/>
          <table:table-cell table:style-name="ce146" table:number-columns-repeated="2"/>
          <table:table-cell table:number-columns-repeated="16286"/>
        </table:table-row>
        <table:table-row table:style-name="ro3">
          <table:table-cell table:style-name="ce2" office:value-type="string" calcext:value-type="string" table:number-columns-spanned="1" table:number-rows-spanned="2">
            <text:p>Lane ID</text:p>
          </table:table-cell>
          <table:table-cell table:style-name="ce4" office:value-type="string" calcext:value-type="string" table:number-columns-spanned="1" table:number-rows-spanned="2">
            <text:p>Origin Region </text:p>
          </table:table-cell>
          <table:table-cell table:style-name="ce4" office:value-type="string" calcext:value-type="string" table:number-columns-spanned="1" table:number-rows-spanned="2">
            <text:p>Origin Supplier Name</text:p>
          </table:table-cell>
          <table:table-cell table:style-name="ce4" office:value-type="string" calcext:value-type="string" table:number-columns-spanned="1" table:number-rows-spanned="2">
            <text:p>Origin Pickup Address</text:p>
          </table:table-cell>
          <table:table-cell table:style-name="ce4" office:value-type="string" calcext:value-type="string" table:number-columns-spanned="1" table:number-rows-spanned="2">
            <text:p>Origin Country </text:p>
          </table:table-cell>
          <table:table-cell table:style-name="ce4" office:value-type="string" calcext:value-type="string" table:number-columns-spanned="1" table:number-rows-spanned="2">
            <text:p>Origin City</text:p>
          </table:table-cell>
          <table:table-cell table:style-name="ce4" office:value-type="string" calcext:value-type="string" table:number-columns-spanned="1" table:number-rows-spanned="2">
            <text:p>Origin Site Code</text:p>
          </table:table-cell>
          <table:table-cell table:style-name="ce4" office:value-type="string" calcext:value-type="string" table:number-columns-spanned="1" table:number-rows-spanned="2">
            <text:p>Destination Region</text:p>
          </table:table-cell>
          <table:table-cell table:style-name="ce4" office:value-type="string" calcext:value-type="string" table:number-columns-spanned="1" table:number-rows-spanned="2">
            <text:p>Destinantion Delivery Address</text:p>
          </table:table-cell>
          <table:table-cell table:style-name="ce4" office:value-type="string" calcext:value-type="string" table:number-columns-spanned="1" table:number-rows-spanned="2">
            <text:p>Destination Country </text:p>
          </table:table-cell>
          <table:table-cell table:style-name="ce4" office:value-type="string" calcext:value-type="string" table:number-columns-spanned="1" table:number-rows-spanned="2">
            <text:p>Destination City </text:p>
          </table:table-cell>
          <table:table-cell table:style-name="ce4" office:value-type="string" calcext:value-type="string" table:number-columns-spanned="1" table:number-rows-spanned="2">
            <text:p>Dest Site Code</text:p>
          </table:table-cell>
          <table:table-cell table:style-name="ce4" office:value-type="string" calcext:value-type="string" table:number-columns-spanned="1" table:number-rows-spanned="2">
            <text:p>Current POL </text:p>
          </table:table-cell>
          <table:table-cell table:style-name="ce4" office:value-type="string" calcext:value-type="string" table:number-columns-spanned="1" table:number-rows-spanned="2">
            <text:p>Current POD</text:p>
          </table:table-cell>
          <table:table-cell table:style-name="ce4" office:value-type="string" calcext:value-type="string" table:number-columns-spanned="1" table:number-rows-spanned="2">
            <text:p>Service Type</text:p>
          </table:table-cell>
          <table:table-cell table:style-name="ce4" office:value-type="string" calcext:value-type="string" table:number-columns-spanned="1" table:number-rows-spanned="2">
            <text:p>Inco Terms</text:p>
          </table:table-cell>
          <table:table-cell table:style-name="ce4" office:value-type="string" calcext:value-type="string" table:number-columns-spanned="1" table:number-rows-spanned="2">
            <text:p>Total Transit Time (Benchmark)</text:p>
          </table:table-cell>
          <table:table-cell table:style-name="ce34" office:value-type="string" calcext:value-type="string" table:number-columns-spanned="1" table:number-rows-spanned="2">
            <text:p>Est. Ctr #  </text:p>
            <text:p>per Year</text:p>
            <text:p>or</text:p>
            <text:p># of LCL Shipments</text:p>
          </table:table-cell>
          <table:table-cell table:style-name="ce34" office:value-type="string" calcext:value-type="string" table:number-columns-spanned="1" table:number-rows-spanned="2">
            <text:p>Actual Shipments for Current Quarter</text:p>
          </table:table-cell>
          <table:table-cell table:style-name="ce4" office:value-type="string" calcext:value-type="string" table:number-columns-spanned="1" table:number-rows-spanned="2">
            <text:p>Eq Type</text:p>
          </table:table-cell>
          <table:table-cell table:style-name="ce4" office:value-type="string" calcext:value-type="string" table:number-columns-spanned="1" table:number-rows-spanned="2">
            <text:p>Lane Type</text:p>
          </table:table-cell>
          <table:table-cell table:style-name="ce40" office:value-type="string" calcext:value-type="string" table:number-columns-spanned="1" table:number-rows-spanned="2">
            <text:p><text:span text:style-name="T2">Total</text:span></text:p>
            <text:p><text:span text:style-name="T2">Origin</text:span></text:p>
            <text:p><text:span text:style-name="T2">Cost</text:span></text:p>
            <text:p><text:span text:style-name="T3">$ USD</text:span></text:p>
          </table:table-cell>
          <table:table-cell table:style-name="ce40" office:value-type="string" calcext:value-type="string" table:number-columns-spanned="1" table:number-rows-spanned="2">
            <text:p><text:span text:style-name="T2">Total</text:span></text:p>
            <text:p><text:span text:style-name="T2">Ocean</text:span></text:p>
            <text:p><text:span text:style-name="T2">Cost</text:span></text:p>
            <text:p><text:span text:style-name="T3">$ USD</text:span></text:p>
          </table:table-cell>
          <table:table-cell table:style-name="ce40" office:value-type="string" calcext:value-type="string" table:number-columns-spanned="1" table:number-rows-spanned="2">
            <text:p><text:span text:style-name="T2">Total</text:span></text:p>
            <text:p><text:span text:style-name="T2">Destination</text:span></text:p>
            <text:p><text:span text:style-name="T2">Cost</text:span></text:p>
            <text:p><text:span text:style-name="T3">$ USD</text:span></text:p>
          </table:table-cell>
          <table:table-cell table:style-name="ce40" office:value-type="string" calcext:value-type="string" table:number-columns-spanned="1" table:number-rows-spanned="2">
            <text:p>BAF </text:p>
            <text:p>Cost</text:p>
            <text:p>$ USD</text:p>
            <text:p>Q1 2018</text:p>
          </table:table-cell>
          <table:table-cell table:style-name="ce40" office:value-type="string" calcext:value-type="string" table:number-columns-spanned="1" table:number-rows-spanned="2">
            <text:p>PSS</text:p>
            <text:p>Cost</text:p>
            <text:p>$ USD</text:p>
            <text:p>Q1 2018</text:p>
          </table:table-cell>
          <table:table-cell table:style-name="ce40" office:value-type="string" calcext:value-type="string" table:number-columns-spanned="1" table:number-rows-spanned="2">
            <text:p>GRI</text:p>
            <text:p>Cost</text:p>
            <text:p>$ USD</text:p>
            <text:p>Q1 2018</text:p>
          </table:table-cell>
          <table:table-cell table:style-name="ce40" office:value-type="string" calcext:value-type="string" table:number-columns-spanned="1" table:number-rows-spanned="2">
            <text:p>BAF </text:p>
            <text:p>Cost</text:p>
            <text:p>$ USD</text:p>
            <text:p>Q2 2018</text:p>
          </table:table-cell>
          <table:table-cell table:style-name="ce40" office:value-type="string" calcext:value-type="string" table:number-columns-spanned="1" table:number-rows-spanned="2">
            <text:p>PSS</text:p>
            <text:p>Cost</text:p>
            <text:p>$ USD</text:p>
            <text:p>Q2 2018</text:p>
          </table:table-cell>
          <table:table-cell table:style-name="ce40" office:value-type="string" calcext:value-type="string" table:number-columns-spanned="1" table:number-rows-spanned="2">
            <text:p>GRI</text:p>
            <text:p>Cost</text:p>
            <text:p>$ USD</text:p>
            <text:p>Q2 2018</text:p>
          </table:table-cell>
          <table:table-cell table:style-name="ce40" office:value-type="string" calcext:value-type="string" table:number-columns-spanned="1" table:number-rows-spanned="2">
            <text:p>BAF </text:p>
            <text:p>Cost</text:p>
            <text:p>$ USD</text:p>
            <text:p>Q3 2018</text:p>
          </table:table-cell>
          <table:table-cell table:style-name="ce40" office:value-type="string" calcext:value-type="string" table:number-columns-spanned="1" table:number-rows-spanned="2">
            <text:p>PSS</text:p>
            <text:p>Cost</text:p>
            <text:p>$ USD</text:p>
            <text:p>Q3 2018</text:p>
          </table:table-cell>
          <table:table-cell table:style-name="ce40" office:value-type="string" calcext:value-type="string" table:number-columns-spanned="1" table:number-rows-spanned="2">
            <text:p>GRI</text:p>
            <text:p>Cost</text:p>
            <text:p>$ USD</text:p>
            <text:p>Q3 2018</text:p>
          </table:table-cell>
          <table:table-cell table:style-name="ce40" office:value-type="string" calcext:value-type="string" table:number-columns-spanned="1" table:number-rows-spanned="2">
            <text:p>BAF </text:p>
            <text:p>Cost</text:p>
            <text:p>$ USD</text:p>
            <text:p>Q4 2018</text:p>
          </table:table-cell>
          <table:table-cell table:style-name="ce40" office:value-type="string" calcext:value-type="string" table:number-columns-spanned="1" table:number-rows-spanned="2">
            <text:p>PSS</text:p>
            <text:p>Cost</text:p>
            <text:p>$ USD</text:p>
            <text:p>Q4 2018</text:p>
          </table:table-cell>
          <table:table-cell table:style-name="ce40" office:value-type="string" calcext:value-type="string" table:number-columns-spanned="1" table:number-rows-spanned="2">
            <text:p>GRI</text:p>
            <text:p>Cost</text:p>
            <text:p>$ USD</text:p>
            <text:p>Q4 2018</text:p>
          </table:table-cell>
          <table:table-cell table:style-name="ce43" office:value-type="string" calcext:value-type="string">
            <text:p>BAF </text:p>
            <text:p>Cost</text:p>
            <text:p>$ USD</text:p>
            <text:p>Q1 2019</text:p>
          </table:table-cell>
          <table:table-cell table:style-name="ce43" office:value-type="string" calcext:value-type="string">
            <text:p>PSS</text:p>
            <text:p>Cost</text:p>
            <text:p>$ USD</text:p>
            <text:p>Q1 2019</text:p>
          </table:table-cell>
          <table:table-cell table:style-name="ce43" office:value-type="string" calcext:value-type="string">
            <text:p>GRI</text:p>
            <text:p>Cost</text:p>
            <text:p>$ USD</text:p>
            <text:p>Q1 2019</text:p>
          </table:table-cell>
          <table:table-cell table:style-name="ce45" office:value-type="string" calcext:value-type="string" table:number-columns-spanned="1" table:number-rows-spanned="2">
            <text:p>TOTAL</text:p>
            <text:p>COST</text:p>
            <text:p>$ USD</text:p>
            <text:p>Q4 2017</text:p>
          </table:table-cell>
          <table:table-cell table:style-name="ce45" office:value-type="string" calcext:value-type="string" table:number-columns-spanned="1" table:number-rows-spanned="2">
            <text:p>TOTAL</text:p>
            <text:p>COST</text:p>
            <text:p>$ USD </text:p>
            <text:p>Q1 2018</text:p>
          </table:table-cell>
          <table:table-cell table:style-name="ce45" office:value-type="string" calcext:value-type="string" table:number-columns-spanned="1" table:number-rows-spanned="2">
            <text:p>TOTAL</text:p>
            <text:p>COST</text:p>
            <text:p>$ USD </text:p>
            <text:p>Q2 2018</text:p>
          </table:table-cell>
          <table:table-cell table:style-name="ce45" office:value-type="string" calcext:value-type="string" table:number-columns-spanned="1" table:number-rows-spanned="2">
            <text:p>TOTAL</text:p>
            <text:p>COST</text:p>
            <text:p>$ USD </text:p>
            <text:p>Q3 2018</text:p>
          </table:table-cell>
          <table:table-cell table:style-name="ce45" office:value-type="string" calcext:value-type="string" table:number-columns-spanned="1" table:number-rows-spanned="2">
            <text:p>TOTAL</text:p>
            <text:p>COST</text:p>
            <text:p>$ USD </text:p>
            <text:p>Q4 2018</text:p>
          </table:table-cell>
          <table:table-cell table:style-name="ce45" office:value-type="string" calcext:value-type="string" table:number-columns-spanned="1" table:number-rows-spanned="2">
            <text:p>TOTAL COST $ USD Q1 2019</text:p>
          </table:table-cell>
          <table:table-cell table:style-name="ce40" office:value-type="string" calcext:value-type="string" table:number-columns-spanned="1" table:number-rows-spanned="2">
            <text:p>Total Transit Day</text:p>
          </table:table-cell>
          <table:table-cell table:style-name="ce52" office:value-type="string" calcext:value-type="string" table:number-columns-spanned="1" table:number-rows-spanned="2">
            <text:p>POL</text:p>
          </table:table-cell>
          <table:table-cell table:style-name="ce52" office:value-type="string" calcext:value-type="string" table:number-columns-spanned="1" table:number-rows-spanned="2">
            <text:p>POD</text:p>
          </table:table-cell>
          <table:table-cell table:style-name="ce52" office:value-type="string" calcext:value-type="string" table:number-columns-spanned="1" table:number-rows-spanned="2">
            <text:p>Local Origin Currency</text:p>
          </table:table-cell>
          <table:table-cell table:style-name="ce64" office:value-type="string" calcext:value-type="string">
            <text:p>Min</text:p>
          </table:table-cell>
          <table:table-cell table:style-name="ce68" office:value-type="string" calcext:value-type="string">
            <text:p><text:span text:style-name="T4">LCL</text:span></text:p>
            <text:p><text:span text:style-name="T5">Per CBM</text:span></text:p>
          </table:table-cell>
          <table:table-cell table:style-name="ce68" office:value-type="string" calcext:value-type="string">
            <text:p><text:span text:style-name="T4">FCL</text:span></text:p>
            <text:p><text:span text:style-name="T5">Per Container</text:span></text:p>
          </table:table-cell>
          <table:table-cell table:style-name="ce70" office:value-type="string" calcext:value-type="string">
            <text:p>VGM Weight Fee</text:p>
          </table:table-cell>
          <table:table-cell table:style-name="ce68" office:value-type="string" calcext:value-type="string">
            <office:annotation draw:style-name="gr1" draw:text-style-name="P1" svg:width="4.065cm" svg:height="2.304cm" svg:x="124.802cm" svg:y="3.122cm" draw:caption-point-x="10.282cm" draw:caption-point-y="0.01cm">
              <dc:creator>Unknown Author</dc:creator>
              <dc:date>2025-03-17T11:24:00</dc:date>
              <text:p>Avery Dennison User:</text:p>
              <text:p><text:span text:style-name="T1">FCL = per container</text:span></text:p>
              <text:p><text:span text:style-name="T1">LCL = per B/L</text:span></text:p>
            </office:annotation>
            <text:p>VGM Transaction Fee</text:p>
            <text:p>FCL: Per Container</text:p>
            <text:p>LCL: Per B/L</text:p>
          </table:table-cell>
          <table:table-cell table:style-name="ce71" office:value-type="string" calcext:value-type="string">
            <text:p>Forwarding / Handling Per B/L</text:p>
          </table:table-cell>
          <table:table-cell table:style-name="ce71" office:value-type="string" calcext:value-type="string">
            <text:p>IMO Surcharge</text:p>
            <text:p>Per B/L</text:p>
          </table:table-cell>
          <table:table-cell table:style-name="ce70" office:value-type="string" calcext:value-type="string">
            <text:p>Min</text:p>
          </table:table-cell>
          <table:table-cell table:style-name="ce68" office:value-type="string" calcext:value-type="string">
            <text:p>Per Unit</text:p>
          </table:table-cell>
          <table:table-cell table:style-name="ce71" office:value-type="string" calcext:value-type="string">
            <text:p><text:span text:style-name="T8">LSS</text:span></text:p>
            <text:p><text:span text:style-name="T9">Low Sulfur Surcharge</text:span></text:p>
            <text:p><text:span text:style-name="T9">Per B/L</text:span></text:p>
          </table:table-cell>
          <table:table-cell table:style-name="ce71" office:value-type="string" calcext:value-type="string">
            <text:p>B/L Fee</text:p>
            <text:p>Per B/L</text:p>
          </table:table-cell>
          <table:table-cell table:style-name="ce71" office:value-type="string" calcext:value-type="string">
            <text:p>Export Customs Clearance</text:p>
            <text:p>Per B/L</text:p>
          </table:table-cell>
          <table:table-cell table:style-name="ce70" office:value-type="string" calcext:value-type="string">
            <text:p>Description</text:p>
          </table:table-cell>
          <table:table-cell table:style-name="ce70" office:value-type="string" calcext:value-type="string">
            <text:p>Min</text:p>
          </table:table-cell>
          <table:table-cell table:style-name="ce68" office:value-type="string" calcext:value-type="string">
            <text:p>Per Unit</text:p>
          </table:table-cell>
          <table:table-cell table:style-name="ce70" office:value-type="string" calcext:value-type="string">
            <text:p>Description</text:p>
          </table:table-cell>
          <table:table-cell table:style-name="ce68" office:value-type="string" calcext:value-type="string">
            <text:p>Per B/L</text:p>
          </table:table-cell>
          <table:table-cell table:style-name="ce89" office:value-type="string" calcext:value-type="string">
            <text:p>Total Origin Cost Origin Currency</text:p>
          </table:table-cell>
          <table:table-cell table:style-name="ce89" office:value-type="string" calcext:value-type="string">
            <text:p>Exchange Rate</text:p>
          </table:table-cell>
          <table:table-cell table:style-name="ce89" office:value-type="string" calcext:value-type="string">
            <text:p>Total Origin Cost</text:p>
            <text:p>$ USD</text:p>
          </table:table-cell>
          <table:table-cell table:style-name="ce52" office:value-type="string" calcext:value-type="string" table:number-columns-spanned="1" table:number-rows-spanned="2">
            <text:p>Ocean Currency</text:p>
          </table:table-cell>
          <table:table-cell table:style-name="ce70" office:value-type="string" calcext:value-type="string">
            <text:p>Min</text:p>
          </table:table-cell>
          <table:table-cell table:style-name="ce68" office:value-type="string" calcext:value-type="string">
            <text:p>Per Unit</text:p>
          </table:table-cell>
          <table:table-cell table:style-name="ce71" office:value-type="string" calcext:value-type="string">
            <text:p>AMS</text:p>
            <text:p>Per Shpt</text:p>
          </table:table-cell>
          <table:table-cell table:style-name="ce71" office:value-type="string" calcext:value-type="string">
            <text:p><text:span text:style-name="T8">ISPS </text:span></text:p>
            <text:p><text:span text:style-name="T9">Security Fee</text:span></text:p>
            <text:p><text:span text:style-name="T9">Per Unit</text:span></text:p>
          </table:table-cell>
          <table:table-cell table:style-name="ce70" office:value-type="string" calcext:value-type="string">
            <text:p>Description</text:p>
          </table:table-cell>
          <table:table-cell table:style-name="ce70" office:value-type="string" calcext:value-type="string">
            <text:p>Min</text:p>
          </table:table-cell>
          <table:table-cell table:style-name="ce68" office:value-type="string" calcext:value-type="string">
            <text:p>Per Unit</text:p>
          </table:table-cell>
          <table:table-cell table:style-name="ce70" office:value-type="string" calcext:value-type="string">
            <text:p>Description</text:p>
          </table:table-cell>
          <table:table-cell table:style-name="ce68" office:value-type="string" calcext:value-type="string">
            <text:p>Per B/L</text:p>
          </table:table-cell>
          <table:table-cell table:style-name="ce89" office:value-type="string" calcext:value-type="string">
            <text:p>Total Ocean Cost Ocean Currency</text:p>
          </table:table-cell>
          <table:table-cell table:style-name="ce89" office:value-type="string" calcext:value-type="string">
            <text:p>Exchange Rate</text:p>
          </table:table-cell>
          <table:table-cell table:style-name="ce89" office:value-type="string" calcext:value-type="string">
            <text:p>Total Ocean Cost</text:p>
            <text:p>$ USD</text:p>
          </table:table-cell>
          <table:table-cell table:style-name="ce52" office:value-type="string" calcext:value-type="string" table:number-columns-spanned="1" table:number-rows-spanned="2">
            <text:p>Local Destination Currency</text:p>
          </table:table-cell>
          <table:table-cell table:style-name="ce68" office:value-type="string" calcext:value-type="string">
            <text:p>Per Unit</text:p>
          </table:table-cell>
          <table:table-cell table:style-name="ce70" office:value-type="string" calcext:value-type="string">
            <text:p><text:span text:style-name="T8">Import Clearance Fee</text:span></text:p>
            <text:p><text:span text:style-name="T9">Per Entry</text:span></text:p>
          </table:table-cell>
          <table:table-cell table:style-name="ce132" office:value-type="string" calcext:value-type="string">
            <text:p>Doc Turnover Fee</text:p>
          </table:table-cell>
          <table:table-cell table:style-name="ce68" office:value-type="string" calcext:value-type="string">
            <text:p>Per Unit</text:p>
          </table:table-cell>
          <table:table-cell table:style-name="ce68" office:value-type="string" calcext:value-type="string">
            <text:p>Per B/L</text:p>
          </table:table-cell>
          <table:table-cell table:style-name="ce70" office:value-type="string" calcext:value-type="string">
            <text:p>Description</text:p>
          </table:table-cell>
          <table:table-cell table:style-name="ce68" office:value-type="string" calcext:value-type="string">
            <text:p>Per Unit</text:p>
          </table:table-cell>
          <table:table-cell table:style-name="ce70" office:value-type="string" calcext:value-type="string">
            <text:p>Description</text:p>
          </table:table-cell>
          <table:table-cell table:style-name="ce139" office:value-type="string" calcext:value-type="string">
            <text:p><text:span text:style-name="T8">Only Applicable for Lanes Terminated </text:span><text:span text:style-name="T12">at Port </text:span></text:p>
            <text:p><text:span text:style-name="T13">(For Destination Use Only- DTHC</text:span></text:p>
            <text:p><text:span text:style-name="T13">And any other "collect" fees)</text:span></text:p>
          </table:table-cell>
          <table:table-cell table:style-name="ce68" office:value-type="string" calcext:value-type="string">
            <text:p>Per B/L</text:p>
          </table:table-cell>
          <table:table-cell table:style-name="ce89" office:value-type="string" calcext:value-type="string">
            <text:p>Total Destination Cost</text:p>
            <text:p>Destination Currency</text:p>
          </table:table-cell>
          <table:table-cell table:style-name="ce89" office:value-type="string" calcext:value-type="string">
            <text:p>Exchange Rate</text:p>
          </table:table-cell>
          <table:table-cell table:style-name="ce143" office:value-type="string" calcext:value-type="string">
            <text:p>Total Destination Cost</text:p>
            <text:p>$ USD</text:p>
          </table:table-cell>
          <table:table-cell table:style-name="ce146" table:number-columns-repeated="2"/>
          <table:table-cell table:number-columns-repeated="16286"/>
        </table:table-row>
        <table:table-row table:style-name="ro4">
          <table:covered-table-cell table:style-name="ce2"/>
          <table:covered-table-cell table:number-columns-repeated="16" table:style-name="ce4"/>
          <table:covered-table-cell table:number-columns-repeated="2" table:style-name="ce34"/>
          <table:covered-table-cell table:number-columns-repeated="2" table:style-name="ce4"/>
          <table:covered-table-cell table:number-columns-repeated="15" table:style-name="ce40"/>
          <table:table-cell table:style-name="ce44" table:number-columns-repeated="3"/>
          <table:covered-table-cell table:number-columns-repeated="6" table:style-name="ce45"/>
          <table:covered-table-cell table:style-name="ce40"/>
          <table:covered-table-cell table:number-columns-repeated="3" table:style-name="ce52"/>
          <table:table-cell table:style-name="ce65" office:value-type="string" calcext:value-type="string">
            <text:p>Min</text:p>
          </table:table-cell>
          <table:table-cell table:style-name="ce69" office:value-type="string" calcext:value-type="string">
            <text:p><text:span text:style-name="T4">LCL</text:span></text:p>
            <text:p><text:span text:style-name="T5">Per CBM</text:span></text:p>
          </table:table-cell>
          <table:table-cell table:style-name="ce69" office:value-type="string" calcext:value-type="string">
            <text:p><text:span text:style-name="T4">FCL</text:span></text:p>
            <text:p><text:span text:style-name="T5">Per Container</text:span></text:p>
          </table:table-cell>
          <table:table-cell table:style-name="ce65" office:value-type="string" calcext:value-type="string">
            <text:p>VGM Weight Fee</text:p>
          </table:table-cell>
          <table:table-cell table:style-name="ce69" office:value-type="string" calcext:value-type="string">
            <text:p>VGM Transaction Fee</text:p>
            <text:p>FCL: Per Container</text:p>
            <text:p>LCL: Per B/L</text:p>
          </table:table-cell>
          <table:table-cell table:number-columns-repeated="2" table:style-name="ce69" office:value-type="string" calcext:value-type="string">
            <text:p>Per B/L</text:p>
          </table:table-cell>
          <table:table-cell table:style-name="ce65" office:value-type="string" calcext:value-type="string">
            <text:p>Min</text:p>
          </table:table-cell>
          <table:table-cell table:style-name="ce69" office:value-type="string" calcext:value-type="string">
            <text:p>Per Unit</text:p>
          </table:table-cell>
          <table:table-cell table:number-columns-repeated="3" table:style-name="ce69" office:value-type="string" calcext:value-type="string">
            <text:p>Per B/L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Min</text:p>
          </table:table-cell>
          <table:table-cell table:style-name="ce69" office:value-type="string" calcext:value-type="string">
            <text:p>Per Unit</text:p>
          </table:table-cell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Per B/L</text:p>
          </table:table-cell>
          <table:table-cell table:style-name="ce90" office:value-type="string" calcext:value-type="string">
            <text:p>Total Origin Cost Origin Currency</text:p>
          </table:table-cell>
          <table:table-cell table:style-name="ce90" office:value-type="string" calcext:value-type="string">
            <text:p>Exchange Rate</text:p>
          </table:table-cell>
          <table:table-cell table:style-name="ce90" office:value-type="string" calcext:value-type="string">
            <text:p>Total Origin Cost</text:p>
            <text:p>$ USD</text:p>
          </table:table-cell>
          <table:covered-table-cell table:style-name="ce52"/>
          <table:table-cell table:style-name="ce65" office:value-type="string" calcext:value-type="string">
            <text:p>Min</text:p>
          </table:table-cell>
          <table:table-cell table:style-name="ce69" office:value-type="string" calcext:value-type="string">
            <text:p>Per Unit</text:p>
          </table:table-cell>
          <table:table-cell table:style-name="ce69" office:value-type="string" calcext:value-type="string">
            <text:p>Per Shpt</text:p>
          </table:table-cell>
          <table:table-cell table:style-name="ce69" office:value-type="string" calcext:value-type="string">
            <text:p>Per Unit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Min</text:p>
          </table:table-cell>
          <table:table-cell table:style-name="ce69" office:value-type="string" calcext:value-type="string">
            <text:p>Per Unit</text:p>
          </table:table-cell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Per B/L</text:p>
          </table:table-cell>
          <table:table-cell table:style-name="ce90" office:value-type="string" calcext:value-type="string">
            <text:p>Total Ocean Cost Ocean Currency</text:p>
          </table:table-cell>
          <table:table-cell table:style-name="ce90" office:value-type="string" calcext:value-type="string">
            <text:p>Exchange Rate</text:p>
          </table:table-cell>
          <table:table-cell table:style-name="ce90" office:value-type="string" calcext:value-type="string">
            <text:p>Total Ocean Cost</text:p>
            <text:p>$ USD</text:p>
          </table:table-cell>
          <table:covered-table-cell table:style-name="ce52"/>
          <table:table-cell table:style-name="ce69" office:value-type="string" calcext:value-type="string">
            <text:p>Per Unit</text:p>
          </table:table-cell>
          <table:table-cell table:style-name="ce65" office:value-type="string" calcext:value-type="string">
            <text:p><text:span text:style-name="T8">Import Clearance Fee</text:span></text:p>
            <text:p><text:span text:style-name="T9">Per Entry</text:span></text:p>
          </table:table-cell>
          <table:table-cell table:style-name="ce133" office:value-type="string" calcext:value-type="string">
            <text:p>Doc Turnover Fee</text:p>
          </table:table-cell>
          <table:table-cell table:style-name="ce69" office:value-type="string" calcext:value-type="string">
            <text:p>Per Unit</text:p>
          </table:table-cell>
          <table:table-cell table:style-name="ce69" office:value-type="string" calcext:value-type="string">
            <text:p>Per B/L</text:p>
          </table:table-cell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Per Unit</text:p>
          </table:table-cell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DTHC</text:p>
            <text:p>And any other "collect" fees as the examples in tab "1.1 Collect Charges"</text:p>
          </table:table-cell>
          <table:table-cell table:style-name="ce69" office:value-type="string" calcext:value-type="string">
            <text:p>Per B/L</text:p>
          </table:table-cell>
          <table:table-cell table:style-name="ce90" office:value-type="string" calcext:value-type="string">
            <text:p>Total Destination Cost</text:p>
            <text:p>Destination Currency</text:p>
          </table:table-cell>
          <table:table-cell table:style-name="ce90" office:value-type="string" calcext:value-type="string">
            <text:p>Exchange Rate</text:p>
          </table:table-cell>
          <table:table-cell table:style-name="ce144" office:value-type="string" calcext:value-type="string">
            <text:p>Total Destination Cost</text:p>
            <text:p>$ USD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orth Asia</text:p>
          </table:table-cell>
          <table:table-cell table:style-name="ce5" office:value-type="string" calcext:value-type="string">
            <text:p>Avery Dennison</text:p>
          </table:table-cell>
          <table:table-cell table:style-name="ce5" office:value-type="string" calcext:value-type="string">
            <text:p>No 608 Kun Jia Road Kunshan Economic &amp; Technological Zone Jiangsu Province P.R. 215300</text:p>
          </table:table-cell>
          <table:table-cell table:style-name="ce8" office:value-type="string" calcext:value-type="string">
            <text:p>China</text:p>
          </table:table-cell>
          <table:table-cell table:style-name="ce5" office:value-type="string" calcext:value-type="string">
            <text:p>Kunshan</text:p>
          </table:table-cell>
          <table:table-cell table:style-name="ce5" office:value-type="string" calcext:value-type="string">
            <text:p>CN007L</text:p>
          </table:table-cell>
          <table:table-cell table:style-name="ce12" office:value-type="string" calcext:value-type="string">
            <text:p>EMEA</text:p>
          </table:table-cell>
          <table:table-cell table:style-name="ce14" office:value-type="string" calcext:value-type="string">
            <text:p>Planck-Str 4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Radevormwald</text:p>
          </table:table-cell>
          <table:table-cell table:style-name="ce18" office:value-type="string" calcext:value-type="string">
            <text:p>DE044L</text:p>
          </table:table-cell>
          <table:table-cell table:style-name="ce21" office:value-type="string" calcext:value-type="string">
            <text:p>Shanghai</text:p>
          </table:table-cell>
          <table:table-cell table:style-name="ce21" office:value-type="string" calcext:value-type="string">
            <text:p>Antwerp</text:p>
          </table:table-cell>
          <table:table-cell table:style-name="ce25" office:value-type="string" calcext:value-type="string">
            <text:p>Door to Port</text:p>
          </table:table-cell>
          <table:table-cell table:style-name="ce28" office:value-type="string" calcext:value-type="string">
            <text:p>FCA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7" office:value-type="string" calcext:value-type="string">
            <text:p>40GP</text:p>
          </table:table-cell>
          <table:table-cell table:style-name="ce28" office:value-type="string" calcext:value-type="string">
            <text:p>EU1</text:p>
          </table:table-cell>
          <table:table-cell table:style-name="ce41" table:formula="of:=[.BQ5]" office:value-type="float" office:value="482.753623188406" calcext:value-type="float">
            <text:p><text:s/>$482.75 </text:p>
          </table:table-cell>
          <table:table-cell table:style-name="ce41" table:formula="of:=[.CD5]" office:value-type="float" office:value="2723" calcext:value-type="float">
            <text:p><text:s/>$2,723.00 </text:p>
          </table:table-cell>
          <table:table-cell table:style-name="ce41" table:formula="of:=[.CR5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250" calcext:value-type="float">
            <text:p><text:s/>$250.00 </text:p>
          </table:table-cell>
          <table:table-cell table:number-columns-repeated="3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1" table:number-columns-repeated="2"/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6" table:formula="of:=SUM([.V5:.X5])" office:value-type="float" office:value="3205.75362318841" calcext:value-type="float">
            <text:p><text:s/>$3,205.75 </text:p>
          </table:table-cell>
          <table:table-cell table:style-name="ce46" table:formula="of:=[.AN5]+[.Y5]+[.Z5]+[.AA5]" office:value-type="float" office:value="3455.75362318841" calcext:value-type="float">
            <text:p><text:s/>$3,455.75 </text:p>
          </table:table-cell>
          <table:table-cell table:style-name="ce46" table:formula="of:=[.AN5]+[.AB5]+[.AC5]+[.AD5]" office:value-type="float" office:value="3205.75362318841" calcext:value-type="float">
            <text:p><text:s/>$3,205.75 </text:p>
          </table:table-cell>
          <table:table-cell table:style-name="ce46" table:formula="of:=[.AN5]+[.AE5]+[.AF5]+[.AG5]" office:value-type="float" office:value="3325.75362318841" calcext:value-type="float">
            <text:p><text:s/>$3,325.75 </text:p>
          </table:table-cell>
          <table:table-cell table:style-name="ce46" table:formula="of:=[.AN5]+[.AH5]+[.AI5]+[.AJ5]" office:value-type="float" office:value="3325.75362318841" calcext:value-type="float">
            <text:p><text:s/>$3,325.75 </text:p>
          </table:table-cell>
          <table:table-cell table:style-name="ce46" table:formula="of:=[.AK5]+[.AL5]+[.AM5]+[.BQ5]+[.CD5]+[.CR5]" office:value-type="float" office:value="3325.75362318841" calcext:value-type="float">
            <text:p><text:s/>$3,325.75 </text:p>
          </table:table-cell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SHANGHAI (SHA) </text:p>
          </table:table-cell>
          <table:table-cell table:style-name="ce56" office:value-type="string" calcext:value-type="string">
            <text:p>Antwerp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67" calcext:value-type="float">
            <text:p><text:s/>USD867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66" calcext:value-type="float">
            <text:p><text:s/>USD866.00 </text:p>
          </table:table-cell>
          <table:table-cell table:style-name="ce66" office:value-type="float" office:value="92" calcext:value-type="float">
            <text:p><text:s/>USD92.00 </text:p>
          </table:table-cell>
          <table:table-cell table:style-name="ce66" office:value-type="float" office:value="45" calcext:value-type="float">
            <text:p><text:s/>USD45.00 </text:p>
          </table:table-cell>
          <table:table-cell table:style-name="ce73"/>
          <table:table-cell table:number-columns-repeated="2" table:style-name="ce73" office:value-type="currency" office:currency="CNY" office:value="1050" calcext:value-type="currency">
            <text:p><text:s/>CNY 1,050.00 </text:p>
          </table:table-cell>
          <table:table-cell table:style-name="ce73" office:value-type="currency" office:currency="CNY" office:value="345" calcext:value-type="currency">
            <text:p><text:s/>CNY 345.00 </text:p>
          </table:table-cell>
          <table:table-cell table:style-name="ce73" office:value-type="currency" office:currency="CNY" office:value="550" calcext:value-type="currency">
            <text:p><text:s/>CNY 550.00 </text:p>
          </table:table-cell>
          <table:table-cell table:style-name="ce73" office:value-type="currency" office:currency="CNY" office:value="100" calcext:value-type="currency">
            <text:p><text:s/>CNY 100.00 </text:p>
          </table:table-cell>
          <table:table-cell table:style-name="ce84" office:value-type="string" calcext:value-type="string">
            <text:p>Booking Fee; <text:s/>Port Security Fee <text:s/>0</text:p>
          </table:table-cell>
          <table:table-cell table:number-columns-repeated="2" table:style-name="ce73" office:value-type="currency" office:currency="CNY" office:value="530" calcext:value-type="currency">
            <text:p><text:s/>CNY 530.00 </text:p>
          </table:table-cell>
          <table:table-cell table:style-name="ce84" office:value-type="float" office:value="0" calcext:value-type="float">
            <text:p>0</text:p>
          </table:table-cell>
          <table:table-cell table:style-name="ce73" office:value-type="currency" office:currency="CNY" office:value="0" calcext:value-type="currency">
            <text:p><text:s/>CNY -   </text:p>
          </table:table-cell>
          <table:table-cell table:style-name="ce91" table:formula="of:=SUM([.AZ5]+[.BB5]+[.BC5]+[.BF5]+[.BG5]+[.BH5]+[.BL5])" office:value-type="currency" office:currency="CNY" office:value="3331" calcext:value-type="currency">
            <text:p><text:s/>CNY 3,331.00 </text:p>
          </table:table-cell>
          <table:table-cell table:style-name="ce92" office:value-type="float" office:value="0.144927536231884" calcext:value-type="float">
            <text:p>0.145</text:p>
          </table:table-cell>
          <table:table-cell table:style-name="ce95" table:formula="of:=SUM([.BO5]*[.BP5])" office:value-type="currency" office:currency="USD" office:value="482.753623188406" calcext:value-type="currency">
            <text:p><text:s/>USD 482.75 </text:p>
          </table:table-cell>
          <table:table-cell table:style-name="ce99" office:value-type="string" calcext:value-type="string">
            <text:p>USD</text:p>
          </table:table-cell>
          <table:table-cell table:number-columns-repeated="2" table:style-name="ce104" office:value-type="currency" office:currency="USD" office:value="1500" calcext:value-type="currency">
            <text:p><text:s/>USD 1,500.00 </text:p>
          </table:table-cell>
          <table:table-cell table:style-name="ce104" office:value-type="currency" office:currency="USD" office:value="1223" calcext:value-type="currency">
            <text:p><text:s/>USD 1,223.00 </text:p>
          </table:table-cell>
          <table:table-cell table:style-name="ce104" office:value-type="currency" office:currency="USD" office:value="0" calcext:value-type="currency">
            <text:p><text:s/>USD -   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4" office:value-type="currency" office:currency="USD" office:value="0" calcext:value-type="currency">
            <text:p><text:s/>USD -   </text:p>
          </table:table-cell>
          <table:table-cell table:style-name="ce108" office:value-type="float" office:value="0" calcext:value-type="float">
            <text:p>0</text:p>
          </table:table-cell>
          <table:table-cell table:style-name="ce104" office:value-type="currency" office:currency="USD" office:value="0" calcext:value-type="currency">
            <text:p><text:s/>USD -   </text:p>
          </table:table-cell>
          <table:table-cell table:style-name="ce113" table:formula="of:=SUM([.BT5:.CA5])" office:value-type="currency" office:currency="USD" office:value="2723" calcext:value-type="currency">
            <text:p><text:s/>USD 2,723.00 </text:p>
          </table:table-cell>
          <table:table-cell table:style-name="ce99" office:value-type="float" office:value="1" calcext:value-type="float">
            <text:p>1</text:p>
          </table:table-cell>
          <table:table-cell table:style-name="ce117" table:formula="of:=SUM([.CB5]*[.CC5])" office:value-type="currency" office:currency="USD" office:value="2723" calcext:value-type="currency">
            <text:p><text:s/>USD 2,723.00 </text:p>
          </table:table-cell>
          <table:table-cell table:style-name="ce120" office:value-type="string" calcext:value-type="string">
            <text:p>EUR</text:p>
          </table:table-cell>
          <table:table-cell table:number-columns-repeated="2" table:style-name="ce125" office:value-type="currency" office:currency="EUR" office:value="0" calcext:value-type="currency">
            <text:p><text:s/>EUR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25" office:value-type="currency" office:currency="EUR" office:value="0" calcext:value-type="currency">
            <text:p><text:s/>EUR -   </text:p>
          </table:table-cell>
          <table:table-cell table:style-name="ce137" office:value-type="float" office:value="0" calcext:value-type="float">
            <text:p>0</text:p>
          </table:table-cell>
          <table:table-cell table:style-name="ce125" office:value-type="currency" office:currency="EUR" office:value="0" calcext:value-type="currency">
            <text:p><text:s/>EUR -   </text:p>
          </table:table-cell>
          <table:table-cell table:style-name="ce137" office:value-type="float" office:value="0" calcext:value-type="float">
            <text:p>0</text:p>
          </table:table-cell>
          <table:table-cell table:style-name="ce140" office:value-type="currency" office:currency="USD" office:value="0" calcext:value-type="currency">
            <text:p><text:s/>USD -   </text:p>
          </table:table-cell>
          <table:table-cell table:number-columns-repeated="2" table:style-name="ce125" office:value-type="currency" office:currency="EUR" office:value="0" calcext:value-type="currency">
            <text:p><text:s/>EUR -   </text:p>
          </table:table-cell>
          <table:table-cell table:style-name="ce141" office:value-type="float" office:value="1.0752688172043" calcext:value-type="float">
            <text:p>1.075</text:p>
          </table:table-cell>
          <table:table-cell table:style-name="ce145" table:formula="of:=[.CN5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EMEA</text:p>
          </table:table-cell>
          <table:table-cell table:style-name="ce15" office:value-type="string" calcext:value-type="string">
            <text:p>Planck-Str 4</text:p>
          </table:table-cell>
          <table:table-cell table:style-name="ce15" office:value-type="string" calcext:value-type="string">
            <text:p>Germany</text:p>
          </table:table-cell>
          <table:table-cell table:style-name="ce15" office:value-type="string" calcext:value-type="string">
            <text:p>Radevormwald</text:p>
          </table:table-cell>
          <table:table-cell table:style-name="ce19" office:value-type="string" calcext:value-type="string">
            <text:p>DE044L</text:p>
          </table:table-cell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Antwerp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6" calcext:value-type="float">
            <text:p>36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EU1</text:p>
          </table:table-cell>
          <table:table-cell table:style-name="ce42" table:formula="of:=[.BQ6]" office:value-type="float" office:value="380.652173913043" calcext:value-type="float">
            <text:p><text:s/>$380.65 </text:p>
          </table:table-cell>
          <table:table-cell table:style-name="ce42" table:formula="of:=[.CD6]" office:value-type="float" office:value="828.99" calcext:value-type="float">
            <text:p><text:s/>$828.99 </text:p>
          </table:table-cell>
          <table:table-cell table:style-name="ce42" table:formula="of:=[.CR6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25" calcext:value-type="float">
            <text:p><text:s/>$125.00 </text:p>
          </table:table-cell>
          <table:table-cell table:number-columns-repeated="3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7" table:formula="of:=SUM([.V6:.X6])" office:value-type="float" office:value="1209.64217391304" calcext:value-type="float">
            <text:p><text:s/>$1,209.64 </text:p>
          </table:table-cell>
          <table:table-cell table:style-name="ce47" table:formula="of:=[.AN6]+[.Y6]+[.Z6]+[.AA6]" office:value-type="float" office:value="1334.64217391304" calcext:value-type="float">
            <text:p><text:s/>$1,334.64 </text:p>
          </table:table-cell>
          <table:table-cell table:style-name="ce47" table:formula="of:=[.AN6]+[.AB6]+[.AC6]+[.AD6]" office:value-type="float" office:value="1209.64217391304" calcext:value-type="float">
            <text:p><text:s/>$1,209.64 </text:p>
          </table:table-cell>
          <table:table-cell table:style-name="ce47" table:formula="of:=[.AN6]+[.AE6]+[.AF6]+[.AG6]" office:value-type="float" office:value="1269.64217391304" calcext:value-type="float">
            <text:p><text:s/>$1,269.64 </text:p>
          </table:table-cell>
          <table:table-cell table:style-name="ce47" table:formula="of:=[.AN6]+[.AH6]+[.AI6]+[.AJ6]" office:value-type="float" office:value="1269.64217391304" calcext:value-type="float">
            <text:p><text:s/>$1,269.64 </text:p>
          </table:table-cell>
          <table:table-cell table:style-name="ce46" table:formula="of:=[.AK6]+[.AL6]+[.AM6]+[.BQ6]+[.CD6]+[.CR6]" office:value-type="float" office:value="1269.64217391304" calcext:value-type="float">
            <text:p><text:s/>$1,269.64 </text:p>
          </table:table-cell>
          <table:table-cell table:style-name="ce49" office:value-type="float" office:value="44" calcext:value-type="float">
            <text:p>44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Antwerp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68" calcext:value-type="float">
            <text:p><text:s/>USD868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67" calcext:value-type="float">
            <text:p><text:s/>USD867.00 </text:p>
          </table:table-cell>
          <table:table-cell table:style-name="ce66" office:value-type="float" office:value="93" calcext:value-type="float">
            <text:p><text:s/>USD93.00 </text:p>
          </table:table-cell>
          <table:table-cell table:style-name="ce66" office:value-type="float" office:value="46" calcext:value-type="float">
            <text:p><text:s/>USD46.00 </text:p>
          </table:table-cell>
          <table:table-cell table:style-name="ce74"/>
          <table:table-cell table:number-columns-repeated="2" table:style-name="ce74" office:value-type="currency" office:currency="CNY" office:value="675" calcext:value-type="currency">
            <text:p><text:s/>CNY 675.00 </text:p>
          </table:table-cell>
          <table:table-cell table:style-name="ce74" office:value-type="currency" office:currency="CNY" office:value="172.5" calcext:value-type="currency">
            <text:p><text:s/>CNY 172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370" calcext:value-type="currency">
            <text:p><text:s/>CNY 370.00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6]+[.BB6]+[.BC6]+[.BF6]+[.BG6]+[.BH6]+[.BL6])" office:value-type="currency" office:currency="CNY" office:value="2626.5" calcext:value-type="currency">
            <text:p><text:s/>CNY 2,626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6]*[.BP6])" office:value-type="currency" office:currency="USD" office:value="380.652173913043" calcext:value-type="currency">
            <text:p><text:s/>USD 380.65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800" calcext:value-type="currency">
            <text:p><text:s/>USD 800.00 </text:p>
          </table:table-cell>
          <table:table-cell table:style-name="ce105" office:value-type="currency" office:currency="USD" office:value="28.99" calcext:value-type="currency">
            <text:p><text:s/>USD 28.99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6:.CA6])" office:value-type="currency" office:currency="USD" office:value="828.99" calcext:value-type="currency">
            <text:p><text:s/>USD 828.9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6]*[.CC6])" office:value-type="currency" office:currency="USD" office:value="828.99" calcext:value-type="currency">
            <text:p><text:s/>USD 828.99 </text:p>
          </table:table-cell>
          <table:table-cell table:style-name="ce121" office:value-type="string" calcext:value-type="string">
            <text:p>EUR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42" office:value-type="float" office:value="1.0752688172043" calcext:value-type="float">
            <text:p>1.075</text:p>
          </table:table-cell>
          <table:table-cell table:style-name="ce145" table:formula="of:=[.CN6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EMEA</text:p>
          </table:table-cell>
          <table:table-cell table:style-name="ce15" office:value-type="string" calcext:value-type="string">
            <text:p>Planck-Str 4</text:p>
          </table:table-cell>
          <table:table-cell table:style-name="ce15" office:value-type="string" calcext:value-type="string">
            <text:p>Germany</text:p>
          </table:table-cell>
          <table:table-cell table:style-name="ce15" office:value-type="string" calcext:value-type="string">
            <text:p>Radevormwald</text:p>
          </table:table-cell>
          <table:table-cell table:style-name="ce19" office:value-type="string" calcext:value-type="string">
            <text:p>DE044L</text:p>
          </table:table-cell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Rotterdam (RTM)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7" calcext:value-type="float">
            <text:p>37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EU1</text:p>
          </table:table-cell>
          <table:table-cell table:style-name="ce42" table:formula="of:=[.BQ7]" office:value-type="float" office:value="483.623188405797" calcext:value-type="float">
            <text:p><text:s/>$483.62 </text:p>
          </table:table-cell>
          <table:table-cell table:style-name="ce42" table:formula="of:=[.CD7]" office:value-type="float" office:value="1528.99" calcext:value-type="float">
            <text:p><text:s/>$1,528.99 </text:p>
          </table:table-cell>
          <table:table-cell table:style-name="ce42" table:formula="of:=[.CR7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250" calcext:value-type="float">
            <text:p><text:s/>$250.00 </text:p>
          </table:table-cell>
          <table:table-cell table:number-columns-repeated="3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7" table:formula="of:=SUM([.V7:.X7])" office:value-type="float" office:value="2012.6131884058" calcext:value-type="float">
            <text:p><text:s/>$2,012.61 </text:p>
          </table:table-cell>
          <table:table-cell table:style-name="ce47" table:formula="of:=[.AN7]+[.Y7]+[.Z7]+[.AA7]" office:value-type="float" office:value="2262.6131884058" calcext:value-type="float">
            <text:p><text:s/>$2,262.61 </text:p>
          </table:table-cell>
          <table:table-cell table:style-name="ce47" table:formula="of:=[.AN7]+[.AB7]+[.AC7]+[.AD7]" office:value-type="float" office:value="2012.6131884058" calcext:value-type="float">
            <text:p><text:s/>$2,012.61 </text:p>
          </table:table-cell>
          <table:table-cell table:style-name="ce47" table:formula="of:=[.AN7]+[.AE7]+[.AF7]+[.AG7]" office:value-type="float" office:value="2132.6131884058" calcext:value-type="float">
            <text:p><text:s/>$2,132.61 </text:p>
          </table:table-cell>
          <table:table-cell table:style-name="ce47" table:formula="of:=[.AN7]+[.AH7]+[.AI7]+[.AJ7]" office:value-type="float" office:value="2132.6131884058" calcext:value-type="float">
            <text:p><text:s/>$2,132.61 </text:p>
          </table:table-cell>
          <table:table-cell table:style-name="ce46" table:formula="of:=[.AK7]+[.AL7]+[.AM7]+[.BQ7]+[.CD7]+[.CR7]" office:value-type="float" office:value="2132.6131884058" calcext:value-type="float">
            <text:p><text:s/>$2,132.61 </text:p>
          </table:table-cell>
          <table:table-cell table:style-name="ce49" office:value-type="float" office:value="44" calcext:value-type="float">
            <text:p>44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Rotterdam (RTM)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69" calcext:value-type="float">
            <text:p><text:s/>USD869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68" calcext:value-type="float">
            <text:p><text:s/>USD868.00 </text:p>
          </table:table-cell>
          <table:table-cell table:style-name="ce66" office:value-type="float" office:value="94" calcext:value-type="float">
            <text:p><text:s/>USD94.00 </text:p>
          </table:table-cell>
          <table:table-cell table:style-name="ce66" office:value-type="float" office:value="47" calcext:value-type="float">
            <text:p><text:s/>USD47.00 </text:p>
          </table:table-cell>
          <table:table-cell table:style-name="ce74"/>
          <table:table-cell table:number-columns-repeated="2" table:style-name="ce74" office:value-type="currency" office:currency="CNY" office:value="1050" calcext:value-type="currency">
            <text:p><text:s/>CNY 1,050.00 </text:p>
          </table:table-cell>
          <table:table-cell table:style-name="ce74" office:value-type="currency" office:currency="CNY" office:value="345" calcext:value-type="currency">
            <text:p><text:s/>CNY 345.0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530" calcext:value-type="currency">
            <text:p><text:s/>CNY 530.00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7]+[.BB7]+[.BC7]+[.BF7]+[.BG7]+[.BH7]+[.BL7])" office:value-type="currency" office:currency="CNY" office:value="3337" calcext:value-type="currency">
            <text:p><text:s/>CNY 3,337.0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7]*[.BP7])" office:value-type="currency" office:currency="USD" office:value="483.623188405797" calcext:value-type="currency">
            <text:p><text:s/>USD 483.62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500" calcext:value-type="currency">
            <text:p><text:s/>USD 1,500.00 </text:p>
          </table:table-cell>
          <table:table-cell table:style-name="ce105" office:value-type="currency" office:currency="USD" office:value="28.99" calcext:value-type="currency">
            <text:p><text:s/>USD 28.99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7:.CA7])" office:value-type="currency" office:currency="USD" office:value="1528.99" calcext:value-type="currency">
            <text:p><text:s/>USD 1,528.9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7]*[.CC7])" office:value-type="currency" office:currency="USD" office:value="1528.99" calcext:value-type="currency">
            <text:p><text:s/>USD 1,528.99 </text:p>
          </table:table-cell>
          <table:table-cell table:style-name="ce121" office:value-type="string" calcext:value-type="string">
            <text:p>EUR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42" office:value-type="float" office:value="1.0752688172043" calcext:value-type="float">
            <text:p>1.075</text:p>
          </table:table-cell>
          <table:table-cell table:style-name="ce145" table:formula="of:=[.CN7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Rodovia Vinhedo-Vira Copos, KM77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EMEA</text:p>
          </table:table-cell>
          <table:table-cell table:style-name="ce15" office:value-type="string" calcext:value-type="string">
            <text:p>Planck-Str 4</text:p>
          </table:table-cell>
          <table:table-cell table:style-name="ce15" office:value-type="string" calcext:value-type="string">
            <text:p>Germany</text:p>
          </table:table-cell>
          <table:table-cell table:style-name="ce15" office:value-type="string" calcext:value-type="string">
            <text:p>Radevormwald</text:p>
          </table:table-cell>
          <table:table-cell table:style-name="ce19" office:value-type="string" calcext:value-type="string">
            <text:p>DE044L</text:p>
          </table:table-cell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Rotterdam (RTM)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7" calcext:value-type="float">
            <text:p>37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EU1</text:p>
          </table:table-cell>
          <table:table-cell table:style-name="ce42" table:formula="of:=[.BQ8]" office:value-type="float" office:value="381.521739130435" calcext:value-type="float">
            <text:p><text:s/>$381.52 </text:p>
          </table:table-cell>
          <table:table-cell table:style-name="ce42" table:formula="of:=[.CD8]" office:value-type="float" office:value="828.99" calcext:value-type="float">
            <text:p><text:s/>$828.99 </text:p>
          </table:table-cell>
          <table:table-cell table:style-name="ce42" table:formula="of:=[.CR8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25" calcext:value-type="float">
            <text:p><text:s/>$125.00 </text:p>
          </table:table-cell>
          <table:table-cell table:number-columns-repeated="3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7" table:formula="of:=SUM([.V8:.X8])" office:value-type="float" office:value="1210.51173913043" calcext:value-type="float">
            <text:p><text:s/>$1,210.51 </text:p>
          </table:table-cell>
          <table:table-cell table:style-name="ce47" table:formula="of:=[.AN8]+[.Y8]+[.Z8]+[.AA8]" office:value-type="float" office:value="1335.51173913043" calcext:value-type="float">
            <text:p><text:s/>$1,335.51 </text:p>
          </table:table-cell>
          <table:table-cell table:style-name="ce47" table:formula="of:=[.AN8]+[.AB8]+[.AC8]+[.AD8]" office:value-type="float" office:value="1210.51173913043" calcext:value-type="float">
            <text:p><text:s/>$1,210.51 </text:p>
          </table:table-cell>
          <table:table-cell table:style-name="ce47" table:formula="of:=[.AN8]+[.AE8]+[.AF8]+[.AG8]" office:value-type="float" office:value="1270.51173913043" calcext:value-type="float">
            <text:p><text:s/>$1,270.51 </text:p>
          </table:table-cell>
          <table:table-cell table:style-name="ce47" table:formula="of:=[.AN8]+[.AH8]+[.AI8]+[.AJ8]" office:value-type="float" office:value="1270.51173913043" calcext:value-type="float">
            <text:p><text:s/>$1,270.51 </text:p>
          </table:table-cell>
          <table:table-cell table:style-name="ce46" table:formula="of:=[.AK8]+[.AL8]+[.AM8]+[.BQ8]+[.CD8]+[.CR8]" office:value-type="float" office:value="1270.51173913043" calcext:value-type="float">
            <text:p><text:s/>$1,270.51 </text:p>
          </table:table-cell>
          <table:table-cell table:style-name="ce49" office:value-type="float" office:value="44" calcext:value-type="float">
            <text:p>44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Rotterdam (RTM)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0" calcext:value-type="float">
            <text:p><text:s/>USD87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69" calcext:value-type="float">
            <text:p><text:s/>USD869.00 </text:p>
          </table:table-cell>
          <table:table-cell table:style-name="ce66" office:value-type="float" office:value="95" calcext:value-type="float">
            <text:p><text:s/>USD95.00 </text:p>
          </table:table-cell>
          <table:table-cell table:style-name="ce66" office:value-type="float" office:value="48" calcext:value-type="float">
            <text:p><text:s/>USD48.00 </text:p>
          </table:table-cell>
          <table:table-cell table:style-name="ce74"/>
          <table:table-cell table:number-columns-repeated="2" table:style-name="ce74" office:value-type="currency" office:currency="CNY" office:value="675" calcext:value-type="currency">
            <text:p><text:s/>CNY 675.00 </text:p>
          </table:table-cell>
          <table:table-cell table:style-name="ce74" office:value-type="currency" office:currency="CNY" office:value="172.5" calcext:value-type="currency">
            <text:p><text:s/>CNY 172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370" calcext:value-type="currency">
            <text:p><text:s/>CNY 370.00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8]+[.BB8]+[.BC8]+[.BF8]+[.BG8]+[.BH8]+[.BL8])" office:value-type="currency" office:currency="CNY" office:value="2632.5" calcext:value-type="currency">
            <text:p><text:s/>CNY 2,632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8]*[.BP8])" office:value-type="currency" office:currency="USD" office:value="381.521739130435" calcext:value-type="currency">
            <text:p><text:s/>USD 381.52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800" calcext:value-type="currency">
            <text:p><text:s/>USD 800.00 </text:p>
          </table:table-cell>
          <table:table-cell table:style-name="ce105" office:value-type="currency" office:currency="USD" office:value="28.99" calcext:value-type="currency">
            <text:p><text:s/>USD 28.99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8:.CA8])" office:value-type="currency" office:currency="USD" office:value="828.99" calcext:value-type="currency">
            <text:p><text:s/>USD 828.9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8]*[.CC8])" office:value-type="currency" office:currency="USD" office:value="828.99" calcext:value-type="currency">
            <text:p><text:s/>USD 828.99 </text:p>
          </table:table-cell>
          <table:table-cell table:style-name="ce121" office:value-type="string" calcext:value-type="string">
            <text:p>EUR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4" office:value-type="float" office:value="1084" calcext:value-type="float">
            <text:p>1,084.00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6" office:value-type="currency" office:currency="EUR" office:value="0" calcext:value-type="currency">
            <text:p><text:s/>EUR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6" office:value-type="currency" office:currency="EUR" office:value="0" calcext:value-type="currency">
            <text:p><text:s/>EUR -   </text:p>
          </table:table-cell>
          <table:table-cell table:style-name="ce142" office:value-type="float" office:value="1.0752688172043" calcext:value-type="float">
            <text:p>1.075</text:p>
          </table:table-cell>
          <table:table-cell table:style-name="ce145" table:formula="of:=[.CN8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L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1</text:p>
          </table:table-cell>
          <table:table-cell table:style-name="ce7" office:value-type="string" calcext:value-type="string">
            <text:p>Brazil</text:p>
          </table:table-cell>
          <table:table-cell table:style-name="ce6" office:value-type="string" calcext:value-type="string">
            <text:p>Vinhedo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Port Of Veracruz</text:p>
          </table:table-cell>
          <table:table-cell table:style-name="ce15" office:value-type="string" calcext:value-type="string">
            <text:p>Mexico</text:p>
          </table:table-cell>
          <table:table-cell table:style-name="ce15" office:value-type="string" calcext:value-type="string">
            <text:p>Tlalnepantla</text:p>
          </table:table-cell>
          <table:table-cell table:style-name="ce19"/>
          <table:table-cell table:style-name="ce22" office:value-type="string" calcext:value-type="string">
            <text:p>Santos</text:p>
          </table:table-cell>
          <table:table-cell table:style-name="ce22" office:value-type="string" calcext:value-type="string">
            <text:p>Veracruz</text:p>
          </table:table-cell>
          <table:table-cell table:style-name="ce27" office:value-type="string" calcext:value-type="string">
            <text:p>Door to Port</text:p>
          </table:table-cell>
          <table:table-cell table:style-name="ce30" office:value-type="string" calcext:value-type="string">
            <text:p>FCA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24" calcext:value-type="float">
            <text:p>2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30" office:value-type="string" calcext:value-type="string">
            <text:p>LAM 7</text:p>
          </table:table-cell>
          <table:table-cell table:style-name="ce42" table:formula="of:=[.BQ9]" office:value-type="float" office:value="719.070512820514" calcext:value-type="float">
            <text:p><text:s/>$719.07 </text:p>
          </table:table-cell>
          <table:table-cell table:style-name="ce42" table:formula="of:=[.CD9]" office:value-type="float" office:value="1348.73" calcext:value-type="float">
            <text:p><text:s/>$1,348.73 </text:p>
          </table:table-cell>
          <table:table-cell table:style-name="ce42" table:formula="of:=[.CR9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450" calcext:value-type="float">
            <text:p><text:s/>$4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50" calcext:value-type="float">
            <text:p><text:s/>$35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1" office:value-type="float" office:value="0" calcext:value-type="float">
            <text:p><text:s/>$-   </text:p>
          </table:table-cell>
          <table:table-cell table:style-name="ce41" office:value-type="float" office:value="300" calcext:value-type="float">
            <text:p><text:s/>$30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300" calcext:value-type="float">
            <text:p><text:s/>$300.00 </text:p>
          </table:table-cell>
          <table:table-cell table:style-name="ce42" table:formula="of:=[.AH9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office:value-type="float" office:value="200" calcext:value-type="float">
            <text:p><text:s/>$200.00 </text:p>
          </table:table-cell>
          <table:table-cell table:style-name="ce47" table:formula="of:=SUM([.V9:.X9])" office:value-type="float" office:value="2067.80051282051" calcext:value-type="float">
            <text:p><text:s/>$2,067.80 </text:p>
          </table:table-cell>
          <table:table-cell table:style-name="ce47" table:formula="of:=[.AN9]+[.Y9]+[.Z9]+[.AA9]" office:value-type="float" office:value="2517.80051282051" calcext:value-type="float">
            <text:p><text:s/>$2,517.80 </text:p>
          </table:table-cell>
          <table:table-cell table:style-name="ce47" table:formula="of:=[.AN9]+[.AB9]+[.AC9]+[.AD9]" office:value-type="float" office:value="2417.80051282051" calcext:value-type="float">
            <text:p><text:s/>$2,417.80 </text:p>
          </table:table-cell>
          <table:table-cell table:style-name="ce47" table:formula="of:=[.AN9]+[.AE9]+[.AF9]+[.AG9]" office:value-type="float" office:value="2477.80051282051" calcext:value-type="float">
            <text:p><text:s/>$2,477.80 </text:p>
          </table:table-cell>
          <table:table-cell table:style-name="ce47" table:formula="of:=[.AN9]+[.AH9]+[.AI9]+[.AJ9]" office:value-type="float" office:value="2477.80051282051" calcext:value-type="float">
            <text:p><text:s/>$2,477.80 </text:p>
          </table:table-cell>
          <table:table-cell table:style-name="ce46" table:formula="of:=[.AK9]+[.AL9]+[.AM9]+[.BQ9]+[.CD9]+[.CR9]" office:value-type="float" office:value="2377.80051282051" calcext:value-type="float">
            <text:p><text:s/>$2,377.80 </text:p>
          </table:table-cell>
          <table:table-cell table:style-name="ce49" office:value-type="float" office:value="24" calcext:value-type="float">
            <text:p>24</text:p>
          </table:table-cell>
          <table:table-cell table:style-name="ce55" office:value-type="string" calcext:value-type="string">
            <text:p>Santos</text:p>
          </table:table-cell>
          <table:table-cell table:style-name="ce58" office:value-type="string" calcext:value-type="string">
            <text:p>Veracruz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1" calcext:value-type="float">
            <text:p><text:s/>USD871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0" calcext:value-type="float">
            <text:p><text:s/>USD870.00 </text:p>
          </table:table-cell>
          <table:table-cell table:style-name="ce66" office:value-type="float" office:value="96" calcext:value-type="float">
            <text:p><text:s/>USD96.00 </text:p>
          </table:table-cell>
          <table:table-cell table:style-name="ce66" office:value-type="float" office:value="49" calcext:value-type="float">
            <text:p><text:s/>USD49.00 </text:p>
          </table:table-cell>
          <table:table-cell table:style-name="ce75"/>
          <table:table-cell table:number-columns-repeated="2" table:style-name="ce81" office:value-type="currency" office:currency="BRL" office:value="800" calcext:value-type="currency">
            <text:p><text:s/>BRL 800.00 </text:p>
          </table:table-cell>
          <table:table-cell table:style-name="ce74" office:value-type="currency" office:currency="CNY" office:value="173.5" calcext:value-type="currency">
            <text:p><text:s/>CNY 173.50 </text:p>
          </table:table-cell>
          <table:table-cell table:style-name="ce81" office:value-type="currency" office:currency="BRL" office:value="402" calcext:value-type="currency">
            <text:p><text:s/>BRL 402.00 </text:p>
          </table:table-cell>
          <table:table-cell table:style-name="ce81" office:value-type="currency" office:currency="BRL" office:value="0" calcext:value-type="currency">
            <text:p><text:s/>BRL -   </text:p>
          </table:table-cell>
          <table:table-cell table:style-name="ce86" office:value-type="string" calcext:value-type="string">
            <text:p>0</text:p>
          </table:table-cell>
          <table:table-cell table:number-columns-repeated="2" table:style-name="ce81" office:value-type="currency" office:currency="BRL" office:value="0" calcext:value-type="currency">
            <text:p><text:s/>BRL -   </text:p>
          </table:table-cell>
          <table:table-cell table:style-name="ce86" office:value-type="float" office:value="0" calcext:value-type="float">
            <text:p>0</text:p>
          </table:table-cell>
          <table:table-cell table:style-name="ce81" office:value-type="currency" office:currency="BRL" office:value="0" calcext:value-type="currency">
            <text:p><text:s/>BRL -   </text:p>
          </table:table-cell>
          <table:table-cell table:style-name="ce91" table:formula="of:=SUM([.AZ9]+[.BB9]+[.BC9]+[.BF9]+[.BG9]+[.BH9]+[.BL9])" office:value-type="currency" office:currency="CNY" office:value="2243.5" calcext:value-type="currency">
            <text:p><text:s/>CNY 2,243.50 </text:p>
          </table:table-cell>
          <table:table-cell table:style-name="ce94" office:value-type="float" office:value="0.320512820512821" calcext:value-type="float">
            <text:p>0.321</text:p>
          </table:table-cell>
          <table:table-cell table:style-name="ce96" table:formula="of:=SUM([.BO9]*[.BP9])" office:value-type="currency" office:currency="USD" office:value="719.070512820514" calcext:value-type="currency">
            <text:p><text:s/>USD 719.07 </text:p>
          </table:table-cell>
          <table:table-cell table:style-name="ce101" office:value-type="string" calcext:value-type="string">
            <text:p>USD</text:p>
          </table:table-cell>
          <table:table-cell table:number-columns-repeated="2" table:style-name="ce106" office:value-type="currency" office:currency="USD" office:value="1150" calcext:value-type="currency">
            <text:p><text:s/>USD 1,150.00 </text:p>
          </table:table-cell>
          <table:table-cell table:style-name="ce106" office:value-type="currency" office:currency="USD" office:value="30.13" calcext:value-type="currency">
            <text:p><text:s/>USD 30.13 </text:p>
          </table:table-cell>
          <table:table-cell table:style-name="ce106" office:value-type="currency" office:currency="USD" office:value="26.6" calcext:value-type="currency">
            <text:p><text:s/>USD 26.60 </text:p>
          </table:table-cell>
          <table:table-cell table:style-name="ce110" office:value-type="string" calcext:value-type="string">
            <text:p>CFS, CAAT</text:p>
          </table:table-cell>
          <table:table-cell table:number-columns-repeated="2" table:style-name="ce106" office:value-type="currency" office:currency="USD" office:value="71" calcext:value-type="currency">
            <text:p><text:s/>USD 71.00 </text:p>
          </table:table-cell>
          <table:table-cell table:style-name="ce110" office:value-type="float" office:value="0" calcext:value-type="float">
            <text:p>0</text:p>
          </table:table-cell>
          <table:table-cell table:style-name="ce106" office:value-type="currency" office:currency="USD" office:value="0" calcext:value-type="currency">
            <text:p><text:s/>USD -   </text:p>
          </table:table-cell>
          <table:table-cell table:style-name="ce114" table:formula="of:=SUM([.BT9:.CA9])" office:value-type="currency" office:currency="USD" office:value="1348.73" calcext:value-type="currency">
            <text:p><text:s/>USD 1,348.73 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formula="of:=SUM([.CB9]*[.CC9])" office:value-type="currency" office:currency="USD" office:value="1348.73" calcext:value-type="currency">
            <text:p><text:s/>USD 1,348.73 </text:p>
          </table:table-cell>
          <table:table-cell table:style-name="ce122" office:value-type="string" calcext:value-type="string">
            <text:p>MXN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42" office:value-type="float" office:value="0.0522466039707419" calcext:value-type="float">
            <text:p>0.052</text:p>
          </table:table-cell>
          <table:table-cell table:style-name="ce145" table:formula="of:=[.CN9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Port Of Lazaro Cardenas</text:p>
          </table:table-cell>
          <table:table-cell table:style-name="ce15" office:value-type="string" calcext:value-type="string">
            <text:p>Mexico</text:p>
          </table:table-cell>
          <table:table-cell table:style-name="ce15" office:value-type="string" calcext:value-type="string">
            <text:p>Lazaro Cardenas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Lazaro Cardenas</text:p>
          </table:table-cell>
          <table:table-cell table:style-name="ce27" office:value-type="string" calcext:value-type="string">
            <text:p>Door to Port</text:p>
          </table:table-cell>
          <table:table-cell table:style-name="ce30" office:value-type="string" calcext:value-type="string">
            <text:p>CFR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30" office:value-type="string" calcext:value-type="string">
            <text:p>LAM 7</text:p>
          </table:table-cell>
          <table:table-cell table:style-name="ce42" table:formula="of:=[.BQ10]" office:value-type="float" office:value="460.217391304348" calcext:value-type="float">
            <text:p><text:s/>$460.22 </text:p>
          </table:table-cell>
          <table:table-cell table:style-name="ce42" table:formula="of:=[.CD10]" office:value-type="float" office:value="2748.99" calcext:value-type="float">
            <text:p><text:s/>$2,748.99 </text:p>
          </table:table-cell>
          <table:table-cell table:style-name="ce42" table:formula="of:=[.CR10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200" calcext:value-type="float">
            <text:p><text:s/>$(200.00)</text:p>
          </table:table-cell>
          <table:table-cell table:style-name="ce41" table:formula="of:=[.AH10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0]" office:value-type="float" office:value="-200" calcext:value-type="float">
            <text:p><text:s/>$(200.00)</text:p>
          </table:table-cell>
          <table:table-cell table:style-name="ce47" table:formula="of:=SUM([.V10:.X10])" office:value-type="float" office:value="3209.20739130435" calcext:value-type="float">
            <text:p><text:s/>$3,209.21 </text:p>
          </table:table-cell>
          <table:table-cell table:style-name="ce47" table:formula="of:=[.AN10]+[.Y10]+[.Z10]+[.AA10]" office:value-type="float" office:value="3509.20739130435" calcext:value-type="float">
            <text:p><text:s/>$3,509.21 </text:p>
          </table:table-cell>
          <table:table-cell table:style-name="ce47" table:formula="of:=[.AN10]+[.AB10]+[.AC10]+[.AD10]" office:value-type="float" office:value="3209.20739130435" calcext:value-type="float">
            <text:p><text:s/>$3,209.21 </text:p>
          </table:table-cell>
          <table:table-cell table:style-name="ce47" table:formula="of:=[.AN10]+[.AE10]+[.AF10]+[.AG10]" office:value-type="float" office:value="3319.20739130435" calcext:value-type="float">
            <text:p><text:s/>$3,319.21 </text:p>
          </table:table-cell>
          <table:table-cell table:style-name="ce47" table:formula="of:=[.AN10]+[.AH10]+[.AI10]+[.AJ10]" office:value-type="float" office:value="3119.20739130435" calcext:value-type="float">
            <text:p><text:s/>$3,119.21 </text:p>
          </table:table-cell>
          <table:table-cell table:style-name="ce46" table:formula="of:=[.AK10]+[.AL10]+[.AM10]+[.BQ10]+[.CD10]+[.CR10]" office:value-type="float" office:value="3119.20739130435" calcext:value-type="float">
            <text:p><text:s/>$3,119.21 </text:p>
          </table:table-cell>
          <table:table-cell table:style-name="ce49" office:value-type="float" office:value="31" calcext:value-type="float">
            <text:p>31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Lazaro Cardena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2" calcext:value-type="float">
            <text:p><text:s/>USD872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1" calcext:value-type="float">
            <text:p><text:s/>USD871.00 </text:p>
          </table:table-cell>
          <table:table-cell table:style-name="ce66" office:value-type="float" office:value="97" calcext:value-type="float">
            <text:p><text:s/>USD97.00 </text:p>
          </table:table-cell>
          <table:table-cell table:style-name="ce66" office:value-type="float" office:value="50" calcext:value-type="float">
            <text:p><text:s/>USD50.00 </text:p>
          </table:table-cell>
          <table:table-cell table:style-name="ce74"/>
          <table:table-cell table:number-columns-repeated="2" table:style-name="ce74" office:value-type="currency" office:currency="CNY" office:value="1050" calcext:value-type="currency">
            <text:p><text:s/>CNY 1,050.00 </text:p>
          </table:table-cell>
          <table:table-cell table:style-name="ce74" office:value-type="currency" office:currency="CNY" office:value="174.5" calcext:value-type="currency">
            <text:p><text:s/>CNY 174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530" calcext:value-type="currency">
            <text:p><text:s/>CNY 530.00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10]+[.BB10]+[.BC10]+[.BF10]+[.BG10]+[.BH10]+[.BL10])" office:value-type="currency" office:currency="CNY" office:value="3175.5" calcext:value-type="currency">
            <text:p><text:s/>CNY 3,175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0]*[.BP10])" office:value-type="currency" office:currency="USD" office:value="460.217391304348" calcext:value-type="currency">
            <text:p><text:s/>USD 460.22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600" office:value-type="currency" office:currency="USD" office:value="2600" calcext:value-type="currency">
            <text:p><text:s/>USD 2,600.00 </text:p>
          </table:table-cell>
          <table:table-cell table:style-name="ce105" table:formula="of:=2600" office:value-type="currency" office:currency="USD" office:value="2600" calcext:value-type="currency">
            <text:p><text:s/>USD 2,600.00 </text:p>
          </table:table-cell>
          <table:table-cell table:style-name="ce105" office:value-type="currency" office:currency="USD" office:value="28.99" calcext:value-type="currency">
            <text:p><text:s/>USD 28.99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9" office:value-type="string" calcext:value-type="string">
            <text:p>CAAT</text:p>
          </table:table-cell>
          <table:table-cell table:number-columns-repeated="2" table:style-name="ce105" office:value-type="currency" office:currency="USD" office:value="60" calcext:value-type="currency">
            <text:p><text:s/>USD 60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0:.CA10])" office:value-type="currency" office:currency="USD" office:value="2748.99" calcext:value-type="currency">
            <text:p><text:s/>USD 2,748.9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0]*[.CC10])" office:value-type="currency" office:currency="USD" office:value="2748.99" calcext:value-type="currency">
            <text:p><text:s/>USD 2,748.99 </text:p>
          </table:table-cell>
          <table:table-cell table:style-name="ce121" office:value-type="string" calcext:value-type="string">
            <text:p>MXN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42" office:value-type="float" office:value="0.0522466039707419" calcext:value-type="float">
            <text:p>0.052</text:p>
          </table:table-cell>
          <table:table-cell table:style-name="ce145" table:formula="of:=[.CN10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Port Of Manzanillo</text:p>
          </table:table-cell>
          <table:table-cell table:style-name="ce15" office:value-type="string" calcext:value-type="string">
            <text:p>Mexico</text:p>
          </table:table-cell>
          <table:table-cell table:style-name="ce15" office:value-type="string" calcext:value-type="string">
            <text:p>Manzanill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Manzanillo</text:p>
          </table:table-cell>
          <table:table-cell table:style-name="ce27" office:value-type="string" calcext:value-type="string">
            <text:p>Door to Port</text:p>
          </table:table-cell>
          <table:table-cell table:style-name="ce30" office:value-type="string" calcext:value-type="string">
            <text:p>CFR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24" calcext:value-type="float">
            <text:p>2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30" office:value-type="string" calcext:value-type="string">
            <text:p>LAM 7</text:p>
          </table:table-cell>
          <table:table-cell table:style-name="ce42" table:formula="of:=[.BQ11]" office:value-type="float" office:value="460.797101449275" calcext:value-type="float">
            <text:p><text:s/>$460.80 </text:p>
          </table:table-cell>
          <table:table-cell table:style-name="ce42" table:formula="of:=[.CD11]" office:value-type="float" office:value="2748.99" calcext:value-type="float">
            <text:p><text:s/>$2,748.99 </text:p>
          </table:table-cell>
          <table:table-cell table:style-name="ce42" table:formula="of:=[.CR11]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200" calcext:value-type="float">
            <text:p><text:s/>$(200.00)</text:p>
          </table:table-cell>
          <table:table-cell table:style-name="ce41" table:formula="of:=[.AH11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1]" office:value-type="float" office:value="-200" calcext:value-type="float">
            <text:p><text:s/>$(200.00)</text:p>
          </table:table-cell>
          <table:table-cell table:style-name="ce47" table:formula="of:=SUM([.V11:.X11])" office:value-type="float" office:value="3209.78710144927" calcext:value-type="float">
            <text:p><text:s/>$3,209.79 </text:p>
          </table:table-cell>
          <table:table-cell table:style-name="ce47" table:formula="of:=[.AN11]+[.Y11]+[.Z11]+[.AA11]" office:value-type="float" office:value="3509.78710144927" calcext:value-type="float">
            <text:p><text:s/>$3,509.79 </text:p>
          </table:table-cell>
          <table:table-cell table:style-name="ce47" table:formula="of:=[.AN11]+[.AB11]+[.AC11]+[.AD11]" office:value-type="float" office:value="3209.78710144927" calcext:value-type="float">
            <text:p><text:s/>$3,209.79 </text:p>
          </table:table-cell>
          <table:table-cell table:style-name="ce47" table:formula="of:=[.AN11]+[.AE11]+[.AF11]+[.AG11]" office:value-type="float" office:value="3319.78710144927" calcext:value-type="float">
            <text:p><text:s/>$3,319.79 </text:p>
          </table:table-cell>
          <table:table-cell table:style-name="ce47" table:formula="of:=[.AN11]+[.AH11]+[.AI11]+[.AJ11]" office:value-type="float" office:value="3119.78710144927" calcext:value-type="float">
            <text:p><text:s/>$3,119.79 </text:p>
          </table:table-cell>
          <table:table-cell table:style-name="ce46" table:formula="of:=[.AK11]+[.AL11]+[.AM11]+[.BQ11]+[.CD11]+[.CR11]" office:value-type="float" office:value="3119.78710144927" calcext:value-type="float">
            <text:p><text:s/>$3,119.79 </text:p>
          </table:table-cell>
          <table:table-cell table:style-name="ce49" office:value-type="float" office:value="28" calcext:value-type="float">
            <text:p>28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Manzanillo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3" calcext:value-type="float">
            <text:p><text:s/>USD873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2" calcext:value-type="float">
            <text:p><text:s/>USD872.00 </text:p>
          </table:table-cell>
          <table:table-cell table:style-name="ce66" office:value-type="float" office:value="98" calcext:value-type="float">
            <text:p><text:s/>USD98.00 </text:p>
          </table:table-cell>
          <table:table-cell table:style-name="ce66" office:value-type="float" office:value="51" calcext:value-type="float">
            <text:p><text:s/>USD51.00 </text:p>
          </table:table-cell>
          <table:table-cell table:style-name="ce74"/>
          <table:table-cell table:number-columns-repeated="2" table:style-name="ce74" office:value-type="currency" office:currency="CNY" office:value="1050" calcext:value-type="currency">
            <text:p><text:s/>CNY 1,050.00 </text:p>
          </table:table-cell>
          <table:table-cell table:style-name="ce74" office:value-type="currency" office:currency="CNY" office:value="175.5" calcext:value-type="currency">
            <text:p><text:s/>CNY 175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530" calcext:value-type="currency">
            <text:p><text:s/>CNY 530.00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11]+[.BB11]+[.BC11]+[.BF11]+[.BG11]+[.BH11]+[.BL11])" office:value-type="currency" office:currency="CNY" office:value="3179.5" calcext:value-type="currency">
            <text:p><text:s/>CNY 3,179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1]*[.BP11])" office:value-type="currency" office:currency="USD" office:value="460.797101449275" calcext:value-type="currency">
            <text:p><text:s/>USD 460.80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600" office:value-type="currency" office:currency="USD" office:value="2600" calcext:value-type="currency">
            <text:p><text:s/>USD 2,600.00 </text:p>
          </table:table-cell>
          <table:table-cell table:style-name="ce105" table:formula="of:=2600" office:value-type="currency" office:currency="USD" office:value="2600" calcext:value-type="currency">
            <text:p><text:s/>USD 2,600.00 </text:p>
          </table:table-cell>
          <table:table-cell table:style-name="ce105" office:value-type="currency" office:currency="USD" office:value="28.99" calcext:value-type="currency">
            <text:p><text:s/>USD 28.99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9" office:value-type="string" calcext:value-type="string">
            <text:p>CAAT</text:p>
          </table:table-cell>
          <table:table-cell table:number-columns-repeated="2" table:style-name="ce105" office:value-type="currency" office:currency="USD" office:value="60" calcext:value-type="currency">
            <text:p><text:s/>USD 60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1:.CA11])" office:value-type="currency" office:currency="USD" office:value="2748.99" calcext:value-type="currency">
            <text:p><text:s/>USD 2,748.9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1]*[.CC11])" office:value-type="currency" office:currency="USD" office:value="2748.99" calcext:value-type="currency">
            <text:p><text:s/>USD 2,748.99 </text:p>
          </table:table-cell>
          <table:table-cell table:style-name="ce121" office:value-type="string" calcext:value-type="string">
            <text:p>MXN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7" office:value-type="currency" office:currency="MXN" office:value="0" calcext:value-type="currency">
            <text:p><text:s/>MXN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number-columns-repeated="2" table:style-name="ce127" office:value-type="currency" office:currency="MXN" office:value="0" calcext:value-type="currency">
            <text:p><text:s/>MXN -   </text:p>
          </table:table-cell>
          <table:table-cell table:style-name="ce142" office:value-type="float" office:value="0.0522466039707419" calcext:value-type="float">
            <text:p>0.052</text:p>
          </table:table-cell>
          <table:table-cell table:style-name="ce145" table:formula="of:=[.CN11]" office:value-type="currency" office:currency="USD" office:value="0" calcext:value-type="currency">
            <text:p><text:s/>USD -  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Tieblokkenlaan 1</text:p>
          </table:table-cell>
          <table:table-cell table:style-name="ce7" office:value-type="string" calcext:value-type="string">
            <text:p>Belgium</text:p>
          </table:table-cell>
          <table:table-cell table:style-name="ce6" office:value-type="string" calcext:value-type="string">
            <text:p>Turnhout</text:p>
          </table:table-cell>
          <table:table-cell table:style-name="ce6" office:value-type="string" calcext:value-type="string">
            <text:p>BE002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7100 Lindsay Drive Building 14</text:p>
          </table:table-cell>
          <table:table-cell table:style-name="ce15" office:value-type="string" calcext:value-type="string">
            <text:p>United States</text:p>
          </table:table-cell>
          <table:table-cell table:style-name="ce15" office:value-type="string" calcext:value-type="string">
            <text:p>Mentor, OH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Cleveland</text:p>
          </table:table-cell>
          <table:table-cell table:style-name="ce26" office:value-type="string" calcext:value-type="string">
            <text:p>Door to Door</text:p>
          </table:table-cell>
          <table:table-cell table:style-name="ce29" office:value-type="string" calcext:value-type="string">
            <text:p>EXW</text:p>
          </table:table-cell>
          <table:table-cell table:style-name="ce32"/>
          <table:table-cell table:style-name="ce36" office:value-type="float" office:value="52" calcext:value-type="float">
            <text:p>5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NAM 1</text:p>
          </table:table-cell>
          <table:table-cell table:style-name="ce42" table:formula="of:=[.BQ12]" office:value-type="float" office:value="1406.98924731183" calcext:value-type="float">
            <text:p><text:s/>$1,406.99 </text:p>
          </table:table-cell>
          <table:table-cell table:style-name="ce42" table:formula="of:=[.CD12]" office:value-type="float" office:value="814.76" calcext:value-type="float">
            <text:p><text:s/>$814.76 </text:p>
          </table:table-cell>
          <table:table-cell table:style-name="ce42" table:formula="of:=[.CR12]" office:value-type="float" office:value="465" calcext:value-type="float">
            <text:p><text:s/>$46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12:.X12])" office:value-type="float" office:value="2686.74924731183" calcext:value-type="float">
            <text:p><text:s/>$2,686.75 </text:p>
          </table:table-cell>
          <table:table-cell table:style-name="ce47" table:formula="of:=[.AN12]+[.Y12]+[.Z12]+[.AA12]" office:value-type="float" office:value="2686.74924731183" calcext:value-type="float">
            <text:p><text:s/>$2,686.75 </text:p>
          </table:table-cell>
          <table:table-cell table:style-name="ce47" table:formula="of:=[.AN12]+[.AB12]+[.AC12]+[.AD12]" office:value-type="float" office:value="2686.74924731183" calcext:value-type="float">
            <text:p><text:s/>$2,686.75 </text:p>
          </table:table-cell>
          <table:table-cell table:style-name="ce47" table:formula="of:=[.AN12]+[.AE12]+[.AF12]+[.AG12]" office:value-type="float" office:value="2746.74924731183" calcext:value-type="float">
            <text:p><text:s/>$2,746.75 </text:p>
          </table:table-cell>
          <table:table-cell table:style-name="ce47" table:formula="of:=[.AN12]+[.AH12]+[.AI12]+[.AJ12]" office:value-type="float" office:value="2746.74924731183" calcext:value-type="float">
            <text:p><text:s/>$2,746.75 </text:p>
          </table:table-cell>
          <table:table-cell table:style-name="ce46" table:formula="of:=[.AK12]+[.AL12]+[.AM12]+[.BQ12]+[.CD12]+[.CR12]" office:value-type="float" office:value="2746.74924731183" calcext:value-type="float">
            <text:p><text:s/>$2,746.75 </text:p>
          </table:table-cell>
          <table:table-cell table:style-name="ce49" office:value-type="float" office:value="22" calcext:value-type="float">
            <text:p>22</text:p>
          </table:table-cell>
          <table:table-cell table:style-name="ce54" office:value-type="string" calcext:value-type="string">
            <text:p>Antwerp</text:p>
          </table:table-cell>
          <table:table-cell table:style-name="ce57" office:value-type="string" calcext:value-type="string">
            <text:p>Cleveland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4" calcext:value-type="float">
            <text:p><text:s/>USD874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3" calcext:value-type="float">
            <text:p><text:s/>USD873.00 </text:p>
          </table:table-cell>
          <table:table-cell table:style-name="ce66" office:value-type="float" office:value="99" calcext:value-type="float">
            <text:p><text:s/>USD99.00 </text:p>
          </table:table-cell>
          <table:table-cell table:style-name="ce66" office:value-type="float" office:value="52" calcext:value-type="float">
            <text:p><text:s/>USD52.00 </text:p>
          </table:table-cell>
          <table:table-cell table:style-name="ce76"/>
          <table:table-cell table:number-columns-repeated="2" table:style-name="ce82" office:value-type="currency" office:currency="EUR" office:value="185" calcext:value-type="currency">
            <text:p><text:s/>EUR 185.00 </text:p>
          </table:table-cell>
          <table:table-cell table:style-name="ce74" office:value-type="currency" office:currency="CNY" office:value="176.5" calcext:value-type="currency">
            <text:p><text:s/>CNY 176.5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2" office:value-type="currency" office:currency="EUR" office:value="50" calcext:value-type="currency">
            <text:p><text:s/>EUR 50.00 </text:p>
          </table:table-cell>
          <table:table-cell table:style-name="ce85" office:value-type="string" calcext:value-type="string">
            <text:p>Left Bank Surcharge </text:p>
          </table:table-cell>
          <table:table-cell table:number-columns-repeated="2" table:style-name="ce82" office:value-type="currency" office:currency="EUR" office:value="45" calcext:value-type="currency">
            <text:p><text:s/>EUR 45.00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12]+[.BB12]+[.BC12]+[.BF12]+[.BG12]+[.BH12]+[.BL12])" office:value-type="currency" office:currency="CNY" office:value="1308.5" calcext:value-type="currency">
            <text:p><text:s/>CNY 1,308.5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12]*[.BP12])" office:value-type="currency" office:currency="USD" office:value="1406.98924731183" calcext:value-type="currency">
            <text:p><text:s/>USD 1,406.99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61" calcext:value-type="currency">
            <text:p><text:s/>USD 761.00 </text:p>
          </table:table-cell>
          <table:table-cell table:style-name="ce105" office:value-type="currency" office:currency="USD" office:value="37.63" calcext:value-type="currency">
            <text:p><text:s/>USD 37.63 </text:p>
          </table:table-cell>
          <table:table-cell table:style-name="ce105" office:value-type="currency" office:currency="USD" office:value="16.13" calcext:value-type="currency">
            <text:p><text:s/>USD 16.13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2:.CA12])" office:value-type="currency" office:currency="USD" office:value="814.76" calcext:value-type="currency">
            <text:p><text:s/>USD 814.76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2]*[.CC12])" office:value-type="currency" office:currency="USD" office:value="814.76" calcext:value-type="currency">
            <text:p><text:s/>USD 814.76 </text:p>
          </table:table-cell>
          <table:table-cell table:style-name="ce121" office:value-type="string" calcext:value-type="string">
            <text:p>USD</text:p>
          </table:table-cell>
          <table:table-cell table:style-name="ce128" office:value-type="currency" office:currency="USD" office:value="315" calcext:value-type="currency">
            <text:p><text:s/>USD 315.00 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4" office:value-type="float" office:value="80" calcext:value-type="float">
            <text:p>80.0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28" office:value-type="currency" office:currency="USD" office:value="45" calcext:value-type="currency">
            <text:p><text:s/>USD 45.00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8" office:value-type="string" calcext:value-type="string">
            <text:p>ISF Filing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28" office:value-type="currency" office:currency="USD" office:value="25" calcext:value-type="currency">
            <text:p><text:s/>USD 25.00 </text:p>
          </table:table-cell>
          <table:table-cell table:style-name="ce128" table:formula="of:=SUM([.CF12:.CO12])" office:value-type="currency" office:currency="USD" office:value="465" calcext:value-type="currency">
            <text:p><text:s/>USD 465.00 </text:p>
          </table:table-cell>
          <table:table-cell table:style-name="ce121" office:value-type="float" office:value="1" calcext:value-type="float">
            <text:p>1</text:p>
          </table:table-cell>
          <table:table-cell table:style-name="ce145" table:formula="of:=[.CP12]*[.CQ12]" office:value-type="currency" office:currency="USD" office:value="465" calcext:value-type="currency">
            <text:p><text:s/>USD 465.0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Tieblokkenlaan 1</text:p>
          </table:table-cell>
          <table:table-cell table:style-name="ce7" office:value-type="string" calcext:value-type="string">
            <text:p>Belgium</text:p>
          </table:table-cell>
          <table:table-cell table:style-name="ce6" office:value-type="string" calcext:value-type="string">
            <text:p>Turnhout</text:p>
          </table:table-cell>
          <table:table-cell table:style-name="ce6" office:value-type="string" calcext:value-type="string">
            <text:p>BE002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250 Chester Street</text:p>
          </table:table-cell>
          <table:table-cell table:style-name="ce15" office:value-type="string" calcext:value-type="string">
            <text:p>United States</text:p>
          </table:table-cell>
          <table:table-cell table:style-name="ce15" office:value-type="string" calcext:value-type="string">
            <text:p>Painesville, OH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Cleveland</text:p>
          </table:table-cell>
          <table:table-cell table:style-name="ce26" office:value-type="string" calcext:value-type="string">
            <text:p>Door to Door</text:p>
          </table:table-cell>
          <table:table-cell table:style-name="ce29" office:value-type="string" calcext:value-type="string">
            <text:p>EXW</text:p>
          </table:table-cell>
          <table:table-cell table:style-name="ce32"/>
          <table:table-cell table:style-name="ce36" office:value-type="float" office:value="14" calcext:value-type="float">
            <text:p>14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NAM 1</text:p>
          </table:table-cell>
          <table:table-cell table:style-name="ce42" table:formula="of:=[.BQ13]" office:value-type="float" office:value="1411.29032258064" calcext:value-type="float">
            <text:p><text:s/>$1,411.29 </text:p>
          </table:table-cell>
          <table:table-cell table:style-name="ce42" table:formula="of:=[.CD13]" office:value-type="float" office:value="875.76" calcext:value-type="float">
            <text:p><text:s/>$875.76 </text:p>
          </table:table-cell>
          <table:table-cell table:style-name="ce42" table:formula="of:=[.CR13]" office:value-type="float" office:value="425" calcext:value-type="float">
            <text:p><text:s/>$42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13:.X13])" office:value-type="float" office:value="2712.05032258064" calcext:value-type="float">
            <text:p><text:s/>$2,712.05 </text:p>
          </table:table-cell>
          <table:table-cell table:style-name="ce47" table:formula="of:=[.AN13]+[.Y13]+[.Z13]+[.AA13]" office:value-type="float" office:value="2712.05032258064" calcext:value-type="float">
            <text:p><text:s/>$2,712.05 </text:p>
          </table:table-cell>
          <table:table-cell table:style-name="ce47" table:formula="of:=[.AN13]+[.AB13]+[.AC13]+[.AD13]" office:value-type="float" office:value="2712.05032258064" calcext:value-type="float">
            <text:p><text:s/>$2,712.05 </text:p>
          </table:table-cell>
          <table:table-cell table:style-name="ce47" table:formula="of:=[.AN13]+[.AE13]+[.AF13]+[.AG13]" office:value-type="float" office:value="2772.05032258064" calcext:value-type="float">
            <text:p><text:s/>$2,772.05 </text:p>
          </table:table-cell>
          <table:table-cell table:style-name="ce47" table:formula="of:=[.AN13]+[.AH13]+[.AI13]+[.AJ13]" office:value-type="float" office:value="2772.05032258064" calcext:value-type="float">
            <text:p><text:s/>$2,772.05 </text:p>
          </table:table-cell>
          <table:table-cell table:style-name="ce46" table:formula="of:=[.AK13]+[.AL13]+[.AM13]+[.BQ13]+[.CD13]+[.CR13]" office:value-type="float" office:value="2772.05032258064" calcext:value-type="float">
            <text:p><text:s/>$2,772.05 </text:p>
          </table:table-cell>
          <table:table-cell table:style-name="ce49" office:value-type="float" office:value="22" calcext:value-type="float">
            <text:p>22</text:p>
          </table:table-cell>
          <table:table-cell table:style-name="ce54" office:value-type="string" calcext:value-type="string">
            <text:p>Antwerp</text:p>
          </table:table-cell>
          <table:table-cell table:style-name="ce57" office:value-type="string" calcext:value-type="string">
            <text:p>Cleveland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5" calcext:value-type="float">
            <text:p><text:s/>USD875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4" calcext:value-type="float">
            <text:p><text:s/>USD874.00 </text:p>
          </table:table-cell>
          <table:table-cell table:style-name="ce66" office:value-type="float" office:value="100" calcext:value-type="float">
            <text:p><text:s/>USD100.00 </text:p>
          </table:table-cell>
          <table:table-cell table:style-name="ce66" office:value-type="float" office:value="53" calcext:value-type="float">
            <text:p><text:s/>USD53.00 </text:p>
          </table:table-cell>
          <table:table-cell table:style-name="ce76"/>
          <table:table-cell table:number-columns-repeated="2" table:style-name="ce82" office:value-type="currency" office:currency="EUR" office:value="185" calcext:value-type="currency">
            <text:p><text:s/>EUR 185.00 </text:p>
          </table:table-cell>
          <table:table-cell table:style-name="ce74" office:value-type="currency" office:currency="CNY" office:value="177.5" calcext:value-type="currency">
            <text:p><text:s/>CNY 177.5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2" office:value-type="currency" office:currency="EUR" office:value="50" calcext:value-type="currency">
            <text:p><text:s/>EUR 50.00 </text:p>
          </table:table-cell>
          <table:table-cell table:style-name="ce85" office:value-type="string" calcext:value-type="string">
            <text:p>Left Bank Surcharge </text:p>
          </table:table-cell>
          <table:table-cell table:number-columns-repeated="2" table:style-name="ce82" office:value-type="currency" office:currency="EUR" office:value="45" calcext:value-type="currency">
            <text:p><text:s/>EUR 45.00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13]+[.BB13]+[.BC13]+[.BF13]+[.BG13]+[.BH13]+[.BL13])" office:value-type="currency" office:currency="CNY" office:value="1312.5" calcext:value-type="currency">
            <text:p><text:s/>CNY 1,312.5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13]*[.BP13])" office:value-type="currency" office:currency="USD" office:value="1411.29032258064" calcext:value-type="currency">
            <text:p><text:s/>USD 1,411.29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822" calcext:value-type="currency">
            <text:p><text:s/>USD 822.00 </text:p>
          </table:table-cell>
          <table:table-cell table:style-name="ce105" office:value-type="currency" office:currency="USD" office:value="37.63" calcext:value-type="currency">
            <text:p><text:s/>USD 37.63 </text:p>
          </table:table-cell>
          <table:table-cell table:style-name="ce105" office:value-type="currency" office:currency="USD" office:value="16.13" calcext:value-type="currency">
            <text:p><text:s/>USD 16.13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3:.CA13])" office:value-type="currency" office:currency="USD" office:value="875.76" calcext:value-type="currency">
            <text:p><text:s/>USD 875.76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3]*[.CC13])" office:value-type="currency" office:currency="USD" office:value="875.76" calcext:value-type="currency">
            <text:p><text:s/>USD 875.76 </text:p>
          </table:table-cell>
          <table:table-cell table:style-name="ce121" office:value-type="string" calcext:value-type="string">
            <text:p>USD</text:p>
          </table:table-cell>
          <table:table-cell table:style-name="ce128" office:value-type="currency" office:currency="USD" office:value="315" calcext:value-type="currency">
            <text:p><text:s/>USD 315.00 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4" office:value-type="float" office:value="40" calcext:value-type="float">
            <text:p>40.0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28" office:value-type="currency" office:currency="USD" office:value="45" calcext:value-type="currency">
            <text:p><text:s/>USD 45.00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8" office:value-type="string" calcext:value-type="string">
            <text:p>ISF Filing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28" office:value-type="currency" office:currency="USD" office:value="25" calcext:value-type="currency">
            <text:p><text:s/>USD 25.00 </text:p>
          </table:table-cell>
          <table:table-cell table:style-name="ce128" table:formula="of:=SUM([.CF13:.CO13])" office:value-type="currency" office:currency="USD" office:value="425" calcext:value-type="currency">
            <text:p><text:s/>USD 425.00 </text:p>
          </table:table-cell>
          <table:table-cell table:style-name="ce121" office:value-type="float" office:value="1" calcext:value-type="float">
            <text:p>1</text:p>
          </table:table-cell>
          <table:table-cell table:style-name="ce145" table:formula="of:=[.CP13]*[.CQ13]" office:value-type="currency" office:currency="USD" office:value="425" calcext:value-type="currency">
            <text:p><text:s/>USD 425.0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513 Highway 74 South</text:p>
          </table:table-cell>
          <table:table-cell table:style-name="ce9" office:value-type="string" calcext:value-type="string">
            <text:p>United States</text:p>
          </table:table-cell>
          <table:table-cell table:style-name="ce10" office:value-type="string" calcext:value-type="string">
            <text:p>Peachtree City, GA</text:p>
          </table:table-cell>
          <table:table-cell table:style-name="ce6" office:value-type="string" calcext:value-type="string">
            <text:p>US068L</text:p>
          </table:table-cell>
          <table:table-cell table:style-name="ce13" office:value-type="string" calcext:value-type="string">
            <text:p>LA</text:p>
          </table:table-cell>
          <table:table-cell table:style-name="ce16" office:value-type="string" calcext:value-type="string">
            <text:p>Santa Rita 03551, Puerta Sur.</text:p>
          </table:table-cell>
          <table:table-cell table:style-name="ce17" office:value-type="string" calcext:value-type="string">
            <text:p>Chile</text:p>
          </table:table-cell>
          <table:table-cell table:style-name="ce16" office:value-type="string" calcext:value-type="string">
            <text:p>Santiago</text:p>
          </table:table-cell>
          <table:table-cell table:style-name="ce19"/>
          <table:table-cell table:style-name="ce23" office:value-type="string" calcext:value-type="string">
            <text:p>Optional</text:p>
          </table:table-cell>
          <table:table-cell table:style-name="ce24" office:value-type="string" calcext:value-type="string">
            <text:p>Optional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/>
          <table:table-cell table:style-name="ce36" office:value-type="float" office:value="19" calcext:value-type="float">
            <text:p>19</text:p>
          </table:table-cell>
          <table:table-cell table:style-name="ce36"/>
          <table:table-cell table:style-name="ce38" office:value-type="string" calcext:value-type="string">
            <text:p>20GP</text:p>
          </table:table-cell>
          <table:table-cell table:style-name="ce29" office:value-type="string" calcext:value-type="string">
            <text:p>NAM 1</text:p>
          </table:table-cell>
          <table:table-cell table:style-name="ce42" office:value-type="float" office:value="70" calcext:value-type="float">
            <text:p><text:s/>$70.00 </text:p>
          </table:table-cell>
          <table:table-cell table:style-name="ce42" office:value-type="float" office:value="1744" calcext:value-type="float">
            <text:p><text:s/>$1,744.00 </text:p>
          </table:table-cell>
          <table:table-cell table:style-name="ce42" office:value-type="float" office:value="241" calcext:value-type="float">
            <text:p><text:s/>$241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1" office:value-type="float" office:value="0" calcext:value-type="float">
            <text:p><text:s/>$-   </text:p>
          </table:table-cell>
          <table:table-cell table:style-name="ce41" office:value-type="float" office:value="200" calcext:value-type="float">
            <text:p><text:s/>$200.00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/>
          <table:table-cell table:style-name="ce42" office:value-type="float" office:value="150" calcext:value-type="float">
            <text:p><text:s/>$150.00 </text:p>
          </table:table-cell>
          <table:table-cell table:style-name="ce41" table:formula="of:=[.AH14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4]" office:value-type="float" office:value="150" calcext:value-type="float">
            <text:p><text:s/>$150.00 </text:p>
          </table:table-cell>
          <table:table-cell table:style-name="ce47" table:formula="of:=SUM([.V14:.X14])" office:value-type="float" office:value="2055" calcext:value-type="float">
            <text:p><text:s/>$2,055.00 </text:p>
          </table:table-cell>
          <table:table-cell table:style-name="ce47" table:formula="of:=[.AN14]+[.Y14]+[.Z14]+[.AA14]" office:value-type="float" office:value="2055" calcext:value-type="float">
            <text:p><text:s/>$2,055.00 </text:p>
          </table:table-cell>
          <table:table-cell table:style-name="ce47" table:formula="of:=[.AN14]+[.AB14]+[.AC14]+[.AD14]" office:value-type="float" office:value="2055" calcext:value-type="float">
            <text:p><text:s/>$2,055.00 </text:p>
          </table:table-cell>
          <table:table-cell table:style-name="ce47" table:formula="of:=[.AN14]+[.AE14]+[.AF14]+[.AG14]" office:value-type="float" office:value="2300" calcext:value-type="float">
            <text:p><text:s/>$2,300.00 </text:p>
          </table:table-cell>
          <table:table-cell table:style-name="ce47" table:formula="of:=[.AN14]+[.AH14]+[.AI14]+[.AJ14]" office:value-type="float" office:value="2250" calcext:value-type="float">
            <text:p><text:s/>$2,250.00 </text:p>
          </table:table-cell>
          <table:table-cell table:style-name="ce46" table:formula="of:=[.AK14]+[.AL14]+[.AM14]+[.BQ14]+[.CD14]+[.CR14]" office:value-type="float" office:value="3428.5" calcext:value-type="float">
            <text:p><text:s/>$3,428.50 </text:p>
          </table:table-cell>
          <table:table-cell table:style-name="ce49"/>
          <table:table-cell table:style-name="ce54" office:value-type="string" calcext:value-type="string">
            <text:p>Atlanta</text:p>
          </table:table-cell>
          <table:table-cell table:style-name="ce59" office:value-type="string" calcext:value-type="string">
            <text:p>SAN ANTONIO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6" calcext:value-type="float">
            <text:p><text:s/>USD876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5" calcext:value-type="float">
            <text:p><text:s/>USD875.00 </text:p>
          </table:table-cell>
          <table:table-cell table:style-name="ce66" office:value-type="float" office:value="101" calcext:value-type="float">
            <text:p><text:s/>USD101.00 </text:p>
          </table:table-cell>
          <table:table-cell table:style-name="ce66" office:value-type="float" office:value="54" calcext:value-type="float">
            <text:p><text:s/>USD54.00 </text:p>
          </table:table-cell>
          <table:table-cell table:style-name="ce77" table:content-validation-name="val1"/>
          <table:table-cell table:style-name="ce83" table:content-validation-name="val1" office:value-type="currency" office:currency="USD" office:value="186" calcext:value-type="currency">
            <text:p><text:s/>USD 186.00 </text:p>
          </table:table-cell>
          <table:table-cell table:style-name="ce83" table:content-validation-name="val1" office:value-type="currency" office:currency="USD" office:value="187" calcext:value-type="currency">
            <text:p><text:s/>USD 187.00 </text:p>
          </table:table-cell>
          <table:table-cell table:style-name="ce74" office:value-type="currency" office:currency="CNY" office:value="178.5" calcext:value-type="currency">
            <text:p><text:s/>CNY 178.50 </text:p>
          </table:table-cell>
          <table:table-cell table:number-columns-repeated="2"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87" office:value-type="string" calcext:value-type="string">
            <text:p>0</text:p>
          </table:table-cell>
          <table:table-cell table:number-columns-repeated="2"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87" office:value-type="float" office:value="0" calcext:value-type="float">
            <text:p>0</text:p>
          </table:table-cell>
          <table:table-cell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91" table:formula="of:=SUM([.AZ14]+[.BB14]+[.BC14]+[.BF14]+[.BG14]+[.BH14]+[.BL14])" office:value-type="currency" office:currency="CNY" office:value="1248.5" calcext:value-type="currency">
            <text:p><text:s/>CNY 1,248.50 </text:p>
          </table:table-cell>
          <table:table-cell table:style-name="ce62" office:value-type="float" office:value="1" calcext:value-type="float">
            <text:p>1</text:p>
          </table:table-cell>
          <table:table-cell table:style-name="ce97" table:formula="of:=[.BP14]*[.BO14]" office:value-type="currency" office:currency="USD" office:value="1248.5" calcext:value-type="currency">
            <text:p><text:s/>USD 1,248.50 </text:p>
          </table:table-cell>
          <table:table-cell table:style-name="ce102" office:value-type="string" calcext:value-type="string">
            <text:p>USD</text:p>
          </table:table-cell>
          <table:table-cell table:number-columns-repeated="2" table:style-name="ce107" table:content-validation-name="val1" office:value-type="currency" office:currency="USD" office:value="1744" calcext:value-type="currency">
            <text:p><text:s/>USD 1,744.00 </text:p>
          </table:table-cell>
          <table:table-cell table:number-columns-repeated="2"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14" table:formula="of:=SUM([.BT14:.CA14])" office:value-type="currency" office:currency="USD" office:value="1744" calcext:value-type="currency">
            <text:p><text:s/>USD 1,744.00 </text:p>
          </table:table-cell>
          <table:table-cell table:style-name="ce115" office:value-type="float" office:value="0" calcext:value-type="float">
            <text:p>0</text:p>
          </table:table-cell>
          <table:table-cell table:style-name="ce118" table:formula="of:=[.CB14]" office:value-type="currency" office:currency="USD" office:value="1744" calcext:value-type="currency">
            <text:p><text:s/>USD 1,744.00 </text:p>
          </table:table-cell>
          <table:table-cell table:style-name="ce123" office:value-type="string" calcext:value-type="string">
            <text:p>CLP</text:p>
          </table:table-cell>
          <table:table-cell table:number-columns-repeated="2"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241" calcext:value-type="currency">
            <text:p><text:s/>USD 241.00 </text:p>
          </table:table-cell>
          <table:table-cell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1" office:value-type="currency" office:currency="CLP" office:value="0" calcext:value-type="currency">
            <text:p><text:s/>CLP -   </text:p>
          </table:table-cell>
          <table:table-cell table:style-name="ce142" office:value-type="float" office:value="0.00150416654131945" calcext:value-type="float">
            <text:p>0.002</text:p>
          </table:table-cell>
          <table:table-cell table:style-name="ce145" table:formula="of:=[.CN14]" office:value-type="currency" office:currency="USD" office:value="241" calcext:value-type="currency">
            <text:p><text:s/>USD 241.00 </text:p>
          </table:table-cell>
          <table:table-cell table:style-name="ce147"/>
          <table:table-cell table:style-name="ce148"/>
          <table:table-cell table:number-columns-repeated="1628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513 Highway 74 South</text:p>
          </table:table-cell>
          <table:table-cell table:style-name="ce9" office:value-type="string" calcext:value-type="string">
            <text:p>United States</text:p>
          </table:table-cell>
          <table:table-cell table:style-name="ce10" office:value-type="string" calcext:value-type="string">
            <text:p>Peachtree City, GA</text:p>
          </table:table-cell>
          <table:table-cell table:style-name="ce6" office:value-type="string" calcext:value-type="string">
            <text:p>US068L</text:p>
          </table:table-cell>
          <table:table-cell table:style-name="ce13" office:value-type="string" calcext:value-type="string">
            <text:p>LA</text:p>
          </table:table-cell>
          <table:table-cell table:style-name="ce16" office:value-type="string" calcext:value-type="string">
            <text:p>Santa Rita 03551, Puerta Sur.</text:p>
          </table:table-cell>
          <table:table-cell table:style-name="ce17" office:value-type="string" calcext:value-type="string">
            <text:p>Chile</text:p>
          </table:table-cell>
          <table:table-cell table:style-name="ce16" office:value-type="string" calcext:value-type="string">
            <text:p>Santiago</text:p>
          </table:table-cell>
          <table:table-cell table:style-name="ce19"/>
          <table:table-cell table:style-name="ce23" office:value-type="string" calcext:value-type="string">
            <text:p>Optional</text:p>
          </table:table-cell>
          <table:table-cell table:style-name="ce24" office:value-type="string" calcext:value-type="string">
            <text:p>Optional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8" office:value-type="string" calcext:value-type="string">
            <text:p>40GP</text:p>
          </table:table-cell>
          <table:table-cell table:style-name="ce29" office:value-type="string" calcext:value-type="string">
            <text:p>NAM 1</text:p>
          </table:table-cell>
          <table:table-cell table:style-name="ce42" office:value-type="float" office:value="70" calcext:value-type="float">
            <text:p><text:s/>$70.00 </text:p>
          </table:table-cell>
          <table:table-cell table:style-name="ce42" office:value-type="float" office:value="2149" calcext:value-type="float">
            <text:p><text:s/>$2,149.00 </text:p>
          </table:table-cell>
          <table:table-cell table:style-name="ce42" office:value-type="float" office:value="241" calcext:value-type="float">
            <text:p><text:s/>$241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1" office:value-type="float" office:value="0" calcext:value-type="float">
            <text:p><text:s/>$-   </text:p>
          </table:table-cell>
          <table:table-cell table:style-name="ce41" office:value-type="float" office:value="400" calcext:value-type="float">
            <text:p><text:s/>$4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/>
          <table:table-cell table:style-name="ce42" office:value-type="float" office:value="300" calcext:value-type="float">
            <text:p><text:s/>$300.00 </text:p>
          </table:table-cell>
          <table:table-cell table:style-name="ce41" table:formula="of:=[.AH15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5]" office:value-type="float" office:value="300" calcext:value-type="float">
            <text:p><text:s/>$300.00 </text:p>
          </table:table-cell>
          <table:table-cell table:style-name="ce47" table:formula="of:=SUM([.V15:.X15])" office:value-type="float" office:value="2460" calcext:value-type="float">
            <text:p><text:s/>$2,460.00 </text:p>
          </table:table-cell>
          <table:table-cell table:style-name="ce47" table:formula="of:=[.AN15]+[.Y15]+[.Z15]+[.AA15]" office:value-type="float" office:value="2460" calcext:value-type="float">
            <text:p><text:s/>$2,460.00 </text:p>
          </table:table-cell>
          <table:table-cell table:style-name="ce47" table:formula="of:=[.AN15]+[.AB15]+[.AC15]+[.AD15]" office:value-type="float" office:value="2460" calcext:value-type="float">
            <text:p><text:s/>$2,460.00 </text:p>
          </table:table-cell>
          <table:table-cell table:style-name="ce47" table:formula="of:=[.AN15]+[.AE15]+[.AF15]+[.AG15]" office:value-type="float" office:value="2950" calcext:value-type="float">
            <text:p><text:s/>$2,950.00 </text:p>
          </table:table-cell>
          <table:table-cell table:style-name="ce47" table:formula="of:=[.AN15]+[.AH15]+[.AI15]+[.AJ15]" office:value-type="float" office:value="2850" calcext:value-type="float">
            <text:p><text:s/>$2,850.00 </text:p>
          </table:table-cell>
          <table:table-cell table:style-name="ce46" table:formula="of:=[.AK15]+[.AL15]+[.AM15]+[.BQ15]+[.CD15]+[.CR15]" office:value-type="float" office:value="4035.5" calcext:value-type="float">
            <text:p><text:s/>$4,035.50 </text:p>
          </table:table-cell>
          <table:table-cell table:style-name="ce49"/>
          <table:table-cell table:style-name="ce54" office:value-type="string" calcext:value-type="string">
            <text:p>Atlanta</text:p>
          </table:table-cell>
          <table:table-cell table:style-name="ce59" office:value-type="string" calcext:value-type="string">
            <text:p>SAN ANTONIO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7" calcext:value-type="float">
            <text:p><text:s/>USD877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6" calcext:value-type="float">
            <text:p><text:s/>USD876.00 </text:p>
          </table:table-cell>
          <table:table-cell table:style-name="ce66" office:value-type="float" office:value="102" calcext:value-type="float">
            <text:p><text:s/>USD102.00 </text:p>
          </table:table-cell>
          <table:table-cell table:style-name="ce66" office:value-type="float" office:value="55" calcext:value-type="float">
            <text:p><text:s/>USD55.00 </text:p>
          </table:table-cell>
          <table:table-cell table:style-name="ce77" table:content-validation-name="val1"/>
          <table:table-cell table:style-name="ce83" table:content-validation-name="val1" office:value-type="currency" office:currency="USD" office:value="189" calcext:value-type="currency">
            <text:p><text:s/>USD 189.00 </text:p>
          </table:table-cell>
          <table:table-cell table:style-name="ce83" table:content-validation-name="val1" office:value-type="currency" office:currency="USD" office:value="190" calcext:value-type="currency">
            <text:p><text:s/>USD 190.00 </text:p>
          </table:table-cell>
          <table:table-cell table:style-name="ce74" office:value-type="currency" office:currency="CNY" office:value="179.5" calcext:value-type="currency">
            <text:p><text:s/>CNY 179.50 </text:p>
          </table:table-cell>
          <table:table-cell table:number-columns-repeated="2"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87" office:value-type="string" calcext:value-type="string">
            <text:p>0</text:p>
          </table:table-cell>
          <table:table-cell table:number-columns-repeated="2"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87" office:value-type="float" office:value="0" calcext:value-type="float">
            <text:p>0</text:p>
          </table:table-cell>
          <table:table-cell table:style-name="ce83" table:content-validation-name="val1" office:value-type="currency" office:currency="USD" office:value="0" calcext:value-type="currency">
            <text:p><text:s/>USD -   </text:p>
          </table:table-cell>
          <table:table-cell table:style-name="ce91" table:formula="of:=SUM([.AZ15]+[.BB15]+[.BC15]+[.BF15]+[.BG15]+[.BH15]+[.BL15])" office:value-type="currency" office:currency="CNY" office:value="1255.5" calcext:value-type="currency">
            <text:p><text:s/>CNY 1,255.50 </text:p>
          </table:table-cell>
          <table:table-cell table:style-name="ce62" office:value-type="float" office:value="1" calcext:value-type="float">
            <text:p>1</text:p>
          </table:table-cell>
          <table:table-cell table:style-name="ce97" table:formula="of:=[.BP15]*[.BO15]" office:value-type="currency" office:currency="USD" office:value="1255.5" calcext:value-type="currency">
            <text:p><text:s/>USD 1,255.50 </text:p>
          </table:table-cell>
          <table:table-cell table:style-name="ce102" office:value-type="string" calcext:value-type="string">
            <text:p>USD</text:p>
          </table:table-cell>
          <table:table-cell table:number-columns-repeated="2" table:style-name="ce107" table:content-validation-name="val1" office:value-type="currency" office:currency="USD" office:value="2149" calcext:value-type="currency">
            <text:p><text:s/>USD 2,149.00 </text:p>
          </table:table-cell>
          <table:table-cell table:number-columns-repeated="2"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7" table:content-validation-name="val1" office:value-type="currency" office:currency="USD" office:value="0" calcext:value-type="currency">
            <text:p><text:s/>USD -   </text:p>
          </table:table-cell>
          <table:table-cell table:style-name="ce114" table:formula="of:=SUM([.BT15:.CA15])" office:value-type="currency" office:currency="USD" office:value="2149" calcext:value-type="currency">
            <text:p><text:s/>USD 2,149.00 </text:p>
          </table:table-cell>
          <table:table-cell table:style-name="ce115" office:value-type="float" office:value="0" calcext:value-type="float">
            <text:p>0</text:p>
          </table:table-cell>
          <table:table-cell table:style-name="ce118" table:formula="of:=[.CB15]" office:value-type="currency" office:currency="USD" office:value="2149" calcext:value-type="currency">
            <text:p><text:s/>USD 2,149.00 </text:p>
          </table:table-cell>
          <table:table-cell table:style-name="ce123" office:value-type="string" calcext:value-type="string">
            <text:p>CLP</text:p>
          </table:table-cell>
          <table:table-cell table:number-columns-repeated="2"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241" calcext:value-type="currency">
            <text:p><text:s/>USD 241.00 </text:p>
          </table:table-cell>
          <table:table-cell table:style-name="ce129" table:content-validation-name="val1" office:value-type="currency" office:currency="CLP" office:value="0" calcext:value-type="currency">
            <text:p><text:s/>CLP -   </text:p>
          </table:table-cell>
          <table:table-cell table:style-name="ce131" office:value-type="currency" office:currency="CLP" office:value="0" calcext:value-type="currency">
            <text:p><text:s/>CLP -   </text:p>
          </table:table-cell>
          <table:table-cell table:style-name="ce142" office:value-type="float" office:value="0.00150416654131945" calcext:value-type="float">
            <text:p>0.002</text:p>
          </table:table-cell>
          <table:table-cell table:style-name="ce145" table:formula="of:=[.CN15]" office:value-type="currency" office:currency="USD" office:value="241" calcext:value-type="currency">
            <text:p><text:s/>USD 241.00 </text:p>
          </table:table-cell>
          <table:table-cell table:style-name="ce147"/>
          <table:table-cell table:style-name="ce148"/>
          <table:table-cell table:number-columns-repeated="1628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6, Kunjia Road, Jiangsu Province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16]" office:value-type="float" office:value="386.159420289855" calcext:value-type="float">
            <text:p><text:s/>$386.16 </text:p>
          </table:table-cell>
          <table:table-cell table:style-name="ce42" table:formula="of:=[.CD16]" office:value-type="float" office:value="2650" calcext:value-type="float">
            <text:p><text:s/>$2,650.00 </text:p>
          </table:table-cell>
          <table:table-cell table:style-name="ce42" table:formula="of:=[.CR16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55" calcext:value-type="float">
            <text:p><text:s/>$5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55" calcext:value-type="float">
            <text:p><text:s/>$55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16]" office:value-type="float" office:value="55" calcext:value-type="float">
            <text:p><text:s/>$5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6]" office:value-type="float" office:value="-750" calcext:value-type="float">
            <text:p><text:s/>$(750.00)</text:p>
          </table:table-cell>
          <table:table-cell table:style-name="ce47" table:formula="of:=SUM([.V16:.X16])" office:value-type="float" office:value="3447.05685618729" calcext:value-type="float">
            <text:p><text:s/>$3,447.06 </text:p>
          </table:table-cell>
          <table:table-cell table:style-name="ce47" table:formula="of:=[.V16]+[.W16]+[.X16]+[.AA16]" office:value-type="float" office:value="3947.05685618729" calcext:value-type="float">
            <text:p><text:s/>$3,947.06 </text:p>
          </table:table-cell>
          <table:table-cell table:style-name="ce47" table:formula="of:=[.AO16]" office:value-type="float" office:value="3947.05685618729" calcext:value-type="float">
            <text:p><text:s/>$3,947.06 </text:p>
          </table:table-cell>
          <table:table-cell table:style-name="ce47" table:formula="of:=[.AN16]+[.AE16]+[.AF16]+[.AG16]" office:value-type="float" office:value="3502.05685618729" calcext:value-type="float">
            <text:p><text:s/>$3,502.06 </text:p>
          </table:table-cell>
          <table:table-cell table:style-name="ce47" table:formula="of:=[.AN16]+[.AH16]+[.AI16]+[.AJ16]" office:value-type="float" office:value="2752.05685618729" calcext:value-type="float">
            <text:p><text:s/>$2,752.06 </text:p>
          </table:table-cell>
          <table:table-cell table:style-name="ce46" table:formula="of:=[.AK16]+[.AL16]+[.AM16]+[.BQ16]+[.CD16]+[.CR16]" office:value-type="float" office:value="2752.05685618729" calcext:value-type="float">
            <text:p><text:s/>$2,752.06 </text:p>
          </table:table-cell>
          <table:table-cell table:style-name="ce50" office:value-type="float" office:value="43" calcext:value-type="float">
            <text:p>43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8" calcext:value-type="float">
            <text:p><text:s/>USD878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7" calcext:value-type="float">
            <text:p><text:s/>USD877.00 </text:p>
          </table:table-cell>
          <table:table-cell table:style-name="ce66" office:value-type="float" office:value="103" calcext:value-type="float">
            <text:p><text:s/>USD103.00 </text:p>
          </table:table-cell>
          <table:table-cell table:style-name="ce66" office:value-type="float" office:value="56" calcext:value-type="float">
            <text:p><text:s/>USD56.00 </text:p>
          </table:table-cell>
          <table:table-cell table:style-name="ce74"/>
          <table:table-cell table:number-columns-repeated="2" table:style-name="ce74" office:value-type="currency" office:currency="CNY" office:value="675" calcext:value-type="currency">
            <text:p><text:s/>CNY 675.00 </text:p>
          </table:table-cell>
          <table:table-cell table:style-name="ce74" office:value-type="currency" office:currency="CNY" office:value="180.5" calcext:value-type="currency">
            <text:p><text:s/>CNY 180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370" calcext:value-type="currency">
            <text:p><text:s/>CNY 370.00 </text:p>
          </table:table-cell>
          <table:table-cell table:style-name="ce85" office:value-type="string" calcext:value-type="string">
            <text:p>Courier fee</text:p>
          </table:table-cell>
          <table:table-cell table:style-name="ce74" office:value-type="currency" office:currency="CNY" office:value="150" calcext:value-type="currency">
            <text:p><text:s/>CNY 150.00 </text:p>
          </table:table-cell>
          <table:table-cell table:style-name="ce91" table:formula="of:=SUM([.AZ16]+[.BB16]+[.BC16]+[.BF16]+[.BG16]+[.BH16]+[.BL16])" office:value-type="currency" office:currency="CNY" office:value="2664.5" calcext:value-type="currency">
            <text:p><text:s/>CNY 2,664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6]*[.BP16])" office:value-type="currency" office:currency="USD" office:value="386.159420289855" calcext:value-type="currency">
            <text:p><text:s/>USD 386.16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6:.CA16])" office:value-type="currency" office:currency="USD" office:value="2650" calcext:value-type="currency">
            <text:p><text:s/>USD 2,650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6]*[.CC16])" office:value-type="currency" office:currency="USD" office:value="2650" calcext:value-type="currency">
            <text:p><text:s/>USD 2,650.0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16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6, Kunjia Road, Jiangsu Province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17]" office:value-type="float" office:value="464.27536231884" calcext:value-type="float">
            <text:p><text:s/>$464.28 </text:p>
          </table:table-cell>
          <table:table-cell table:style-name="ce42" table:formula="of:=[.CD17]" office:value-type="float" office:value="2725" calcext:value-type="float">
            <text:p><text:s/>$2,725.00 </text:p>
          </table:table-cell>
          <table:table-cell table:style-name="ce42" table:formula="of:=[.CR17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17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7]" office:value-type="float" office:value="-750" calcext:value-type="float">
            <text:p><text:s/>$(750.00)</text:p>
          </table:table-cell>
          <table:table-cell table:style-name="ce47" table:formula="of:=SUM([.V17:.X17])" office:value-type="float" office:value="3600.17279821628" calcext:value-type="float">
            <text:p><text:s/>$3,600.17 </text:p>
          </table:table-cell>
          <table:table-cell table:style-name="ce47" table:formula="of:=[.V17]+[.W17]+[.X17]+[.AA17]" office:value-type="float" office:value="4100.17279821628" calcext:value-type="float">
            <text:p><text:s/>$4,100.17 </text:p>
          </table:table-cell>
          <table:table-cell table:style-name="ce47" table:formula="of:=[.AO17]" office:value-type="float" office:value="4100.17279821628" calcext:value-type="float">
            <text:p><text:s/>$4,100.17 </text:p>
          </table:table-cell>
          <table:table-cell table:style-name="ce47" table:formula="of:=[.AN17]+[.AE17]+[.AF17]+[.AG17]" office:value-type="float" office:value="3710.17279821628" calcext:value-type="float">
            <text:p><text:s/>$3,710.17 </text:p>
          </table:table-cell>
          <table:table-cell table:style-name="ce47" table:formula="of:=[.AN17]+[.AH17]+[.AI17]+[.AJ17]" office:value-type="float" office:value="2960.17279821628" calcext:value-type="float">
            <text:p><text:s/>$2,960.17 </text:p>
          </table:table-cell>
          <table:table-cell table:style-name="ce46" table:formula="of:=[.AK17]+[.AL17]+[.AM17]+[.BQ17]+[.CD17]+[.CR17]" office:value-type="float" office:value="2960.17279821628" calcext:value-type="float">
            <text:p><text:s/>$2,960.17 </text:p>
          </table:table-cell>
          <table:table-cell table:style-name="ce50" office:value-type="float" office:value="43" calcext:value-type="float">
            <text:p>43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79" calcext:value-type="float">
            <text:p><text:s/>USD879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8" calcext:value-type="float">
            <text:p><text:s/>USD878.00 </text:p>
          </table:table-cell>
          <table:table-cell table:style-name="ce66" office:value-type="float" office:value="104" calcext:value-type="float">
            <text:p><text:s/>USD104.00 </text:p>
          </table:table-cell>
          <table:table-cell table:style-name="ce66" office:value-type="float" office:value="57" calcext:value-type="float">
            <text:p><text:s/>USD57.00 </text:p>
          </table:table-cell>
          <table:table-cell table:style-name="ce74"/>
          <table:table-cell table:number-columns-repeated="2" table:style-name="ce74" office:value-type="currency" office:currency="CNY" office:value="1050" calcext:value-type="currency">
            <text:p><text:s/>CNY 1,050.00 </text:p>
          </table:table-cell>
          <table:table-cell table:style-name="ce74" office:value-type="currency" office:currency="CNY" office:value="181.5" calcext:value-type="currency">
            <text:p><text:s/>CNY 181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530" calcext:value-type="currency">
            <text:p><text:s/>CNY 530.00 </text:p>
          </table:table-cell>
          <table:table-cell table:style-name="ce85" office:value-type="string" calcext:value-type="string">
            <text:p>Courier fee</text:p>
          </table:table-cell>
          <table:table-cell table:style-name="ce74" office:value-type="currency" office:currency="CNY" office:value="150" calcext:value-type="currency">
            <text:p><text:s/>CNY 150.00 </text:p>
          </table:table-cell>
          <table:table-cell table:style-name="ce91" table:formula="of:=SUM([.AZ17]+[.BB17]+[.BC17]+[.BF17]+[.BG17]+[.BH17]+[.BL17])" office:value-type="currency" office:currency="CNY" office:value="3203.5" calcext:value-type="currency">
            <text:p><text:s/>CNY 3,203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7]*[.BP17])" office:value-type="currency" office:currency="USD" office:value="464.27536231884" calcext:value-type="currency">
            <text:p><text:s/>USD 464.28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7:.CA17])" office:value-type="currency" office:currency="USD" office:value="2725" calcext:value-type="currency">
            <text:p><text:s/>USD 2,725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7]*[.CC17])" office:value-type="currency" office:currency="USD" office:value="2725" calcext:value-type="currency">
            <text:p><text:s/>USD 2,725.0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17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18]" office:value-type="float" office:value="387.31884057971" calcext:value-type="float">
            <text:p><text:s/>$387.32 </text:p>
          </table:table-cell>
          <table:table-cell table:style-name="ce42" table:formula="of:=[.CD18]" office:value-type="float" office:value="2650" calcext:value-type="float">
            <text:p><text:s/>$2,650.00 </text:p>
          </table:table-cell>
          <table:table-cell table:style-name="ce42" table:formula="of:=[.CR18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55" calcext:value-type="float">
            <text:p><text:s/>$5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55" calcext:value-type="float">
            <text:p><text:s/>$55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18]" office:value-type="float" office:value="55" calcext:value-type="float">
            <text:p><text:s/>$5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8]" office:value-type="float" office:value="-750" calcext:value-type="float">
            <text:p><text:s/>$(750.00)</text:p>
          </table:table-cell>
          <table:table-cell table:style-name="ce47" table:formula="of:=SUM([.V18:.X18])" office:value-type="float" office:value="3448.21627647715" calcext:value-type="float">
            <text:p><text:s/>$3,448.22 </text:p>
          </table:table-cell>
          <table:table-cell table:style-name="ce47" table:formula="of:=[.V18]+[.W18]+[.X18]+[.AA18]" office:value-type="float" office:value="3948.21627647715" calcext:value-type="float">
            <text:p><text:s/>$3,948.22 </text:p>
          </table:table-cell>
          <table:table-cell table:style-name="ce47" table:formula="of:=[.AO18]" office:value-type="float" office:value="3948.21627647715" calcext:value-type="float">
            <text:p><text:s/>$3,948.22 </text:p>
          </table:table-cell>
          <table:table-cell table:style-name="ce47" table:formula="of:=[.AN18]+[.AE18]+[.AF18]+[.AG18]" office:value-type="float" office:value="3503.21627647715" calcext:value-type="float">
            <text:p><text:s/>$3,503.22 </text:p>
          </table:table-cell>
          <table:table-cell table:style-name="ce47" table:formula="of:=[.AN18]+[.AH18]+[.AI18]+[.AJ18]" office:value-type="float" office:value="2753.21627647715" calcext:value-type="float">
            <text:p><text:s/>$2,753.22 </text:p>
          </table:table-cell>
          <table:table-cell table:style-name="ce46" table:formula="of:=[.AK18]+[.AL18]+[.AM18]+[.BQ18]+[.CD18]+[.CR18]" office:value-type="float" office:value="2753.21627647715" calcext:value-type="float">
            <text:p><text:s/>$2,753.22 </text:p>
          </table:table-cell>
          <table:table-cell table:style-name="ce50" office:value-type="float" office:value="43" calcext:value-type="float">
            <text:p>43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0" calcext:value-type="float">
            <text:p><text:s/>USD88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79" calcext:value-type="float">
            <text:p><text:s/>USD879.00 </text:p>
          </table:table-cell>
          <table:table-cell table:style-name="ce66" office:value-type="float" office:value="105" calcext:value-type="float">
            <text:p><text:s/>USD105.00 </text:p>
          </table:table-cell>
          <table:table-cell table:style-name="ce66" office:value-type="float" office:value="58" calcext:value-type="float">
            <text:p><text:s/>USD58.00 </text:p>
          </table:table-cell>
          <table:table-cell table:style-name="ce74"/>
          <table:table-cell table:number-columns-repeated="2" table:style-name="ce74" office:value-type="currency" office:currency="CNY" office:value="675" calcext:value-type="currency">
            <text:p><text:s/>CNY 675.00 </text:p>
          </table:table-cell>
          <table:table-cell table:style-name="ce74" office:value-type="currency" office:currency="CNY" office:value="182.5" calcext:value-type="currency">
            <text:p><text:s/>CNY 182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370" calcext:value-type="currency">
            <text:p><text:s/>CNY 370.00 </text:p>
          </table:table-cell>
          <table:table-cell table:style-name="ce85" office:value-type="string" calcext:value-type="string">
            <text:p>Courier fee</text:p>
          </table:table-cell>
          <table:table-cell table:style-name="ce74" office:value-type="currency" office:currency="CNY" office:value="150" calcext:value-type="currency">
            <text:p><text:s/>CNY 150.00 </text:p>
          </table:table-cell>
          <table:table-cell table:style-name="ce91" table:formula="of:=SUM([.AZ18]+[.BB18]+[.BC18]+[.BF18]+[.BG18]+[.BH18]+[.BL18])" office:value-type="currency" office:currency="CNY" office:value="2672.5" calcext:value-type="currency">
            <text:p><text:s/>CNY 2,672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8]*[.BP18])" office:value-type="currency" office:currency="USD" office:value="387.31884057971" calcext:value-type="currency">
            <text:p><text:s/>USD 387.32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8:.CA18])" office:value-type="currency" office:currency="USD" office:value="2650" calcext:value-type="currency">
            <text:p><text:s/>USD 2,650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8]*[.CC18])" office:value-type="currency" office:currency="USD" office:value="2650" calcext:value-type="currency">
            <text:p><text:s/>USD 2,650.0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18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No 608 Kun Jia Road Kunshan Economic &amp; Technological Zone Jiangsu Province P.R. 215300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Kunshan</text:p>
          </table:table-cell>
          <table:table-cell table:style-name="ce6" office:value-type="string" calcext:value-type="string">
            <text:p>CN00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19]" office:value-type="float" office:value="465.434782608696" calcext:value-type="float">
            <text:p><text:s/>$465.43 </text:p>
          </table:table-cell>
          <table:table-cell table:style-name="ce42" table:formula="of:=[.CD19]" office:value-type="float" office:value="2725" calcext:value-type="float">
            <text:p><text:s/>$2,725.00 </text:p>
          </table:table-cell>
          <table:table-cell table:style-name="ce42" table:formula="of:=[.CR19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19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19]" office:value-type="float" office:value="-750" calcext:value-type="float">
            <text:p><text:s/>$(750.00)</text:p>
          </table:table-cell>
          <table:table-cell table:style-name="ce47" table:formula="of:=SUM([.V19:.X19])" office:value-type="float" office:value="3601.33221850613" calcext:value-type="float">
            <text:p><text:s/>$3,601.33 </text:p>
          </table:table-cell>
          <table:table-cell table:style-name="ce47" table:formula="of:=[.V19]+[.W19]+[.X19]+[.AA19]" office:value-type="float" office:value="4101.33221850613" calcext:value-type="float">
            <text:p><text:s/>$4,101.33 </text:p>
          </table:table-cell>
          <table:table-cell table:style-name="ce47" table:formula="of:=[.AO19]" office:value-type="float" office:value="4101.33221850613" calcext:value-type="float">
            <text:p><text:s/>$4,101.33 </text:p>
          </table:table-cell>
          <table:table-cell table:style-name="ce47" table:formula="of:=[.AN19]+[.AE19]+[.AF19]+[.AG19]" office:value-type="float" office:value="3711.33221850613" calcext:value-type="float">
            <text:p><text:s/>$3,711.33 </text:p>
          </table:table-cell>
          <table:table-cell table:style-name="ce47" table:formula="of:=[.AN19]+[.AH19]+[.AI19]+[.AJ19]" office:value-type="float" office:value="2961.33221850613" calcext:value-type="float">
            <text:p><text:s/>$2,961.33 </text:p>
          </table:table-cell>
          <table:table-cell table:style-name="ce46" table:formula="of:=[.AK19]+[.AL19]+[.AM19]+[.BQ19]+[.CD19]+[.CR19]" office:value-type="float" office:value="2961.33221850613" calcext:value-type="float">
            <text:p><text:s/>$2,961.33 </text:p>
          </table:table-cell>
          <table:table-cell table:style-name="ce50" office:value-type="float" office:value="43" calcext:value-type="float">
            <text:p>43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1" calcext:value-type="float">
            <text:p><text:s/>USD881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0" calcext:value-type="float">
            <text:p><text:s/>USD880.00 </text:p>
          </table:table-cell>
          <table:table-cell table:style-name="ce66" office:value-type="float" office:value="106" calcext:value-type="float">
            <text:p><text:s/>USD106.00 </text:p>
          </table:table-cell>
          <table:table-cell table:style-name="ce66" office:value-type="float" office:value="59" calcext:value-type="float">
            <text:p><text:s/>USD59.00 </text:p>
          </table:table-cell>
          <table:table-cell table:style-name="ce74"/>
          <table:table-cell table:number-columns-repeated="2" table:style-name="ce74" office:value-type="currency" office:currency="CNY" office:value="1050" calcext:value-type="currency">
            <text:p><text:s/>CNY 1,050.00 </text:p>
          </table:table-cell>
          <table:table-cell table:style-name="ce74" office:value-type="currency" office:currency="CNY" office:value="183.5" calcext:value-type="currency">
            <text:p><text:s/>CNY 183.50 </text:p>
          </table:table-cell>
          <table:table-cell table:style-name="ce74" office:value-type="currency" office:currency="CNY" office:value="550" calcext:value-type="currency">
            <text:p><text:s/>CNY 550.00 </text:p>
          </table:table-cell>
          <table:table-cell table:style-name="ce74" office:value-type="currency" office:currency="CNY" office:value="100" calcext:value-type="currency">
            <text:p><text:s/>CNY 100.00 </text:p>
          </table:table-cell>
          <table:table-cell table:style-name="ce85" office:value-type="string" calcext:value-type="string">
            <text:p>Booking Fee; <text:s/>Port Security Fee <text:s/>0</text:p>
          </table:table-cell>
          <table:table-cell table:number-columns-repeated="2" table:style-name="ce74" office:value-type="currency" office:currency="CNY" office:value="530" calcext:value-type="currency">
            <text:p><text:s/>CNY 530.00 </text:p>
          </table:table-cell>
          <table:table-cell table:style-name="ce85" office:value-type="string" calcext:value-type="string">
            <text:p>Courier fee</text:p>
          </table:table-cell>
          <table:table-cell table:style-name="ce74" office:value-type="currency" office:currency="CNY" office:value="150" calcext:value-type="currency">
            <text:p><text:s/>CNY 150.00 </text:p>
          </table:table-cell>
          <table:table-cell table:style-name="ce91" table:formula="of:=SUM([.AZ19]+[.BB19]+[.BC19]+[.BF19]+[.BG19]+[.BH19]+[.BL19])" office:value-type="currency" office:currency="CNY" office:value="3211.5" calcext:value-type="currency">
            <text:p><text:s/>CNY 3,211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19]*[.BP19])" office:value-type="currency" office:currency="USD" office:value="465.434782608696" calcext:value-type="currency">
            <text:p><text:s/>USD 465.43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19:.CA19])" office:value-type="currency" office:currency="USD" office:value="2725" calcext:value-type="currency">
            <text:p><text:s/>USD 2,725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19]*[.CC19])" office:value-type="currency" office:currency="USD" office:value="2725" calcext:value-type="currency">
            <text:p><text:s/>USD 2,725.0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19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Shanghai Nar Industrial Co.</text:p>
          </table:table-cell>
          <table:table-cell table:style-name="ce6" office:value-type="string" calcext:value-type="string">
            <text:p>No 26, Xinhan Rd, Xinchang Industrial Zone, Pudong New District, 20134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Shanghai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Port to Door</text:p>
          </table:table-cell>
          <table:table-cell table:style-name="ce29" office:value-type="string" calcext:value-type="string">
            <text:p>FOB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0]" office:value-type="float" office:value="382.101449275362" calcext:value-type="float">
            <text:p><text:s/>$382.10 </text:p>
          </table:table-cell>
          <table:table-cell table:style-name="ce42" table:formula="of:=[.CD20]" office:value-type="float" office:value="2737" calcext:value-type="float">
            <text:p><text:s/>$2,737.00 </text:p>
          </table:table-cell>
          <table:table-cell table:style-name="ce42" table:formula="of:=[.CR20]" office:value-type="float" office:value="1163.14102564103" calcext:value-type="float">
            <text:p><text:s/>$1,163.14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20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20]" office:value-type="float" office:value="-750" calcext:value-type="float">
            <text:p><text:s/>$(750.00)</text:p>
          </table:table-cell>
          <table:table-cell table:style-name="ce47" table:formula="of:=SUM([.V20:.X20])" office:value-type="float" office:value="4282.24247491639" calcext:value-type="float">
            <text:p><text:s/>$4,282.24 </text:p>
          </table:table-cell>
          <table:table-cell table:style-name="ce47" table:formula="of:=[.V20]+[.W20]+[.X20]+[.AA20]" office:value-type="float" office:value="4782.24247491639" calcext:value-type="float">
            <text:p><text:s/>$4,782.24 </text:p>
          </table:table-cell>
          <table:table-cell table:style-name="ce47" table:formula="of:=[.AO20]" office:value-type="float" office:value="4782.24247491639" calcext:value-type="float">
            <text:p><text:s/>$4,782.24 </text:p>
          </table:table-cell>
          <table:table-cell table:style-name="ce47" table:formula="of:=[.AN20]+[.AE20]+[.AF20]+[.AG20]" office:value-type="float" office:value="4392.24247491639" calcext:value-type="float">
            <text:p><text:s/>$4,392.24 </text:p>
          </table:table-cell>
          <table:table-cell table:style-name="ce47" table:formula="of:=[.AN20]+[.AH20]+[.AI20]+[.AJ20]" office:value-type="float" office:value="3642.24247491639" calcext:value-type="float">
            <text:p><text:s/>$3,642.24 </text:p>
          </table:table-cell>
          <table:table-cell table:style-name="ce46" table:formula="of:=[.AK20]+[.AL20]+[.AM20]+[.BQ20]+[.CD20]+[.CR20]" office:value-type="float" office:value="3642.24247491639" calcext:value-type="float">
            <text:p><text:s/>$3,642.24 </text:p>
          </table:table-cell>
          <table:table-cell table:style-name="ce50" office:value-type="float" office:value="37" calcext:value-type="float">
            <text:p>37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2" calcext:value-type="float">
            <text:p><text:s/>USD882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1" calcext:value-type="float">
            <text:p><text:s/>USD881.00 </text:p>
          </table:table-cell>
          <table:table-cell table:style-name="ce66" office:value-type="float" office:value="107" calcext:value-type="float">
            <text:p><text:s/>USD107.00 </text:p>
          </table:table-cell>
          <table:table-cell table:style-name="ce66" office:value-type="float" office:value="60" calcext:value-type="float">
            <text:p><text:s/>USD60.00 </text:p>
          </table:table-cell>
          <table:table-cell table:style-name="ce74"/>
          <table:table-cell table:number-columns-repeated="2" table:style-name="ce74" office:value-type="currency" office:currency="CNY" office:value="1051" calcext:value-type="currency">
            <text:p><text:s/>CNY 1,051.00 </text:p>
          </table:table-cell>
          <table:table-cell table:style-name="ce74" office:value-type="currency" office:currency="CNY" office:value="184.5" calcext:value-type="currency">
            <text:p><text:s/>CNY 184.50 </text:p>
          </table:table-cell>
          <table:table-cell table:style-name="ce74" office:value-type="currency" office:currency="CNY" office:value="500" calcext:value-type="currency">
            <text:p><text:s/>CNY 500.00 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74" office:value-type="currency" office:currency="CNY" office:value="0" calcext:value-type="currency">
            <text:p><text:s/>CNY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20]+[.BB20]+[.BC20]+[.BF20]+[.BG20]+[.BH20]+[.BL20])" office:value-type="currency" office:currency="CNY" office:value="2636.5" calcext:value-type="currency">
            <text:p><text:s/>CNY 2,636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20]*[.BP20])" office:value-type="currency" office:currency="USD" office:value="382.101449275362" calcext:value-type="currency">
            <text:p><text:s/>USD 382.10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2" calcext:value-type="currency">
            <text:p><text:s/>USD 12.00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0:.CA20])" office:value-type="currency" office:currency="USD" office:value="2737" calcext:value-type="currency">
            <text:p><text:s/>USD 2,737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0]*[.CC20])" office:value-type="currency" office:currency="USD" office:value="2737" calcext:value-type="currency">
            <text:p><text:s/>USD 2,737.00 </text:p>
          </table:table-cell>
          <table:table-cell table:style-name="ce121" office:value-type="string" calcext:value-type="string">
            <text:p>BRL</text:p>
          </table:table-cell>
          <table:table-cell table:style-name="ce130" office:value-type="currency" office:currency="BRL" office:value="1805" calcext:value-type="currency">
            <text:p><text:s/>BRL 1,805.00 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style-name="ce130" office:value-type="currency" office:currency="BRL" office:value="667" calcext:value-type="currency">
            <text:p><text:s/>BRL 667.00 </text:p>
          </table:table-cell>
          <table:table-cell table:style-name="ce130" office:value-type="currency" office:currency="BRL" office:value="330" calcext:value-type="currency">
            <text:p><text:s/>BRL 330.00 </text:p>
          </table:table-cell>
          <table:table-cell table:style-name="ce138" office:value-type="string" calcext:value-type="string">
            <text:p>Drop off, Damage fee</text:p>
          </table:table-cell>
          <table:table-cell table:style-name="ce130" office:value-type="currency" office:currency="BRL" office:value="185" calcext:value-type="currency">
            <text:p><text:s/>BRL 185.00 </text:p>
          </table:table-cell>
          <table:table-cell table:style-name="ce138" office:value-type="string" calcext:value-type="string">
            <text:p>Desconsolidation &amp; Siscarga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0" office:value-type="currency" office:currency="BRL" office:value="100" calcext:value-type="currency">
            <text:p><text:s/>BRL 100.00 </text:p>
          </table:table-cell>
          <table:table-cell table:style-name="ce130" table:formula="of:=SUM([.CF20:.CO20])" office:value-type="currency" office:currency="BRL" office:value="3629" calcext:value-type="currency">
            <text:p><text:s/>BRL 3,629.00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P20]*[.CQ20]" office:value-type="currency" office:currency="USD" office:value="1163.14102564103" calcext:value-type="currency">
            <text:p><text:s/>USD 1,163.14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Zhejiang Hailide New Materia</text:p>
          </table:table-cell>
          <table:table-cell table:style-name="ce6" office:value-type="string" calcext:value-type="string">
            <text:p>Maqiao Industrial Park of Haining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Zhejiang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Port to Door</text:p>
          </table:table-cell>
          <table:table-cell table:style-name="ce29" office:value-type="string" calcext:value-type="string">
            <text:p>FOB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1]" office:value-type="float" office:value="382.826086956522" calcext:value-type="float">
            <text:p><text:s/>$382.83 </text:p>
          </table:table-cell>
          <table:table-cell table:style-name="ce42" table:formula="of:=[.CD21]" office:value-type="float" office:value="2662" calcext:value-type="float">
            <text:p><text:s/>$2,662.00 </text:p>
          </table:table-cell>
          <table:table-cell table:style-name="ce42" table:formula="of:=[.CR21]" office:value-type="float" office:value="1002.24358974359" calcext:value-type="float">
            <text:p><text:s/>$1,002.24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55" calcext:value-type="float">
            <text:p><text:s/>$5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55" calcext:value-type="float">
            <text:p><text:s/>$55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21]" office:value-type="float" office:value="55" calcext:value-type="float">
            <text:p><text:s/>$5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21]" office:value-type="float" office:value="-750" calcext:value-type="float">
            <text:p><text:s/>$(750.00)</text:p>
          </table:table-cell>
          <table:table-cell table:style-name="ce47" table:formula="of:=SUM([.V21:.X21])" office:value-type="float" office:value="4047.06967670011" calcext:value-type="float">
            <text:p><text:s/>$4,047.07 </text:p>
          </table:table-cell>
          <table:table-cell table:style-name="ce47" table:formula="of:=[.V21]+[.W21]+[.X21]+[.AA21]" office:value-type="float" office:value="4547.06967670011" calcext:value-type="float">
            <text:p><text:s/>$4,547.07 </text:p>
          </table:table-cell>
          <table:table-cell table:style-name="ce47" table:formula="of:=[.AO21]" office:value-type="float" office:value="4547.06967670011" calcext:value-type="float">
            <text:p><text:s/>$4,547.07 </text:p>
          </table:table-cell>
          <table:table-cell table:style-name="ce47" table:formula="of:=[.AN21]+[.AE21]+[.AF21]+[.AG21]" office:value-type="float" office:value="4102.06967670011" calcext:value-type="float">
            <text:p><text:s/>$4,102.07 </text:p>
          </table:table-cell>
          <table:table-cell table:style-name="ce47" table:formula="of:=[.AN21]+[.AH21]+[.AI21]+[.AJ21]" office:value-type="float" office:value="3352.06967670011" calcext:value-type="float">
            <text:p><text:s/>$3,352.07 </text:p>
          </table:table-cell>
          <table:table-cell table:style-name="ce46" table:formula="of:=[.AK21]+[.AL21]+[.AM21]+[.BQ21]+[.CD21]+[.CR21]" office:value-type="float" office:value="3352.06967670011" calcext:value-type="float">
            <text:p><text:s/>$3,352.07 </text:p>
          </table:table-cell>
          <table:table-cell table:style-name="ce50" office:value-type="float" office:value="37" calcext:value-type="float">
            <text:p>37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3" calcext:value-type="float">
            <text:p><text:s/>USD883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2" calcext:value-type="float">
            <text:p><text:s/>USD882.00 </text:p>
          </table:table-cell>
          <table:table-cell table:style-name="ce66" office:value-type="float" office:value="108" calcext:value-type="float">
            <text:p><text:s/>USD108.00 </text:p>
          </table:table-cell>
          <table:table-cell table:style-name="ce66" office:value-type="float" office:value="61" calcext:value-type="float">
            <text:p><text:s/>USD61.00 </text:p>
          </table:table-cell>
          <table:table-cell table:style-name="ce74"/>
          <table:table-cell table:number-columns-repeated="2" table:style-name="ce74" office:value-type="currency" office:currency="CNY" office:value="1052" calcext:value-type="currency">
            <text:p><text:s/>CNY 1,052.00 </text:p>
          </table:table-cell>
          <table:table-cell table:style-name="ce74" office:value-type="currency" office:currency="CNY" office:value="185.5" calcext:value-type="currency">
            <text:p><text:s/>CNY 185.50 </text:p>
          </table:table-cell>
          <table:table-cell table:style-name="ce74" office:value-type="currency" office:currency="CNY" office:value="500" calcext:value-type="currency">
            <text:p><text:s/>CNY 500.00 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74" office:value-type="currency" office:currency="CNY" office:value="0" calcext:value-type="currency">
            <text:p><text:s/>CNY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21]+[.BB21]+[.BC21]+[.BF21]+[.BG21]+[.BH21]+[.BL21])" office:value-type="currency" office:currency="CNY" office:value="2641.5" calcext:value-type="currency">
            <text:p><text:s/>CNY 2,641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21]*[.BP21])" office:value-type="currency" office:currency="USD" office:value="382.826086956522" calcext:value-type="currency">
            <text:p><text:s/>USD 382.83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style-name="ce105" table:formula="of:=2650" office:value-type="currency" office:currency="USD" office:value="2650" calcext:value-type="currency">
            <text:p><text:s/>USD 2,650.0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2" calcext:value-type="currency">
            <text:p><text:s/>USD 12.00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1:.CA21])" office:value-type="currency" office:currency="USD" office:value="2662" calcext:value-type="currency">
            <text:p><text:s/>USD 2,662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1]*[.CC21])" office:value-type="currency" office:currency="USD" office:value="2662" calcext:value-type="currency">
            <text:p><text:s/>USD 2,662.00 </text:p>
          </table:table-cell>
          <table:table-cell table:style-name="ce121" office:value-type="string" calcext:value-type="string">
            <text:p>BRL</text:p>
          </table:table-cell>
          <table:table-cell table:style-name="ce130" office:value-type="currency" office:currency="BRL" office:value="1805" calcext:value-type="currency">
            <text:p><text:s/>BRL 1,805.00 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style-name="ce130" office:value-type="currency" office:currency="BRL" office:value="667" calcext:value-type="currency">
            <text:p><text:s/>BRL 667.00 </text:p>
          </table:table-cell>
          <table:table-cell table:style-name="ce130" office:value-type="currency" office:currency="BRL" office:value="330" calcext:value-type="currency">
            <text:p><text:s/>BRL 330.00 </text:p>
          </table:table-cell>
          <table:table-cell table:style-name="ce138" office:value-type="string" calcext:value-type="string">
            <text:p>Drop off, Damage fee</text:p>
          </table:table-cell>
          <table:table-cell table:style-name="ce130" office:value-type="currency" office:currency="BRL" office:value="185" calcext:value-type="currency">
            <text:p><text:s/>BRL 185.00 </text:p>
          </table:table-cell>
          <table:table-cell table:style-name="ce138" office:value-type="string" calcext:value-type="string">
            <text:p>Desconsolidation &amp; Siscarga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0" office:value-type="currency" office:currency="BRL" office:value="100" calcext:value-type="currency">
            <text:p><text:s/>BRL 100.00 </text:p>
          </table:table-cell>
          <table:table-cell table:style-name="ce130" table:formula="of:=SUM([.CF21:.CO21])" office:value-type="currency" office:currency="BRL" office:value="3127" calcext:value-type="currency">
            <text:p><text:s/>BRL 3,127.00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P21]*[.CQ21]" office:value-type="currency" office:currency="USD" office:value="1002.24358974359" calcext:value-type="currency">
            <text:p><text:s/>USD 1,002.24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North Asia</text:p>
          </table:table-cell>
          <table:table-cell table:style-name="ce6" office:value-type="string" calcext:value-type="string">
            <text:p>Zhejiang Hailide New Materia</text:p>
          </table:table-cell>
          <table:table-cell table:style-name="ce6" office:value-type="string" calcext:value-type="string">
            <text:p>Maqiao Industrial Park of Haining</text:p>
          </table:table-cell>
          <table:table-cell table:style-name="ce7" office:value-type="string" calcext:value-type="string">
            <text:p>China</text:p>
          </table:table-cell>
          <table:table-cell table:style-name="ce6" office:value-type="string" calcext:value-type="string">
            <text:p>Zhejiang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hanghai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Port to Door</text:p>
          </table:table-cell>
          <table:table-cell table:style-name="ce29" office:value-type="string" calcext:value-type="string">
            <text:p>FOB</text:p>
          </table:table-cell>
          <table:table-cell table:style-name="ce32" office:value-type="float" office:value="38" calcext:value-type="float">
            <text:p>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2]" office:value-type="float" office:value="383.550724637681" calcext:value-type="float">
            <text:p><text:s/>$383.55 </text:p>
          </table:table-cell>
          <table:table-cell table:style-name="ce42" table:formula="of:=[.CD22]" office:value-type="float" office:value="2737" calcext:value-type="float">
            <text:p><text:s/>$2,737.00 </text:p>
          </table:table-cell>
          <table:table-cell table:style-name="ce42" table:formula="of:=[.CR22]" office:value-type="float" office:value="1015.0641025641" calcext:value-type="float">
            <text:p><text:s/>$1,015.0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/>
          <table:table-cell table:style-name="ce42" office:value-type="float" office:value="-750" calcext:value-type="float">
            <text:p><text:s/>$(750.00)</text:p>
          </table:table-cell>
          <table:table-cell table:style-name="ce41" table:formula="of:=[.AH22]" office:value-type="float" office:value="110" calcext:value-type="float">
            <text:p><text:s/>$11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22]" office:value-type="float" office:value="-750" calcext:value-type="float">
            <text:p><text:s/>$(750.00)</text:p>
          </table:table-cell>
          <table:table-cell table:style-name="ce47" table:formula="of:=SUM([.V22:.X22])" office:value-type="float" office:value="4135.61482720178" calcext:value-type="float">
            <text:p><text:s/>$4,135.61 </text:p>
          </table:table-cell>
          <table:table-cell table:style-name="ce47" table:formula="of:=[.V22]+[.W22]+[.X22]+[.AA22]" office:value-type="float" office:value="4635.61482720178" calcext:value-type="float">
            <text:p><text:s/>$4,635.61 </text:p>
          </table:table-cell>
          <table:table-cell table:style-name="ce47" table:formula="of:=[.AO22]" office:value-type="float" office:value="4635.61482720178" calcext:value-type="float">
            <text:p><text:s/>$4,635.61 </text:p>
          </table:table-cell>
          <table:table-cell table:style-name="ce47" table:formula="of:=[.AN22]+[.AE22]+[.AF22]+[.AG22]" office:value-type="float" office:value="4245.61482720178" calcext:value-type="float">
            <text:p><text:s/>$4,245.61 </text:p>
          </table:table-cell>
          <table:table-cell table:style-name="ce47" table:formula="of:=[.AN22]+[.AH22]+[.AI22]+[.AJ22]" office:value-type="float" office:value="3495.61482720178" calcext:value-type="float">
            <text:p><text:s/>$3,495.61 </text:p>
          </table:table-cell>
          <table:table-cell table:style-name="ce46" table:formula="of:=[.AK22]+[.AL22]+[.AM22]+[.BQ22]+[.CD22]+[.CR22]" office:value-type="float" office:value="3495.61482720178" calcext:value-type="float">
            <text:p><text:s/>$3,495.61 </text:p>
          </table:table-cell>
          <table:table-cell table:style-name="ce50" office:value-type="float" office:value="37" calcext:value-type="float">
            <text:p>37</text:p>
          </table:table-cell>
          <table:table-cell table:style-name="ce54" office:value-type="string" calcext:value-type="string">
            <text:p>SHANGHAI (SHA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4" calcext:value-type="float">
            <text:p><text:s/>USD884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3" calcext:value-type="float">
            <text:p><text:s/>USD883.00 </text:p>
          </table:table-cell>
          <table:table-cell table:style-name="ce66" office:value-type="float" office:value="109" calcext:value-type="float">
            <text:p><text:s/>USD109.00 </text:p>
          </table:table-cell>
          <table:table-cell table:style-name="ce66" office:value-type="float" office:value="62" calcext:value-type="float">
            <text:p><text:s/>USD62.00 </text:p>
          </table:table-cell>
          <table:table-cell table:style-name="ce74"/>
          <table:table-cell table:number-columns-repeated="2" table:style-name="ce74" office:value-type="currency" office:currency="CNY" office:value="1053" calcext:value-type="currency">
            <text:p><text:s/>CNY 1,053.00 </text:p>
          </table:table-cell>
          <table:table-cell table:style-name="ce74" office:value-type="currency" office:currency="CNY" office:value="186.5" calcext:value-type="currency">
            <text:p><text:s/>CNY 186.50 </text:p>
          </table:table-cell>
          <table:table-cell table:style-name="ce74" office:value-type="currency" office:currency="CNY" office:value="500" calcext:value-type="currency">
            <text:p><text:s/>CNY 500.00 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74" office:value-type="currency" office:currency="CNY" office:value="0" calcext:value-type="currency">
            <text:p><text:s/>CNY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currency" office:currency="CNY" office:value="0" calcext:value-type="currency">
            <text:p><text:s/>CNY -   </text:p>
          </table:table-cell>
          <table:table-cell table:style-name="ce91" table:formula="of:=SUM([.AZ22]+[.BB22]+[.BC22]+[.BF22]+[.BG22]+[.BH22]+[.BL22])" office:value-type="currency" office:currency="CNY" office:value="2646.5" calcext:value-type="currency">
            <text:p><text:s/>CNY 2,646.50 </text:p>
          </table:table-cell>
          <table:table-cell table:style-name="ce93" office:value-type="float" office:value="0.144927536231884" calcext:value-type="float">
            <text:p>0.145</text:p>
          </table:table-cell>
          <table:table-cell table:style-name="ce96" table:formula="of:=SUM([.BO22]*[.BP22])" office:value-type="currency" office:currency="USD" office:value="383.550724637681" calcext:value-type="currency">
            <text:p><text:s/>USD 383.55 </text:p>
          </table:table-cell>
          <table:table-cell table:style-name="ce100" office:value-type="string" calcext:value-type="string">
            <text:p>USD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table:formula="of:=2725" office:value-type="currency" office:currency="USD" office:value="2725" calcext:value-type="currency">
            <text:p><text:s/>USD 2,725.0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2" calcext:value-type="currency">
            <text:p><text:s/>USD 12.00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2:.CA22])" office:value-type="currency" office:currency="USD" office:value="2737" calcext:value-type="currency">
            <text:p><text:s/>USD 2,737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2]*[.CC22])" office:value-type="currency" office:currency="USD" office:value="2737" calcext:value-type="currency">
            <text:p><text:s/>USD 2,737.00 </text:p>
          </table:table-cell>
          <table:table-cell table:style-name="ce121" office:value-type="string" calcext:value-type="string">
            <text:p>BRL</text:p>
          </table:table-cell>
          <table:table-cell table:style-name="ce130" office:value-type="currency" office:currency="BRL" office:value="1805" calcext:value-type="currency">
            <text:p><text:s/>BRL 1,805.00 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style-name="ce130" office:value-type="currency" office:currency="BRL" office:value="667" calcext:value-type="currency">
            <text:p><text:s/>BRL 667.00 </text:p>
          </table:table-cell>
          <table:table-cell table:style-name="ce130" office:value-type="currency" office:currency="BRL" office:value="330" calcext:value-type="currency">
            <text:p><text:s/>BRL 330.00 </text:p>
          </table:table-cell>
          <table:table-cell table:style-name="ce138" office:value-type="string" calcext:value-type="string">
            <text:p>Drop off, Damage fee</text:p>
          </table:table-cell>
          <table:table-cell table:style-name="ce130" office:value-type="currency" office:currency="BRL" office:value="185" calcext:value-type="currency">
            <text:p><text:s/>BRL 185.00 </text:p>
          </table:table-cell>
          <table:table-cell table:style-name="ce138" office:value-type="string" calcext:value-type="string">
            <text:p>Desconsolidation &amp; Siscarga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0" office:value-type="currency" office:currency="BRL" office:value="100" calcext:value-type="currency">
            <text:p><text:s/>BRL 100.00 </text:p>
          </table:table-cell>
          <table:table-cell table:style-name="ce130" table:formula="of:=SUM([.CF22:.CO22])" office:value-type="currency" office:currency="BRL" office:value="3167" calcext:value-type="currency">
            <text:p><text:s/>BRL 3,167.00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P22]*[.CQ22]" office:value-type="currency" office:currency="USD" office:value="1015.0641025641" calcext:value-type="currency">
            <text:p><text:s/>USD 1,015.0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Rudloffstr.6, 99867 Gotha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Gotha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HAMBURG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3]" office:value-type="float" office:value="1289.98924731183" calcext:value-type="float">
            <text:p><text:s/>$1,289.99 </text:p>
          </table:table-cell>
          <table:table-cell table:style-name="ce42" table:formula="of:=[.CD23]" office:value-type="float" office:value="171.58" calcext:value-type="float">
            <text:p><text:s/>$171.58 </text:p>
          </table:table-cell>
          <table:table-cell table:style-name="ce42" table:formula="of:=[.CR23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" calcext:value-type="float">
            <text:p><text:s/>$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23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3:.X23])" office:value-type="float" office:value="1948.4282216708" calcext:value-type="float">
            <text:p><text:s/>$1,948.43 </text:p>
          </table:table-cell>
          <table:table-cell table:style-name="ce47" table:formula="of:=[.V23]+[.W23]+[.X23]+[.AA23]" office:value-type="float" office:value="1998.4282216708" calcext:value-type="float">
            <text:p><text:s/>$1,998.43 </text:p>
          </table:table-cell>
          <table:table-cell table:style-name="ce47" table:formula="of:=[.V23]+[.W23]" office:value-type="float" office:value="1461.56924731183" calcext:value-type="float">
            <text:p><text:s/>$1,461.57 </text:p>
          </table:table-cell>
          <table:table-cell table:style-name="ce47" table:formula="of:=[.AN23]+[.AE23]+[.AF23]+[.AG23]" office:value-type="float" office:value="2008.4282216708" calcext:value-type="float">
            <text:p><text:s/>$2,008.43 </text:p>
          </table:table-cell>
          <table:table-cell table:style-name="ce47" table:formula="of:=[.AN23]+[.AH23]+[.AI23]+[.AJ23]" office:value-type="float" office:value="2008.4282216708" calcext:value-type="float">
            <text:p><text:s/>$2,008.43 </text:p>
          </table:table-cell>
          <table:table-cell table:style-name="ce46" table:formula="of:=[.AK23]+[.AL23]+[.AM23]+[.BQ23]+[.CD23]+[.CR23]" office:value-type="float" office:value="2008.4282216708" calcext:value-type="float">
            <text:p><text:s/>$2,008.43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HAMBURG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5" calcext:value-type="float">
            <text:p><text:s/>USD885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4" calcext:value-type="float">
            <text:p><text:s/>USD884.00 </text:p>
          </table:table-cell>
          <table:table-cell table:style-name="ce66" office:value-type="float" office:value="110" calcext:value-type="float">
            <text:p><text:s/>USD110.00 </text:p>
          </table:table-cell>
          <table:table-cell table:style-name="ce66" office:value-type="float" office:value="63" calcext:value-type="float">
            <text:p><text:s/>USD63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34.69" calcext:value-type="currency">
            <text:p><text:s/>EUR 34.69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3]+[.BB23]+[.BC23]+[.BF23]+[.BG23]+[.BH23]+[.BL23])" office:value-type="currency" office:currency="CNY" office:value="1199.69" calcext:value-type="currency">
            <text:p><text:s/>CNY 1,199.69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3]*[.BP23])" office:value-type="currency" office:currency="USD" office:value="1289.98924731183" calcext:value-type="currency">
            <text:p><text:s/>USD 1,289.99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53.3" calcext:value-type="currency">
            <text:p><text:s/>USD 153.3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3:.CA23])" office:value-type="currency" office:currency="USD" office:value="171.58" calcext:value-type="currency">
            <text:p><text:s/>USD 171.5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3]*[.CC23])" office:value-type="currency" office:currency="USD" office:value="171.58" calcext:value-type="currency">
            <text:p><text:s/>USD 171.5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3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Rudloffstr.6, 99867 Gotha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Gotha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HAMBURG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4]" office:value-type="float" office:value="1330.51612903226" calcext:value-type="float">
            <text:p><text:s/>$1,330.52 </text:p>
          </table:table-cell>
          <table:table-cell table:style-name="ce42" table:formula="of:=[.CD24]" office:value-type="float" office:value="324.88" calcext:value-type="float">
            <text:p><text:s/>$324.88 </text:p>
          </table:table-cell>
          <table:table-cell table:style-name="ce42" table:formula="of:=[.CR24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24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4:.X24])" office:value-type="float" office:value="2142.25510339123" calcext:value-type="float">
            <text:p><text:s/>$2,142.26 </text:p>
          </table:table-cell>
          <table:table-cell table:style-name="ce47" table:formula="of:=[.V24]+[.W24]+[.X24]+[.AA24]" office:value-type="float" office:value="2242.25510339123" calcext:value-type="float">
            <text:p><text:s/>$2,242.26 </text:p>
          </table:table-cell>
          <table:table-cell table:style-name="ce47" table:formula="of:=[.V24]+[.W24]" office:value-type="float" office:value="1655.39612903226" calcext:value-type="float">
            <text:p><text:s/>$1,655.40 </text:p>
          </table:table-cell>
          <table:table-cell table:style-name="ce47" table:formula="of:=[.AN24]+[.AE24]+[.AF24]+[.AG24]" office:value-type="float" office:value="2262.25510339123" calcext:value-type="float">
            <text:p><text:s/>$2,262.26 </text:p>
          </table:table-cell>
          <table:table-cell table:style-name="ce47" table:formula="of:=[.AN24]+[.AH24]+[.AI24]+[.AJ24]" office:value-type="float" office:value="2262.25510339123" calcext:value-type="float">
            <text:p><text:s/>$2,262.26 </text:p>
          </table:table-cell>
          <table:table-cell table:style-name="ce46" table:formula="of:=[.AK24]+[.AL24]+[.AM24]+[.BQ24]+[.CD24]+[.CR24]" office:value-type="float" office:value="2262.25510339123" calcext:value-type="float">
            <text:p><text:s/>$2,262.26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HAMBURG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6" calcext:value-type="float">
            <text:p><text:s/>USD886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5" calcext:value-type="float">
            <text:p><text:s/>USD885.00 </text:p>
          </table:table-cell>
          <table:table-cell table:style-name="ce66" office:value-type="float" office:value="111" calcext:value-type="float">
            <text:p><text:s/>USD111.00 </text:p>
          </table:table-cell>
          <table:table-cell table:style-name="ce66" office:value-type="float" office:value="64" calcext:value-type="float">
            <text:p><text:s/>USD64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69.38" calcext:value-type="currency">
            <text:p><text:s/>EUR 69.38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4]+[.BB24]+[.BC24]+[.BF24]+[.BG24]+[.BH24]+[.BL24])" office:value-type="currency" office:currency="CNY" office:value="1237.38" calcext:value-type="currency">
            <text:p><text:s/>CNY 1,237.38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4]*[.BP24])" office:value-type="currency" office:currency="USD" office:value="1330.51612903226" calcext:value-type="currency">
            <text:p><text:s/>USD 1,330.52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306.6" calcext:value-type="currency">
            <text:p><text:s/>USD 306.6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4:.CA24])" office:value-type="currency" office:currency="USD" office:value="324.88" calcext:value-type="currency">
            <text:p><text:s/>USD 324.8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4]*[.CC24])" office:value-type="currency" office:currency="USD" office:value="324.88" calcext:value-type="currency">
            <text:p><text:s/>USD 324.8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4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JCL Logistics </text:p>
          </table:table-cell>
          <table:table-cell table:style-name="ce6" office:value-type="string" calcext:value-type="string">
            <text:p>Max-Planck-Str. 4 42477 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Radevormwald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HAMBURG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5]" office:value-type="float" office:value="1296.44086021505" calcext:value-type="float">
            <text:p><text:s/>$1,296.44 </text:p>
          </table:table-cell>
          <table:table-cell table:style-name="ce42" table:formula="of:=[.CD25]" office:value-type="float" office:value="171.58" calcext:value-type="float">
            <text:p><text:s/>$171.58 </text:p>
          </table:table-cell>
          <table:table-cell table:style-name="ce42" table:formula="of:=[.CR25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" calcext:value-type="float">
            <text:p><text:s/>$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25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5:.X25])" office:value-type="float" office:value="1954.87983457403" calcext:value-type="float">
            <text:p><text:s/>$1,954.88 </text:p>
          </table:table-cell>
          <table:table-cell table:style-name="ce47" table:formula="of:=[.V25]+[.W25]+[.X25]+[.AA25]" office:value-type="float" office:value="2004.87983457403" calcext:value-type="float">
            <text:p><text:s/>$2,004.88 </text:p>
          </table:table-cell>
          <table:table-cell table:style-name="ce47" table:formula="of:=[.V25]+[.W25]" office:value-type="float" office:value="1468.02086021505" calcext:value-type="float">
            <text:p><text:s/>$1,468.02 </text:p>
          </table:table-cell>
          <table:table-cell table:style-name="ce47" table:formula="of:=[.AN25]+[.AE25]+[.AF25]+[.AG25]" office:value-type="float" office:value="2014.87983457403" calcext:value-type="float">
            <text:p><text:s/>$2,014.88 </text:p>
          </table:table-cell>
          <table:table-cell table:style-name="ce47" table:formula="of:=[.AN25]+[.AH25]+[.AI25]+[.AJ25]" office:value-type="float" office:value="2014.87983457403" calcext:value-type="float">
            <text:p><text:s/>$2,014.88 </text:p>
          </table:table-cell>
          <table:table-cell table:style-name="ce46" table:formula="of:=[.AK25]+[.AL25]+[.AM25]+[.BQ25]+[.CD25]+[.CR25]" office:value-type="float" office:value="2014.87983457403" calcext:value-type="float">
            <text:p><text:s/>$2,014.88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HAMBURG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7" calcext:value-type="float">
            <text:p><text:s/>USD887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6" calcext:value-type="float">
            <text:p><text:s/>USD886.00 </text:p>
          </table:table-cell>
          <table:table-cell table:style-name="ce66" office:value-type="float" office:value="112" calcext:value-type="float">
            <text:p><text:s/>USD112.00 </text:p>
          </table:table-cell>
          <table:table-cell table:style-name="ce66" office:value-type="float" office:value="65" calcext:value-type="float">
            <text:p><text:s/>USD65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34.69" calcext:value-type="currency">
            <text:p><text:s/>EUR 34.69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5]+[.BB25]+[.BC25]+[.BF25]+[.BG25]+[.BH25]+[.BL25])" office:value-type="currency" office:currency="CNY" office:value="1205.69" calcext:value-type="currency">
            <text:p><text:s/>CNY 1,205.69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5]*[.BP25])" office:value-type="currency" office:currency="USD" office:value="1296.44086021505" calcext:value-type="currency">
            <text:p><text:s/>USD 1,296.44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53.3" calcext:value-type="currency">
            <text:p><text:s/>USD 153.3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5:.CA25])" office:value-type="currency" office:currency="USD" office:value="171.58" calcext:value-type="currency">
            <text:p><text:s/>USD 171.5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5]*[.CC25])" office:value-type="currency" office:currency="USD" office:value="171.58" calcext:value-type="currency">
            <text:p><text:s/>USD 171.5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5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JCL Logistics </text:p>
          </table:table-cell>
          <table:table-cell table:style-name="ce6" office:value-type="string" calcext:value-type="string">
            <text:p>Max-Planck-Str. 4 42477 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Radevormwald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HAMBURG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6]" office:value-type="float" office:value="1336.96774193548" calcext:value-type="float">
            <text:p><text:s/>$1,336.97 </text:p>
          </table:table-cell>
          <table:table-cell table:style-name="ce42" table:formula="of:=[.CD26]" office:value-type="float" office:value="324.88" calcext:value-type="float">
            <text:p><text:s/>$324.88 </text:p>
          </table:table-cell>
          <table:table-cell table:style-name="ce42" table:formula="of:=[.CR26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26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6:.X26])" office:value-type="float" office:value="2148.70671629446" calcext:value-type="float">
            <text:p><text:s/>$2,148.71 </text:p>
          </table:table-cell>
          <table:table-cell table:style-name="ce47" table:formula="of:=[.V26]+[.W26]+[.X26]+[.AA26]" office:value-type="float" office:value="2248.70671629446" calcext:value-type="float">
            <text:p><text:s/>$2,248.71 </text:p>
          </table:table-cell>
          <table:table-cell table:style-name="ce47" table:formula="of:=[.V26]+[.W26]" office:value-type="float" office:value="1661.84774193548" calcext:value-type="float">
            <text:p><text:s/>$1,661.85 </text:p>
          </table:table-cell>
          <table:table-cell table:style-name="ce47" table:formula="of:=[.AN26]+[.AE26]+[.AF26]+[.AG26]" office:value-type="float" office:value="2268.70671629446" calcext:value-type="float">
            <text:p><text:s/>$2,268.71 </text:p>
          </table:table-cell>
          <table:table-cell table:style-name="ce47" table:formula="of:=[.AN26]+[.AH26]+[.AI26]+[.AJ26]" office:value-type="float" office:value="2268.70671629446" calcext:value-type="float">
            <text:p><text:s/>$2,268.71 </text:p>
          </table:table-cell>
          <table:table-cell table:style-name="ce46" table:formula="of:=[.AK26]+[.AL26]+[.AM26]+[.BQ26]+[.CD26]+[.CR26]" office:value-type="float" office:value="2268.70671629446" calcext:value-type="float">
            <text:p><text:s/>$2,268.71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HAMBURG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8" calcext:value-type="float">
            <text:p><text:s/>USD888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7" calcext:value-type="float">
            <text:p><text:s/>USD887.00 </text:p>
          </table:table-cell>
          <table:table-cell table:style-name="ce66" office:value-type="float" office:value="113" calcext:value-type="float">
            <text:p><text:s/>USD113.00 </text:p>
          </table:table-cell>
          <table:table-cell table:style-name="ce66" office:value-type="float" office:value="66" calcext:value-type="float">
            <text:p><text:s/>USD66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69.38" calcext:value-type="currency">
            <text:p><text:s/>EUR 69.38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6]+[.BB26]+[.BC26]+[.BF26]+[.BG26]+[.BH26]+[.BL26])" office:value-type="currency" office:currency="CNY" office:value="1243.38" calcext:value-type="currency">
            <text:p><text:s/>CNY 1,243.38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6]*[.BP26])" office:value-type="currency" office:currency="USD" office:value="1336.96774193548" calcext:value-type="currency">
            <text:p><text:s/>USD 1,336.97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306.6" calcext:value-type="currency">
            <text:p><text:s/>USD 306.6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6:.CA26])" office:value-type="currency" office:currency="USD" office:value="324.88" calcext:value-type="currency">
            <text:p><text:s/>USD 324.8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6]*[.CC26])" office:value-type="currency" office:currency="USD" office:value="324.88" calcext:value-type="currency">
            <text:p><text:s/>USD 324.8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6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Mondi Inncoat Gmbh</text:p>
          </table:table-cell>
          <table:table-cell table:style-name="ce6" office:value-type="string" calcext:value-type="string">
            <text:p>Angerer Str. 25, D-83064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Raubling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HAMBURG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7]" office:value-type="float" office:value="1340.1935483871" calcext:value-type="float">
            <text:p><text:s/>$1,340.19 </text:p>
          </table:table-cell>
          <table:table-cell table:style-name="ce42" table:formula="of:=[.CD27]" office:value-type="float" office:value="324.88" calcext:value-type="float">
            <text:p><text:s/>$324.88 </text:p>
          </table:table-cell>
          <table:table-cell table:style-name="ce42" table:formula="of:=[.CR27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27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7:.X27])" office:value-type="float" office:value="2151.93252274607" calcext:value-type="float">
            <text:p><text:s/>$2,151.93 </text:p>
          </table:table-cell>
          <table:table-cell table:style-name="ce47" table:formula="of:=[.V27]+[.W27]+[.X27]+[.AA27]" office:value-type="float" office:value="2251.93252274607" calcext:value-type="float">
            <text:p><text:s/>$2,251.93 </text:p>
          </table:table-cell>
          <table:table-cell table:style-name="ce47" table:formula="of:=[.V27]+[.W27]" office:value-type="float" office:value="1665.0735483871" calcext:value-type="float">
            <text:p><text:s/>$1,665.07 </text:p>
          </table:table-cell>
          <table:table-cell table:style-name="ce47" table:formula="of:=[.AN27]+[.AE27]+[.AF27]+[.AG27]" office:value-type="float" office:value="2271.93252274607" calcext:value-type="float">
            <text:p><text:s/>$2,271.93 </text:p>
          </table:table-cell>
          <table:table-cell table:style-name="ce47" table:formula="of:=[.AN27]+[.AH27]+[.AI27]+[.AJ27]" office:value-type="float" office:value="2271.93252274607" calcext:value-type="float">
            <text:p><text:s/>$2,271.93 </text:p>
          </table:table-cell>
          <table:table-cell table:style-name="ce46" table:formula="of:=[.AK27]+[.AL27]+[.AM27]+[.BQ27]+[.CD27]+[.CR27]" office:value-type="float" office:value="2271.93252274607" calcext:value-type="float">
            <text:p><text:s/>$2,271.93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HAMBURG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89" calcext:value-type="float">
            <text:p><text:s/>USD889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8" calcext:value-type="float">
            <text:p><text:s/>USD888.00 </text:p>
          </table:table-cell>
          <table:table-cell table:style-name="ce66" office:value-type="float" office:value="114" calcext:value-type="float">
            <text:p><text:s/>USD114.00 </text:p>
          </table:table-cell>
          <table:table-cell table:style-name="ce66" office:value-type="float" office:value="67" calcext:value-type="float">
            <text:p><text:s/>USD67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69.38" calcext:value-type="currency">
            <text:p><text:s/>EUR 69.38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7]+[.BB27]+[.BC27]+[.BF27]+[.BG27]+[.BH27]+[.BL27])" office:value-type="currency" office:currency="CNY" office:value="1246.38" calcext:value-type="currency">
            <text:p><text:s/>CNY 1,246.38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7]*[.BP27])" office:value-type="currency" office:currency="USD" office:value="1340.1935483871" calcext:value-type="currency">
            <text:p><text:s/>USD 1,340.19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306.6" calcext:value-type="currency">
            <text:p><text:s/>USD 306.6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7:.CA27])" office:value-type="currency" office:currency="USD" office:value="324.88" calcext:value-type="currency">
            <text:p><text:s/>USD 324.8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7]*[.CC27])" office:value-type="currency" office:currency="USD" office:value="324.88" calcext:value-type="currency">
            <text:p><text:s/>USD 324.8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7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In der Graslake 49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Schwelm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8]" office:value-type="float" office:value="1306.11827956989" calcext:value-type="float">
            <text:p><text:s/>$1,306.12 </text:p>
          </table:table-cell>
          <table:table-cell table:style-name="ce42" table:formula="of:=[.CD28]" office:value-type="float" office:value="171.58" calcext:value-type="float">
            <text:p><text:s/>$171.58 </text:p>
          </table:table-cell>
          <table:table-cell table:style-name="ce42" table:formula="of:=[.CR28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" calcext:value-type="float">
            <text:p><text:s/>$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28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8:.X28])" office:value-type="float" office:value="1964.55725392887" calcext:value-type="float">
            <text:p><text:s/>$1,964.56 </text:p>
          </table:table-cell>
          <table:table-cell table:style-name="ce47" table:formula="of:=[.V28]+[.W28]+[.X28]+[.AA28]" office:value-type="float" office:value="2014.55725392886" calcext:value-type="float">
            <text:p><text:s/>$2,014.56 </text:p>
          </table:table-cell>
          <table:table-cell table:style-name="ce47" table:formula="of:=[.V28]+[.W28]" office:value-type="float" office:value="1477.69827956989" calcext:value-type="float">
            <text:p><text:s/>$1,477.70 </text:p>
          </table:table-cell>
          <table:table-cell table:style-name="ce47" table:formula="of:=[.AN28]+[.AE28]+[.AF28]+[.AG28]" office:value-type="float" office:value="2024.55725392887" calcext:value-type="float">
            <text:p><text:s/>$2,024.56 </text:p>
          </table:table-cell>
          <table:table-cell table:style-name="ce47" table:formula="of:=[.AN28]+[.AH28]+[.AI28]+[.AJ28]" office:value-type="float" office:value="2024.55725392887" calcext:value-type="float">
            <text:p><text:s/>$2,024.56 </text:p>
          </table:table-cell>
          <table:table-cell table:style-name="ce46" table:formula="of:=[.AK28]+[.AL28]+[.AM28]+[.BQ28]+[.CD28]+[.CR28]" office:value-type="float" office:value="2024.55725392887" calcext:value-type="float">
            <text:p><text:s/>$2,024.56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BEAN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0" calcext:value-type="float">
            <text:p><text:s/>USD89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89" calcext:value-type="float">
            <text:p><text:s/>USD889.00 </text:p>
          </table:table-cell>
          <table:table-cell table:style-name="ce66" office:value-type="float" office:value="115" calcext:value-type="float">
            <text:p><text:s/>USD115.00 </text:p>
          </table:table-cell>
          <table:table-cell table:style-name="ce66" office:value-type="float" office:value="68" calcext:value-type="float">
            <text:p><text:s/>USD68.00 </text:p>
          </table:table-cell>
          <table:table-cell table:style-name="ce76"/>
          <table:table-cell table:number-columns-repeated="2" table:style-name="ce82" office:value-type="currency" office:currency="EUR" office:value="220" calcext:value-type="currency">
            <text:p><text:s/>EUR 220.00 </text:p>
          </table:table-cell>
          <table:table-cell table:style-name="ce82" office:value-type="currency" office:currency="EUR" office:value="34.69" calcext:value-type="currency">
            <text:p><text:s/>EUR 34.69 </text:p>
          </table:table-cell>
          <table:table-cell table:style-name="ce82" office:value-type="currency" office:currency="EUR" office:value="35" calcext:value-type="currency">
            <text:p><text:s/>EUR 35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number-columns-repeated="2" table:style-name="ce82" office:value-type="currency" office:currency="EUR" office:value="0" calcext:value-type="currency">
            <text:p><text:s/>EUR -  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28]+[.BB28]+[.BC28]+[.BF28]+[.BG28]+[.BH28]+[.BL28])" office:value-type="currency" office:currency="CNY" office:value="1214.69" calcext:value-type="currency">
            <text:p><text:s/>CNY 1,214.69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8]*[.BP28])" office:value-type="currency" office:currency="USD" office:value="1306.11827956989" calcext:value-type="currency">
            <text:p><text:s/>USD 1,306.12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53.3" calcext:value-type="currency">
            <text:p><text:s/>USD 153.30 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currency" office:currency="USD" office:value="0" calcext:value-type="currency">
            <text:p><text:s/>USD -  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0" calcext:value-type="currency">
            <text:p><text:s/>USD -   </text:p>
          </table:table-cell>
          <table:table-cell table:style-name="ce114" table:formula="of:=SUM([.BT28:.CA28])" office:value-type="currency" office:currency="USD" office:value="171.58" calcext:value-type="currency">
            <text:p><text:s/>USD 171.5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8]*[.CC28])" office:value-type="currency" office:currency="USD" office:value="171.58" calcext:value-type="currency">
            <text:p><text:s/>USD 171.5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8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In der Graslake 49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string" calcext:value-type="string">
            <text:p>Schwelm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4" calcext:value-type="float">
            <text:p>24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29]" office:value-type="float" office:value="1425.8064516129" calcext:value-type="float">
            <text:p><text:s/>$1,425.81 </text:p>
          </table:table-cell>
          <table:table-cell table:style-name="ce42" table:formula="of:=[.CD29]" office:value-type="float" office:value="2784.88" calcext:value-type="float">
            <text:p><text:s/>$2,784.88 </text:p>
          </table:table-cell>
          <table:table-cell table:style-name="ce42" table:formula="of:=[.CR29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29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29:.X29])" office:value-type="float" office:value="4697.54542597188" calcext:value-type="float">
            <text:p><text:s/>$4,697.55 </text:p>
          </table:table-cell>
          <table:table-cell table:style-name="ce47" table:formula="of:=[.V29]+[.W29]+[.X29]+[.AA29]" office:value-type="float" office:value="4797.54542597188" calcext:value-type="float">
            <text:p><text:s/>$4,797.55 </text:p>
          </table:table-cell>
          <table:table-cell table:style-name="ce47" table:formula="of:=[.V29]+[.W29]" office:value-type="float" office:value="4210.6864516129" calcext:value-type="float">
            <text:p><text:s/>$4,210.69 </text:p>
          </table:table-cell>
          <table:table-cell table:style-name="ce47" table:formula="of:=[.AN29]+[.AE29]+[.AF29]+[.AG29]" office:value-type="float" office:value="4817.54542597188" calcext:value-type="float">
            <text:p><text:s/>$4,817.55 </text:p>
          </table:table-cell>
          <table:table-cell table:style-name="ce47" table:formula="of:=[.AN29]+[.AH29]+[.AI29]+[.AJ29]" office:value-type="float" office:value="4817.54542597188" calcext:value-type="float">
            <text:p><text:s/>$4,817.55 </text:p>
          </table:table-cell>
          <table:table-cell table:style-name="ce46" table:formula="of:=[.AK29]+[.AL29]+[.AM29]+[.BQ29]+[.CD29]+[.CR29]" office:value-type="float" office:value="4817.54542597188" calcext:value-type="float">
            <text:p><text:s/>$4,817.55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BEAN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1" calcext:value-type="float">
            <text:p><text:s/>USD891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0" calcext:value-type="float">
            <text:p><text:s/>USD890.00 </text:p>
          </table:table-cell>
          <table:table-cell table:style-name="ce66" office:value-type="float" office:value="116" calcext:value-type="float">
            <text:p><text:s/>USD116.00 </text:p>
          </table:table-cell>
          <table:table-cell table:style-name="ce66" office:value-type="float" office:value="69" calcext:value-type="float">
            <text:p><text:s/>USD69.00 </text:p>
          </table:table-cell>
          <table:table-cell table:style-name="ce76"/>
          <table:table-cell table:number-columns-repeated="2" table:style-name="ce80" office:value-type="currency" office:currency="USD" office:value="146" calcext:value-type="currency">
            <text:p><text:s/>USD 146.00 </text:p>
          </table:table-cell>
          <table:table-cell table:style-name="ce80" office:value-type="currency" office:currency="USD" office:value="36" calcext:value-type="currency">
            <text:p><text:s/>USD 36.00 </text:p>
          </table:table-cell>
          <table:table-cell table:style-name="ce80" office:value-type="currency" office:currency="USD" office:value="16" calcext:value-type="currency">
            <text:p><text:s/>USD 16.00 </text:p>
          </table:table-cell>
          <table:table-cell table:style-name="ce82" office:value-type="currency" office:currency="EUR" office:value="25" calcext:value-type="currency">
            <text:p><text:s/>EUR 25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0" calcext:value-type="currency">
            <text:p><text:s/>EUR 2,600.00 </text:p>
          </table:table-cell>
          <table:table-cell table:style-name="ce82" office:value-type="currency" office:currency="EUR" office:value="200" calcext:value-type="currency">
            <text:p><text:s/>EUR 200.00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20" calcext:value-type="currency">
            <text:p><text:s/>EUR 20.00 </text:p>
          </table:table-cell>
          <table:table-cell table:style-name="ce91" table:formula="of:=SUM([.AZ29]+[.BB29]+[.BC29]+[.BF29]+[.BG29]+[.BH29]+[.BL29])" office:value-type="currency" office:currency="CNY" office:value="1326" calcext:value-type="currency">
            <text:p><text:s/>CNY 1,326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29]*[.BP29])" office:value-type="currency" office:currency="USD" office:value="1425.8064516129" calcext:value-type="currency">
            <text:p><text:s/>USD 1,425.81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306.6" calcext:value-type="currency">
            <text:p><text:s/>USD 306.60 </text:p>
          </table:table-cell>
          <table:table-cell table:style-name="ce105" office:value-type="currency" office:currency="USD" office:value="220" calcext:value-type="currency">
            <text:p><text:s/>USD 220.00 </text:p>
          </table:table-cell>
          <table:table-cell table:style-name="ce105" office:value-type="currency" office:currency="USD" office:value="18.28" calcext:value-type="currency">
            <text:p><text:s/>USD 18.28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0" calcext:value-type="currency">
            <text:p><text:s/>USD 2,210.00 </text:p>
          </table:table-cell>
          <table:table-cell table:style-name="ce105" office:value-type="currency" office:currency="USD" office:value="10" calcext:value-type="currency">
            <text:p><text:s/>USD 10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0" calcext:value-type="currency">
            <text:p><text:s/>USD 20.00 </text:p>
          </table:table-cell>
          <table:table-cell table:style-name="ce114" table:formula="of:=SUM([.BT29:.CA29])" office:value-type="currency" office:currency="USD" office:value="2784.88" calcext:value-type="currency">
            <text:p><text:s/>USD 2,784.88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29]*[.CC29])" office:value-type="currency" office:currency="USD" office:value="2784.88" calcext:value-type="currency">
            <text:p><text:s/>USD 2,784.88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29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Mondoplastico S.P.A.</text:p>
          </table:table-cell>
          <table:table-cell table:style-name="ce6" office:value-type="string" calcext:value-type="string">
            <text:p>Via Del Bosco, 28 21052</text:p>
          </table:table-cell>
          <table:table-cell table:style-name="ce7" office:value-type="string" calcext:value-type="string">
            <text:p>Italy</text:p>
          </table:table-cell>
          <table:table-cell table:style-name="ce6" office:value-type="string" calcext:value-type="string">
            <text:p>Busto Arsizio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GENOA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5" calcext:value-type="float">
            <text:p>25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0" office:value-type="string" calcext:value-type="string">
            <text:p>20RF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0]" office:value-type="float" office:value="1433.33333333333" calcext:value-type="float">
            <text:p><text:s/>$1,433.33 </text:p>
          </table:table-cell>
          <table:table-cell table:style-name="ce42" table:formula="of:=[.CD30]" office:value-type="float" office:value="3556.9" calcext:value-type="float">
            <text:p><text:s/>$3,556.90 </text:p>
          </table:table-cell>
          <table:table-cell table:style-name="ce42" table:formula="of:=[.CR30]" office:value-type="float" office:value="432.692307692308" calcext:value-type="float">
            <text:p><text:s/>$432.6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30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0:.X30])" office:value-type="float" office:value="5422.92564102564" calcext:value-type="float">
            <text:p><text:s/>$5,422.93 </text:p>
          </table:table-cell>
          <table:table-cell table:style-name="ce47" table:formula="of:=[.V30]+[.W30]+[.X30]+[.AA30]" office:value-type="float" office:value="5422.92564102564" calcext:value-type="float">
            <text:p><text:s/>$5,422.93 </text:p>
          </table:table-cell>
          <table:table-cell table:style-name="ce47" table:formula="of:=[.AO30]" office:value-type="float" office:value="5422.92564102564" calcext:value-type="float">
            <text:p><text:s/>$5,422.93 </text:p>
          </table:table-cell>
          <table:table-cell table:style-name="ce47" table:formula="of:=[.AN30]+[.AE30]+[.AF30]+[.AG30]" office:value-type="float" office:value="5482.92564102564" calcext:value-type="float">
            <text:p><text:s/>$5,482.93 </text:p>
          </table:table-cell>
          <table:table-cell table:style-name="ce47" table:formula="of:=[.AN30]+[.AH30]+[.AI30]+[.AJ30]" office:value-type="float" office:value="5482.92564102564" calcext:value-type="float">
            <text:p><text:s/>$5,482.93 </text:p>
          </table:table-cell>
          <table:table-cell table:style-name="ce46" table:formula="of:=[.AK30]+[.AL30]+[.AM30]+[.BQ30]+[.CD30]+[.CR30]" office:value-type="float" office:value="5482.92564102564" calcext:value-type="float">
            <text:p><text:s/>$5,482.93 </text:p>
          </table:table-cell>
          <table:table-cell table:style-name="ce50" office:value-type="float" office:value="28" calcext:value-type="float">
            <text:p>28</text:p>
          </table:table-cell>
          <table:table-cell table:style-name="ce54" office:value-type="string" calcext:value-type="string">
            <text:p>GENOA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2" calcext:value-type="float">
            <text:p><text:s/>USD892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1" calcext:value-type="float">
            <text:p><text:s/>USD891.00 </text:p>
          </table:table-cell>
          <table:table-cell table:style-name="ce66" office:value-type="float" office:value="117" calcext:value-type="float">
            <text:p><text:s/>USD117.00 </text:p>
          </table:table-cell>
          <table:table-cell table:style-name="ce66" office:value-type="float" office:value="70" calcext:value-type="float">
            <text:p><text:s/>USD70.00 </text:p>
          </table:table-cell>
          <table:table-cell table:style-name="ce76"/>
          <table:table-cell table:number-columns-repeated="2" table:style-name="ce80" office:value-type="currency" office:currency="USD" office:value="147" calcext:value-type="currency">
            <text:p><text:s/>USD 147.00 </text:p>
          </table:table-cell>
          <table:table-cell table:style-name="ce80" office:value-type="currency" office:currency="USD" office:value="37" calcext:value-type="currency">
            <text:p><text:s/>USD 37.00 </text:p>
          </table:table-cell>
          <table:table-cell table:style-name="ce80" office:value-type="currency" office:currency="USD" office:value="17" calcext:value-type="currency">
            <text:p><text:s/>USD 17.00 </text:p>
          </table:table-cell>
          <table:table-cell table:style-name="ce82" office:value-type="currency" office:currency="EUR" office:value="65" calcext:value-type="currency">
            <text:p><text:s/>EUR 65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1" calcext:value-type="currency">
            <text:p><text:s/>EUR 2,601.00 </text:p>
          </table:table-cell>
          <table:table-cell table:style-name="ce82" office:value-type="currency" office:currency="EUR" office:value="201" calcext:value-type="currency">
            <text:p><text:s/>EUR 201.00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80" calcext:value-type="currency">
            <text:p><text:s/>EUR 80.00 </text:p>
          </table:table-cell>
          <table:table-cell table:style-name="ce91" table:formula="of:=SUM([.AZ30]+[.BB30]+[.BC30]+[.BF30]+[.BG30]+[.BH30]+[.BL30])" office:value-type="currency" office:currency="CNY" office:value="1333" calcext:value-type="currency">
            <text:p><text:s/>CNY 1,333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30]*[.BP30])" office:value-type="currency" office:currency="USD" office:value="1433.33333333333" calcext:value-type="currency">
            <text:p><text:s/>USD 1,433.33 </text:p>
          </table:table-cell>
          <table:table-cell table:style-name="ce100" office:value-type="string" calcext:value-type="string">
            <text:p>USD</text:p>
          </table:table-cell>
          <table:table-cell table:style-name="ce105" office:value-type="currency" office:currency="USD" office:value="1180" calcext:value-type="currency">
            <text:p><text:s/>USD 1,180.00 </text:p>
          </table:table-cell>
          <table:table-cell table:style-name="ce105" office:value-type="currency" office:currency="USD" office:value="1080" calcext:value-type="currency">
            <text:p><text:s/>USD 1,080.00 </text:p>
          </table:table-cell>
          <table:table-cell table:style-name="ce105" office:value-type="currency" office:currency="USD" office:value="221" calcext:value-type="currency">
            <text:p><text:s/>USD 221.00 </text:p>
          </table:table-cell>
          <table:table-cell table:style-name="ce105" office:value-type="currency" office:currency="USD" office:value="12.9" calcext:value-type="currency">
            <text:p><text:s/>USD 12.9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1" calcext:value-type="currency">
            <text:p><text:s/>USD 2,211.00 </text:p>
          </table:table-cell>
          <table:table-cell table:style-name="ce105" office:value-type="currency" office:currency="USD" office:value="11" calcext:value-type="currency">
            <text:p><text:s/>USD 11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1" calcext:value-type="currency">
            <text:p><text:s/>USD 21.00 </text:p>
          </table:table-cell>
          <table:table-cell table:style-name="ce114" table:formula="of:=SUM([.BT30:.CA30])" office:value-type="currency" office:currency="USD" office:value="3556.9" calcext:value-type="currency">
            <text:p><text:s/>USD 3,556.9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0]*[.CC30])" office:value-type="currency" office:currency="USD" office:value="3556.9" calcext:value-type="currency">
            <text:p><text:s/>USD 3,556.9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32.692307692308" calcext:value-type="currency">
            <text:p><text:s/>USD 432.6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0]" office:value-type="currency" office:currency="USD" office:value="432.692307692308" calcext:value-type="currency">
            <text:p><text:s/>USD 432.6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Mondoplastico S.P.A.</text:p>
          </table:table-cell>
          <table:table-cell table:style-name="ce6" office:value-type="string" calcext:value-type="string">
            <text:p>Via Del Bosco, 28 21052</text:p>
          </table:table-cell>
          <table:table-cell table:style-name="ce7" office:value-type="string" calcext:value-type="string">
            <text:p>Italy</text:p>
          </table:table-cell>
          <table:table-cell table:style-name="ce6" office:value-type="string" calcext:value-type="string">
            <text:p>Busto Arsizio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GENOA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RF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1]" office:value-type="float" office:value="1440.86021505376" calcext:value-type="float">
            <text:p><text:s/>$1,440.86 </text:p>
          </table:table-cell>
          <table:table-cell table:style-name="ce42" table:formula="of:=[.CD31]" office:value-type="float" office:value="4205.2" calcext:value-type="float">
            <text:p><text:s/>$4,205.20 </text:p>
          </table:table-cell>
          <table:table-cell table:style-name="ce42" table:formula="of:=[.CR31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31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1:.X31])" office:value-type="float" office:value="6132.91918941274" calcext:value-type="float">
            <text:p><text:s/>$6,132.92 </text:p>
          </table:table-cell>
          <table:table-cell table:style-name="ce47" table:formula="of:=[.V31]+[.W31]+[.X31]+[.AA31]" office:value-type="float" office:value="6132.91918941274" calcext:value-type="float">
            <text:p><text:s/>$6,132.92 </text:p>
          </table:table-cell>
          <table:table-cell table:style-name="ce47" table:formula="of:=[.AO31]" office:value-type="float" office:value="6132.91918941274" calcext:value-type="float">
            <text:p><text:s/>$6,132.92 </text:p>
          </table:table-cell>
          <table:table-cell table:style-name="ce47" table:formula="of:=[.AN31]+[.AE31]+[.AF31]+[.AG31]" office:value-type="float" office:value="6252.91918941274" calcext:value-type="float">
            <text:p><text:s/>$6,252.92 </text:p>
          </table:table-cell>
          <table:table-cell table:style-name="ce47" table:formula="of:=[.AN31]+[.AH31]+[.AI31]+[.AJ31]" office:value-type="float" office:value="6252.91918941274" calcext:value-type="float">
            <text:p><text:s/>$6,252.92 </text:p>
          </table:table-cell>
          <table:table-cell table:style-name="ce46" table:formula="of:=[.AK31]+[.AL31]+[.AM31]+[.BQ31]+[.CD31]+[.CR31]" office:value-type="float" office:value="6252.91918941274" calcext:value-type="float">
            <text:p><text:s/>$6,252.92 </text:p>
          </table:table-cell>
          <table:table-cell table:style-name="ce50" office:value-type="float" office:value="26" calcext:value-type="float">
            <text:p>26</text:p>
          </table:table-cell>
          <table:table-cell table:style-name="ce54" office:value-type="string" calcext:value-type="string">
            <text:p>GENOA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3" calcext:value-type="float">
            <text:p><text:s/>USD893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2" calcext:value-type="float">
            <text:p><text:s/>USD892.00 </text:p>
          </table:table-cell>
          <table:table-cell table:style-name="ce66" office:value-type="float" office:value="118" calcext:value-type="float">
            <text:p><text:s/>USD118.00 </text:p>
          </table:table-cell>
          <table:table-cell table:style-name="ce66" office:value-type="float" office:value="71" calcext:value-type="float">
            <text:p><text:s/>USD71.00 </text:p>
          </table:table-cell>
          <table:table-cell table:style-name="ce76"/>
          <table:table-cell table:number-columns-repeated="2" table:style-name="ce80" office:value-type="currency" office:currency="USD" office:value="148" calcext:value-type="currency">
            <text:p><text:s/>USD 148.00 </text:p>
          </table:table-cell>
          <table:table-cell table:style-name="ce80" office:value-type="currency" office:currency="USD" office:value="38" calcext:value-type="currency">
            <text:p><text:s/>USD 38.00 </text:p>
          </table:table-cell>
          <table:table-cell table:style-name="ce80" office:value-type="currency" office:currency="USD" office:value="18" calcext:value-type="currency">
            <text:p><text:s/>USD 18.00 </text:p>
          </table:table-cell>
          <table:table-cell table:style-name="ce82" office:value-type="currency" office:currency="EUR" office:value="65" calcext:value-type="currency">
            <text:p><text:s/>EUR 65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2" calcext:value-type="currency">
            <text:p><text:s/>EUR 2,602.00 </text:p>
          </table:table-cell>
          <table:table-cell table:style-name="ce82" office:value-type="currency" office:currency="EUR" office:value="202" calcext:value-type="currency">
            <text:p><text:s/>EUR 202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3" calcext:value-type="currency">
            <text:p><text:s/>USD 73.00 </text:p>
          </table:table-cell>
          <table:table-cell table:style-name="ce91" table:formula="of:=SUM([.AZ31]+[.BB31]+[.BC31]+[.BF31]+[.BG31]+[.BH31]+[.BL31])" office:value-type="currency" office:currency="CNY" office:value="1340" calcext:value-type="currency">
            <text:p><text:s/>CNY 1,340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31]*[.BP31])" office:value-type="currency" office:currency="USD" office:value="1440.86021505376" calcext:value-type="currency">
            <text:p><text:s/>USD 1,440.86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720" calcext:value-type="currency">
            <text:p><text:s/>USD 1,720.00 </text:p>
          </table:table-cell>
          <table:table-cell table:style-name="ce105" office:value-type="currency" office:currency="USD" office:value="222" calcext:value-type="currency">
            <text:p><text:s/>USD 222.00 </text:p>
          </table:table-cell>
          <table:table-cell table:style-name="ce105" office:value-type="currency" office:currency="USD" office:value="17.2" calcext:value-type="currency">
            <text:p><text:s/>USD 17.20 </text:p>
          </table:table-cell>
          <table:table-cell table:style-name="ce109" office:value-type="string" calcext:value-type="string">
            <text:p>CFS</text:p>
          </table:table-cell>
          <table:table-cell table:style-name="ce105" office:value-type="currency" office:currency="USD" office:value="2212" calcext:value-type="currency">
            <text:p><text:s/>USD 2,212.00 </text:p>
          </table:table-cell>
          <table:table-cell table:style-name="ce105" office:value-type="currency" office:currency="USD" office:value="12" calcext:value-type="currency">
            <text:p><text:s/>USD 12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" calcext:value-type="currency">
            <text:p><text:s/>USD 22.00 </text:p>
          </table:table-cell>
          <table:table-cell table:style-name="ce114" table:formula="of:=SUM([.BT31:.CA31])" office:value-type="currency" office:currency="USD" office:value="4205.2" calcext:value-type="currency">
            <text:p><text:s/>USD 4,205.2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1]*[.CC31])" office:value-type="currency" office:currency="USD" office:value="4205.2" calcext:value-type="currency">
            <text:p><text:s/>USD 4,205.20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1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Zone Industrielle PED - BP 38</text:p>
          </table:table-cell>
          <table:table-cell table:style-name="ce7" office:value-type="string" calcext:value-type="string">
            <text:p>Luxembourg</text:p>
          </table:table-cell>
          <table:table-cell table:style-name="ce6" office:value-type="string" calcext:value-type="string">
            <text:p>Rodange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2" calcext:value-type="float">
            <text:p>22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2]" office:value-type="float" office:value="1278.49462365591" calcext:value-type="float">
            <text:p><text:s/>$1,278.49 </text:p>
          </table:table-cell>
          <table:table-cell table:style-name="ce42" table:formula="of:=[.CD32]" office:value-type="float" office:value="2688.13" calcext:value-type="float">
            <text:p><text:s/>$2,688.13 </text:p>
          </table:table-cell>
          <table:table-cell table:style-name="ce42" table:formula="of:=[.CR32]" office:value-type="float" office:value="478.205128205128" calcext:value-type="float">
            <text:p><text:s/>$478.21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" calcext:value-type="float">
            <text:p><text:s/>$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32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2:.X32])" office:value-type="float" office:value="4444.82975186104" calcext:value-type="float">
            <text:p><text:s/>$4,444.83 </text:p>
          </table:table-cell>
          <table:table-cell table:style-name="ce47" table:formula="of:=[.V32]+[.W32]+[.X32]+[.AA32]" office:value-type="float" office:value="4494.82975186104" calcext:value-type="float">
            <text:p><text:s/>$4,494.83 </text:p>
          </table:table-cell>
          <table:table-cell table:style-name="ce47" table:formula="of:=[.V32]+[.W32]" office:value-type="float" office:value="3966.62462365591" calcext:value-type="float">
            <text:p><text:s/>$3,966.62 </text:p>
          </table:table-cell>
          <table:table-cell table:style-name="ce47" table:formula="of:=[.AN32]+[.AE32]+[.AF32]+[.AG32]" office:value-type="float" office:value="4504.82975186104" calcext:value-type="float">
            <text:p><text:s/>$4,504.83 </text:p>
          </table:table-cell>
          <table:table-cell table:style-name="ce47" table:formula="of:=[.AN32]+[.AH32]+[.AI32]+[.AJ32]" office:value-type="float" office:value="4504.82975186104" calcext:value-type="float">
            <text:p><text:s/>$4,504.83 </text:p>
          </table:table-cell>
          <table:table-cell table:style-name="ce46" table:formula="of:=[.AK32]+[.AL32]+[.AM32]+[.BQ32]+[.CD32]+[.CR32]" office:value-type="float" office:value="4504.82975186104" calcext:value-type="float">
            <text:p><text:s/>$4,504.83 </text:p>
          </table:table-cell>
          <table:table-cell table:style-name="ce50" office:value-type="float" office:value="19" calcext:value-type="float">
            <text:p>19</text:p>
          </table:table-cell>
          <table:table-cell table:style-name="ce54" office:value-type="string" calcext:value-type="string">
            <text:p>BEAN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4" calcext:value-type="float">
            <text:p><text:s/>USD894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3" calcext:value-type="float">
            <text:p><text:s/>USD893.00 </text:p>
          </table:table-cell>
          <table:table-cell table:style-name="ce66" office:value-type="float" office:value="119" calcext:value-type="float">
            <text:p><text:s/>USD119.00 </text:p>
          </table:table-cell>
          <table:table-cell table:style-name="ce66" office:value-type="float" office:value="72" calcext:value-type="float">
            <text:p><text:s/>USD72.00 </text:p>
          </table:table-cell>
          <table:table-cell table:style-name="ce76"/>
          <table:table-cell table:number-columns-repeated="2" table:style-name="ce80" office:value-type="currency" office:currency="USD" office:value="149" calcext:value-type="currency">
            <text:p><text:s/>USD 149.00 </text:p>
          </table:table-cell>
          <table:table-cell table:style-name="ce80" office:value-type="currency" office:currency="USD" office:value="39" calcext:value-type="currency">
            <text:p><text:s/>USD 39.00 </text:p>
          </table:table-cell>
          <table:table-cell table:style-name="ce80" office:value-type="currency" office:currency="USD" office:value="19" calcext:value-type="currency">
            <text:p><text:s/>USD 19.00 </text:p>
          </table:table-cell>
          <table:table-cell table:style-name="ce82" office:value-type="currency" office:currency="EUR" office:value="55" calcext:value-type="currency">
            <text:p><text:s/>EUR 55.00 </text:p>
          </table:table-cell>
          <table:table-cell table:style-name="ce85" office:value-type="string" calcext:value-type="string">
            <text:p>Left Bank Surcharge </text:p>
          </table:table-cell>
          <table:table-cell table:style-name="ce82" office:value-type="currency" office:currency="EUR" office:value="2603" calcext:value-type="currency">
            <text:p><text:s/>EUR 2,603.00 </text:p>
          </table:table-cell>
          <table:table-cell table:style-name="ce82" office:value-type="currency" office:currency="EUR" office:value="45" calcext:value-type="currency">
            <text:p><text:s/>EUR 45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4" calcext:value-type="currency">
            <text:p><text:s/>USD 74.00 </text:p>
          </table:table-cell>
          <table:table-cell table:style-name="ce91" table:formula="of:=SUM([.AZ32]+[.BB32]+[.BC32]+[.BF32]+[.BG32]+[.BH32]+[.BL32])" office:value-type="currency" office:currency="CNY" office:value="1189" calcext:value-type="currency">
            <text:p><text:s/>CNY 1,189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32]*[.BP32])" office:value-type="currency" office:currency="USD" office:value="1278.49462365591" calcext:value-type="currency">
            <text:p><text:s/>USD 1,278.49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200" calcext:value-type="currency">
            <text:p><text:s/>USD 200.00 </text:p>
          </table:table-cell>
          <table:table-cell table:style-name="ce105" office:value-type="currency" office:currency="USD" office:value="223" calcext:value-type="currency">
            <text:p><text:s/>USD 223.00 </text:p>
          </table:table-cell>
          <table:table-cell table:style-name="ce105" office:value-type="currency" office:currency="USD" office:value="16.13" calcext:value-type="currency">
            <text:p><text:s/>USD 16.13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3" calcext:value-type="currency">
            <text:p><text:s/>USD 2,213.00 </text:p>
          </table:table-cell>
          <table:table-cell table:style-name="ce105" office:value-type="currency" office:currency="USD" office:value="13" calcext:value-type="currency">
            <text:p><text:s/>USD 13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3" calcext:value-type="currency">
            <text:p><text:s/>USD 23.00 </text:p>
          </table:table-cell>
          <table:table-cell table:style-name="ce114" table:formula="of:=SUM([.BT32:.CA32])" office:value-type="currency" office:currency="USD" office:value="2688.13" calcext:value-type="currency">
            <text:p><text:s/>USD 2,688.13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2]*[.CC32])" office:value-type="currency" office:currency="USD" office:value="2688.13" calcext:value-type="currency">
            <text:p><text:s/>USD 2,688.13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78.205128205128" calcext:value-type="currency">
            <text:p><text:s/>USD 478.21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2]" office:value-type="currency" office:currency="USD" office:value="478.205128205128" calcext:value-type="currency">
            <text:p><text:s/>USD 478.21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Zone Industrielle PED - BP 38</text:p>
          </table:table-cell>
          <table:table-cell table:style-name="ce7" office:value-type="string" calcext:value-type="string">
            <text:p>Luxembourg</text:p>
          </table:table-cell>
          <table:table-cell table:style-name="ce6" office:value-type="string" calcext:value-type="string">
            <text:p>Rodange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3]" office:value-type="float" office:value="1284.94623655914" calcext:value-type="float">
            <text:p><text:s/>$1,284.95 </text:p>
          </table:table-cell>
          <table:table-cell table:style-name="ce42" table:formula="of:=[.CD33]" office:value-type="float" office:value="2912.13" calcext:value-type="float">
            <text:p><text:s/>$2,912.13 </text:p>
          </table:table-cell>
          <table:table-cell table:style-name="ce42" table:formula="of:=[.CR33]" office:value-type="float" office:value="478.205128205128" calcext:value-type="float">
            <text:p><text:s/>$478.21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33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3:.X33])" office:value-type="float" office:value="4675.28136476427" calcext:value-type="float">
            <text:p><text:s/>$4,675.28 </text:p>
          </table:table-cell>
          <table:table-cell table:style-name="ce47" table:formula="of:=[.V33]+[.W33]+[.X33]+[.AA33]" office:value-type="float" office:value="4775.28136476427" calcext:value-type="float">
            <text:p><text:s/>$4,775.28 </text:p>
          </table:table-cell>
          <table:table-cell table:style-name="ce47" table:formula="of:=[.V33]+[.W33]" office:value-type="float" office:value="4197.07623655914" calcext:value-type="float">
            <text:p><text:s/>$4,197.08 </text:p>
          </table:table-cell>
          <table:table-cell table:style-name="ce47" table:formula="of:=[.AN33]+[.AE33]+[.AF33]+[.AG33]" office:value-type="float" office:value="4795.28136476427" calcext:value-type="float">
            <text:p><text:s/>$4,795.28 </text:p>
          </table:table-cell>
          <table:table-cell table:style-name="ce47" table:formula="of:=[.AN33]+[.AH33]+[.AI33]+[.AJ33]" office:value-type="float" office:value="4795.28136476427" calcext:value-type="float">
            <text:p><text:s/>$4,795.28 </text:p>
          </table:table-cell>
          <table:table-cell table:style-name="ce46" table:formula="of:=[.AK33]+[.AL33]+[.AM33]+[.BQ33]+[.CD33]+[.CR33]" office:value-type="float" office:value="4795.28136476427" calcext:value-type="float">
            <text:p><text:s/>$4,795.28 </text:p>
          </table:table-cell>
          <table:table-cell table:style-name="ce50" office:value-type="float" office:value="19" calcext:value-type="float">
            <text:p>19</text:p>
          </table:table-cell>
          <table:table-cell table:style-name="ce54" office:value-type="string" calcext:value-type="string">
            <text:p>BEAN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5" calcext:value-type="float">
            <text:p><text:s/>USD895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4" calcext:value-type="float">
            <text:p><text:s/>USD894.00 </text:p>
          </table:table-cell>
          <table:table-cell table:style-name="ce66" office:value-type="float" office:value="120" calcext:value-type="float">
            <text:p><text:s/>USD120.00 </text:p>
          </table:table-cell>
          <table:table-cell table:style-name="ce66" office:value-type="float" office:value="73" calcext:value-type="float">
            <text:p><text:s/>USD73.00 </text:p>
          </table:table-cell>
          <table:table-cell table:style-name="ce76"/>
          <table:table-cell table:number-columns-repeated="2" table:style-name="ce80" office:value-type="currency" office:currency="USD" office:value="150" calcext:value-type="currency">
            <text:p><text:s/>USD 150.00 </text:p>
          </table:table-cell>
          <table:table-cell table:style-name="ce80" office:value-type="currency" office:currency="USD" office:value="40" calcext:value-type="currency">
            <text:p><text:s/>USD 40.00 </text:p>
          </table:table-cell>
          <table:table-cell table:style-name="ce80" office:value-type="currency" office:currency="USD" office:value="20" calcext:value-type="currency">
            <text:p><text:s/>USD 20.00 </text:p>
          </table:table-cell>
          <table:table-cell table:style-name="ce82" office:value-type="currency" office:currency="EUR" office:value="55" calcext:value-type="currency">
            <text:p><text:s/>EUR 55.00 </text:p>
          </table:table-cell>
          <table:table-cell table:style-name="ce85" office:value-type="string" calcext:value-type="string">
            <text:p>Left Bank Surcharge </text:p>
          </table:table-cell>
          <table:table-cell table:style-name="ce82" office:value-type="currency" office:currency="EUR" office:value="2604" calcext:value-type="currency">
            <text:p><text:s/>EUR 2,604.00 </text:p>
          </table:table-cell>
          <table:table-cell table:style-name="ce82" office:value-type="currency" office:currency="EUR" office:value="45" calcext:value-type="currency">
            <text:p><text:s/>EUR 45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5" calcext:value-type="currency">
            <text:p><text:s/>USD 75.00 </text:p>
          </table:table-cell>
          <table:table-cell table:style-name="ce91" table:formula="of:=SUM([.AZ33]+[.BB33]+[.BC33]+[.BF33]+[.BG33]+[.BH33]+[.BL33])" office:value-type="currency" office:currency="CNY" office:value="1195" calcext:value-type="currency">
            <text:p><text:s/>CNY 1,195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33]*[.BP33])" office:value-type="currency" office:currency="USD" office:value="1284.94623655914" calcext:value-type="currency">
            <text:p><text:s/>USD 1,284.95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420" calcext:value-type="currency">
            <text:p><text:s/>USD 420.00 </text:p>
          </table:table-cell>
          <table:table-cell table:style-name="ce105" office:value-type="currency" office:currency="USD" office:value="224" calcext:value-type="currency">
            <text:p><text:s/>USD 224.00 </text:p>
          </table:table-cell>
          <table:table-cell table:style-name="ce105" office:value-type="currency" office:currency="USD" office:value="16.13" calcext:value-type="currency">
            <text:p><text:s/>USD 16.13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4" calcext:value-type="currency">
            <text:p><text:s/>USD 2,214.00 </text:p>
          </table:table-cell>
          <table:table-cell table:style-name="ce105" office:value-type="currency" office:currency="USD" office:value="14" calcext:value-type="currency">
            <text:p><text:s/>USD 14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4" calcext:value-type="currency">
            <text:p><text:s/>USD 24.00 </text:p>
          </table:table-cell>
          <table:table-cell table:style-name="ce114" table:formula="of:=SUM([.BT33:.CA33])" office:value-type="currency" office:currency="USD" office:value="2912.13" calcext:value-type="currency">
            <text:p><text:s/>USD 2,912.13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3]*[.CC33])" office:value-type="currency" office:currency="USD" office:value="2912.13" calcext:value-type="currency">
            <text:p><text:s/>USD 2,912.13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78.205128205128" calcext:value-type="currency">
            <text:p><text:s/>USD 478.21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3]" office:value-type="currency" office:currency="USD" office:value="478.205128205128" calcext:value-type="currency">
            <text:p><text:s/>USD 478.21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Polinas Plastic</text:p>
          </table:table-cell>
          <table:table-cell table:style-name="ce6" office:value-type="string" calcext:value-type="string">
            <text:p>CUMHURIYET CAD No: 2-26 - 45030 MANISA</text:p>
          </table:table-cell>
          <table:table-cell table:style-name="ce7" office:value-type="string" calcext:value-type="string">
            <text:p>Turkey</text:p>
          </table:table-cell>
          <table:table-cell table:style-name="ce6" office:value-type="string" calcext:value-type="string">
            <text:p>Manisa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IZMIR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Port to Door</text:p>
          </table:table-cell>
          <table:table-cell table:style-name="ce29" office:value-type="string" calcext:value-type="string">
            <text:p>FOB</text:p>
          </table:table-cell>
          <table:table-cell table:style-name="ce32" office:value-type="float" office:value="28" calcext:value-type="float">
            <text:p>28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4]" office:value-type="float" office:value="332.044198895028" calcext:value-type="float">
            <text:p><text:s/>$332.04 </text:p>
          </table:table-cell>
          <table:table-cell table:style-name="ce42" table:formula="of:=[.CD34]" office:value-type="float" office:value="3113" calcext:value-type="float">
            <text:p><text:s/>$3,113.00 </text:p>
          </table:table-cell>
          <table:table-cell table:style-name="ce42" table:formula="of:=[.CR34]" office:value-type="float" office:value="1035.25641025641" calcext:value-type="float">
            <text:p><text:s/>$1,035.2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0" calcext:value-type="float">
            <text:p><text:s/>$5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34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4:.X34])" office:value-type="float" office:value="4480.30060915144" calcext:value-type="float">
            <text:p><text:s/>$4,480.30 </text:p>
          </table:table-cell>
          <table:table-cell table:style-name="ce47" table:formula="of:=[.V34]+[.W34]+[.X34]+[.AA34]" office:value-type="float" office:value="4980.30060915144" calcext:value-type="float">
            <text:p><text:s/>$4,980.30 </text:p>
          </table:table-cell>
          <table:table-cell table:style-name="ce47" table:formula="of:=[.V34]+[.W34]+[.X34]" office:value-type="float" office:value="4480.30060915144" calcext:value-type="float">
            <text:p><text:s/>$4,480.30 </text:p>
          </table:table-cell>
          <table:table-cell table:style-name="ce47" table:formula="of:=[.AN34]+[.AE34]+[.AF34]+[.AG34]" office:value-type="float" office:value="4540.30060915144" calcext:value-type="float">
            <text:p><text:s/>$4,540.30 </text:p>
          </table:table-cell>
          <table:table-cell table:style-name="ce47" table:formula="of:=[.AN34]+[.AH34]+[.AI34]+[.AJ34]" office:value-type="float" office:value="4540.30060915144" calcext:value-type="float">
            <text:p><text:s/>$4,540.30 </text:p>
          </table:table-cell>
          <table:table-cell table:style-name="ce46" table:formula="of:=[.AK34]+[.AL34]+[.AM34]+[.BQ34]+[.CD34]+[.CR34]" office:value-type="float" office:value="4540.30060915144" calcext:value-type="float">
            <text:p><text:s/>$4,540.30 </text:p>
          </table:table-cell>
          <table:table-cell table:style-name="ce50" office:value-type="float" office:value="24" calcext:value-type="float">
            <text:p>24</text:p>
          </table:table-cell>
          <table:table-cell table:style-name="ce54" office:value-type="string" calcext:value-type="string">
            <text:p>IZMI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6" calcext:value-type="float">
            <text:p><text:s/>USD896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5" calcext:value-type="float">
            <text:p><text:s/>USD895.00 </text:p>
          </table:table-cell>
          <table:table-cell table:style-name="ce66" office:value-type="float" office:value="121" calcext:value-type="float">
            <text:p><text:s/>USD121.00 </text:p>
          </table:table-cell>
          <table:table-cell table:style-name="ce66" office:value-type="float" office:value="74" calcext:value-type="float">
            <text:p><text:s/>USD74.00 </text:p>
          </table:table-cell>
          <table:table-cell table:style-name="ce78"/>
          <table:table-cell table:number-columns-repeated="2" table:style-name="ce80" office:value-type="currency" office:currency="USD" office:value="151" calcext:value-type="currency">
            <text:p><text:s/>USD 151.00 </text:p>
          </table:table-cell>
          <table:table-cell table:style-name="ce80" office:value-type="currency" office:currency="USD" office:value="41" calcext:value-type="currency">
            <text:p><text:s/>USD 41.00 </text:p>
          </table:table-cell>
          <table:table-cell table:style-name="ce80" office:value-type="currency" office:currency="USD" office:value="21" calcext:value-type="currency">
            <text:p><text:s/>USD 21.00 </text:p>
          </table:table-cell>
          <table:table-cell table:style-name="ce82" office:value-type="currency" office:currency="EUR" office:value="56" calcext:value-type="currency">
            <text:p><text:s/>EUR 56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5" calcext:value-type="currency">
            <text:p><text:s/>EUR 2,605.00 </text:p>
          </table:table-cell>
          <table:table-cell table:style-name="ce82" office:value-type="currency" office:currency="EUR" office:value="46" calcext:value-type="currency">
            <text:p><text:s/>EUR 46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6" calcext:value-type="currency">
            <text:p><text:s/>USD 76.00 </text:p>
          </table:table-cell>
          <table:table-cell table:style-name="ce91" table:formula="of:=SUM([.AZ34]+[.BB34]+[.BC34]+[.BF34]+[.BG34]+[.BH34]+[.BL34])" office:value-type="currency" office:currency="CNY" office:value="1202" calcext:value-type="currency">
            <text:p><text:s/>CNY 1,202.00 </text:p>
          </table:table-cell>
          <table:table-cell table:style-name="ce93" office:value-type="float" office:value="0.276243093922652" calcext:value-type="float">
            <text:p>0.276</text:p>
          </table:table-cell>
          <table:table-cell table:style-name="ce96" table:formula="of:=SUM([.BO34]*[.BP34])" office:value-type="currency" office:currency="USD" office:value="332.044198895028" calcext:value-type="currency">
            <text:p><text:s/>USD 332.04 </text:p>
          </table:table-cell>
          <table:table-cell table:style-name="ce100" office:value-type="string" calcext:value-type="string">
            <text:p>USD</text:p>
          </table:table-cell>
          <table:table-cell table:style-name="ce105" office:value-type="currency" office:currency="USD" office:value="710" calcext:value-type="currency">
            <text:p><text:s/>USD 710.00 </text:p>
          </table:table-cell>
          <table:table-cell table:style-name="ce105" office:value-type="currency" office:currency="USD" office:value="610" calcext:value-type="currency">
            <text:p><text:s/>USD 610.00 </text:p>
          </table:table-cell>
          <table:table-cell table:style-name="ce105" office:value-type="currency" office:currency="USD" office:value="225" calcext:value-type="currency">
            <text:p><text:s/>USD 225.00 </text:p>
          </table:table-cell>
          <table:table-cell table:style-name="ce105" office:value-type="currency" office:currency="USD" office:value="23" calcext:value-type="currency">
            <text:p><text:s/>USD 23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5" calcext:value-type="currency">
            <text:p><text:s/>USD 2,215.00 </text:p>
          </table:table-cell>
          <table:table-cell table:style-name="ce105" office:value-type="currency" office:currency="USD" office:value="15" calcext:value-type="currency">
            <text:p><text:s/>USD 15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5" calcext:value-type="currency">
            <text:p><text:s/>USD 25.00 </text:p>
          </table:table-cell>
          <table:table-cell table:style-name="ce114" table:formula="of:=SUM([.BT34:.CA34])" office:value-type="currency" office:currency="USD" office:value="3113" calcext:value-type="currency">
            <text:p><text:s/>USD 3,113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4]*[.CC34])" office:value-type="currency" office:currency="USD" office:value="3113" calcext:value-type="currency">
            <text:p><text:s/>USD 3,113.00 </text:p>
          </table:table-cell>
          <table:table-cell table:style-name="ce121" office:value-type="string" calcext:value-type="string">
            <text:p>BRL</text:p>
          </table:table-cell>
          <table:table-cell table:style-name="ce130" office:value-type="currency" office:currency="BRL" office:value="1805" calcext:value-type="currency">
            <text:p><text:s/>BRL 1,805.00 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style-name="ce130" office:value-type="currency" office:currency="BRL" office:value="925" calcext:value-type="currency">
            <text:p><text:s/>BRL 925.00 </text:p>
          </table:table-cell>
          <table:table-cell table:style-name="ce130" office:value-type="currency" office:currency="BRL" office:value="300" calcext:value-type="currency">
            <text:p><text:s/>BRL 300.00 </text:p>
          </table:table-cell>
          <table:table-cell table:style-name="ce138" office:value-type="string" calcext:value-type="string">
            <text:p>Drop off, Damage fee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string" calcext:value-type="string">
            <text:p>Desconsolidation &amp; Siscarga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0" office:value-type="currency" office:currency="BRL" office:value="120" calcext:value-type="currency">
            <text:p><text:s/>BRL 120.00 </text:p>
          </table:table-cell>
          <table:table-cell table:style-name="ce130" table:formula="of:=SUM([.CF34:.CO34])" office:value-type="currency" office:currency="BRL" office:value="3230" calcext:value-type="currency">
            <text:p><text:s/>BRL 3,230.00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P34]*[.CQ34]" office:value-type="currency" office:currency="USD" office:value="1035.25641025641" calcext:value-type="currency">
            <text:p><text:s/>USD 1,035.2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Polinas Plastic</text:p>
          </table:table-cell>
          <table:table-cell table:style-name="ce6" office:value-type="string" calcext:value-type="string">
            <text:p>CUMHURIYET CAD No: 2-26 - 45030 MANISA</text:p>
          </table:table-cell>
          <table:table-cell table:style-name="ce7" office:value-type="string" calcext:value-type="string">
            <text:p>Turkey</text:p>
          </table:table-cell>
          <table:table-cell table:style-name="ce6" office:value-type="string" calcext:value-type="string">
            <text:p>Manisa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IZMIR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Port to Door</text:p>
          </table:table-cell>
          <table:table-cell table:style-name="ce29" office:value-type="string" calcext:value-type="string">
            <text:p>FOB</text:p>
          </table:table-cell>
          <table:table-cell table:style-name="ce32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5]" office:value-type="float" office:value="333.977900552486" calcext:value-type="float">
            <text:p><text:s/>$333.98 </text:p>
          </table:table-cell>
          <table:table-cell table:style-name="ce42" table:formula="of:=[.CD35]" office:value-type="float" office:value="3827" calcext:value-type="float">
            <text:p><text:s/>$3,827.00 </text:p>
          </table:table-cell>
          <table:table-cell table:style-name="ce42" table:formula="of:=[.CR35]" office:value-type="float" office:value="1022.4358974359" calcext:value-type="float">
            <text:p><text:s/>$1,022.44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35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5:.X35])" office:value-type="float" office:value="5183.41379798839" calcext:value-type="float">
            <text:p><text:s/>$5,183.41 </text:p>
          </table:table-cell>
          <table:table-cell table:style-name="ce47" table:formula="of:=[.V35]+[.W35]+[.X35]+[.AA35]" office:value-type="float" office:value="5283.41379798839" calcext:value-type="float">
            <text:p><text:s/>$5,283.41 </text:p>
          </table:table-cell>
          <table:table-cell table:style-name="ce47" table:formula="of:=[.V35]+[.W35]" office:value-type="float" office:value="4160.97790055249" calcext:value-type="float">
            <text:p><text:s/>$4,160.98 </text:p>
          </table:table-cell>
          <table:table-cell table:style-name="ce47" table:formula="of:=[.AN35]+[.AE35]+[.AF35]+[.AG35]" office:value-type="float" office:value="5303.41379798839" calcext:value-type="float">
            <text:p><text:s/>$5,303.41 </text:p>
          </table:table-cell>
          <table:table-cell table:style-name="ce47" table:formula="of:=[.AN35]+[.AH35]+[.AI35]+[.AJ35]" office:value-type="float" office:value="5303.41379798839" calcext:value-type="float">
            <text:p><text:s/>$5,303.41 </text:p>
          </table:table-cell>
          <table:table-cell table:style-name="ce46" table:formula="of:=[.AK35]+[.AL35]+[.AM35]+[.BQ35]+[.CD35]+[.CR35]" office:value-type="float" office:value="5303.41379798839" calcext:value-type="float">
            <text:p><text:s/>$5,303.41 </text:p>
          </table:table-cell>
          <table:table-cell table:style-name="ce50" office:value-type="float" office:value="24" calcext:value-type="float">
            <text:p>24</text:p>
          </table:table-cell>
          <table:table-cell table:style-name="ce54" office:value-type="string" calcext:value-type="string">
            <text:p>IZMIR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7" calcext:value-type="float">
            <text:p><text:s/>USD897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6" calcext:value-type="float">
            <text:p><text:s/>USD896.00 </text:p>
          </table:table-cell>
          <table:table-cell table:style-name="ce66" office:value-type="float" office:value="122" calcext:value-type="float">
            <text:p><text:s/>USD122.00 </text:p>
          </table:table-cell>
          <table:table-cell table:style-name="ce66" office:value-type="float" office:value="75" calcext:value-type="float">
            <text:p><text:s/>USD75.00 </text:p>
          </table:table-cell>
          <table:table-cell table:style-name="ce78"/>
          <table:table-cell table:number-columns-repeated="2" table:style-name="ce80" office:value-type="currency" office:currency="USD" office:value="152" calcext:value-type="currency">
            <text:p><text:s/>USD 152.00 </text:p>
          </table:table-cell>
          <table:table-cell table:style-name="ce80" office:value-type="currency" office:currency="USD" office:value="42" calcext:value-type="currency">
            <text:p><text:s/>USD 42.00 </text:p>
          </table:table-cell>
          <table:table-cell table:style-name="ce80" office:value-type="currency" office:currency="USD" office:value="22" calcext:value-type="currency">
            <text:p><text:s/>USD 22.00 </text:p>
          </table:table-cell>
          <table:table-cell table:style-name="ce82" office:value-type="currency" office:currency="EUR" office:value="57" calcext:value-type="currency">
            <text:p><text:s/>EUR 57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6" calcext:value-type="currency">
            <text:p><text:s/>EUR 2,606.00 </text:p>
          </table:table-cell>
          <table:table-cell table:style-name="ce82" office:value-type="currency" office:currency="EUR" office:value="47" calcext:value-type="currency">
            <text:p><text:s/>EUR 47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7" calcext:value-type="currency">
            <text:p><text:s/>USD 77.00 </text:p>
          </table:table-cell>
          <table:table-cell table:style-name="ce91" table:formula="of:=SUM([.AZ35]+[.BB35]+[.BC35]+[.BF35]+[.BG35]+[.BH35]+[.BL35])" office:value-type="currency" office:currency="CNY" office:value="1209" calcext:value-type="currency">
            <text:p><text:s/>CNY 1,209.00 </text:p>
          </table:table-cell>
          <table:table-cell table:style-name="ce93" office:value-type="float" office:value="0.276243093922652" calcext:value-type="float">
            <text:p>0.276</text:p>
          </table:table-cell>
          <table:table-cell table:style-name="ce96" table:formula="of:=SUM([.BO35]*[.BP35])" office:value-type="currency" office:currency="USD" office:value="333.977900552486" calcext:value-type="currency">
            <text:p><text:s/>USD 333.98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320" calcext:value-type="currency">
            <text:p><text:s/>USD 1,320.00 </text:p>
          </table:table-cell>
          <table:table-cell table:style-name="ce105" office:value-type="currency" office:currency="USD" office:value="226" calcext:value-type="currency">
            <text:p><text:s/>USD 226.00 </text:p>
          </table:table-cell>
          <table:table-cell table:style-name="ce105" office:value-type="currency" office:currency="USD" office:value="23" calcext:value-type="currency">
            <text:p><text:s/>USD 23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6" calcext:value-type="currency">
            <text:p><text:s/>USD 2,216.00 </text:p>
          </table:table-cell>
          <table:table-cell table:style-name="ce105" office:value-type="currency" office:currency="USD" office:value="16" calcext:value-type="currency">
            <text:p><text:s/>USD 16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6" calcext:value-type="currency">
            <text:p><text:s/>USD 26.00 </text:p>
          </table:table-cell>
          <table:table-cell table:style-name="ce114" table:formula="of:=SUM([.BT35:.CA35])" office:value-type="currency" office:currency="USD" office:value="3827" calcext:value-type="currency">
            <text:p><text:s/>USD 3,827.00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5]*[.CC35])" office:value-type="currency" office:currency="USD" office:value="3827" calcext:value-type="currency">
            <text:p><text:s/>USD 3,827.00 </text:p>
          </table:table-cell>
          <table:table-cell table:style-name="ce121" office:value-type="string" calcext:value-type="string">
            <text:p>BRL</text:p>
          </table:table-cell>
          <table:table-cell table:style-name="ce130" office:value-type="currency" office:currency="BRL" office:value="1805" calcext:value-type="currency">
            <text:p><text:s/>BRL 1,805.00 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style-name="ce130" office:value-type="currency" office:currency="BRL" office:value="925" calcext:value-type="currency">
            <text:p><text:s/>BRL 925.00 </text:p>
          </table:table-cell>
          <table:table-cell table:style-name="ce130" office:value-type="currency" office:currency="BRL" office:value="300" calcext:value-type="currency">
            <text:p><text:s/>BRL 300.00 </text:p>
          </table:table-cell>
          <table:table-cell table:style-name="ce138" office:value-type="string" calcext:value-type="string">
            <text:p>Drop off, Damage fee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string" calcext:value-type="string">
            <text:p>Desconsolidation &amp; Siscarga</text:p>
          </table:table-cell>
          <table:table-cell table:style-name="ce128" office:value-type="currency" office:currency="USD" office:value="0" calcext:value-type="currency">
            <text:p><text:s/>USD -   </text:p>
          </table:table-cell>
          <table:table-cell table:style-name="ce130" office:value-type="currency" office:currency="BRL" office:value="120" calcext:value-type="currency">
            <text:p><text:s/>BRL 120.00 </text:p>
          </table:table-cell>
          <table:table-cell table:style-name="ce130" table:formula="of:=SUM([.CF35:.CO35])" office:value-type="currency" office:currency="BRL" office:value="3190" calcext:value-type="currency">
            <text:p><text:s/>BRL 3,190.00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P35]*[.CQ35]" office:value-type="currency" office:currency="USD" office:value="1022.4358974359" calcext:value-type="currency">
            <text:p><text:s/>USD 1,022.44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7" office:value-type="string" calcext:value-type="string">
            <text:p>Nelson Way Industrial Park, Nelson Way, Ne23 1Jr</text:p>
          </table:table-cell>
          <table:table-cell table:style-name="ce7" office:value-type="string" calcext:value-type="string">
            <text:p>United Kingdom</text:p>
          </table:table-cell>
          <table:table-cell table:style-name="ce6" office:value-type="string" calcext:value-type="string">
            <text:p>Cramlington</text:p>
          </table:table-cell>
          <table:table-cell table:style-name="ce6" office:value-type="string" calcext:value-type="string">
            <text:p>GB004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London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6]" office:value-type="float" office:value="1501.23456790124" calcext:value-type="float">
            <text:p><text:s/>$1,501.23 </text:p>
          </table:table-cell>
          <table:table-cell table:style-name="ce42" table:formula="of:=[.CD36]" office:value-type="float" office:value="3332.69" calcext:value-type="float">
            <text:p><text:s/>$3,332.69 </text:p>
          </table:table-cell>
          <table:table-cell table:style-name="ce42" table:formula="of:=[.CR36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50" calcext:value-type="float">
            <text:p><text:s/>$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60" calcext:value-type="float">
            <text:p><text:s/>$60.00 </text:p>
          </table:table-cell>
          <table:table-cell table:style-name="ce42" table:number-columns-repeated="2"/>
          <table:table-cell table:style-name="ce41" table:formula="of:=[.AH36]" office:value-type="float" office:value="60" calcext:value-type="float">
            <text:p><text:s/>$6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6:.X36])" office:value-type="float" office:value="5244.82200379867" calcext:value-type="float">
            <text:p><text:s/>$5,244.82 </text:p>
          </table:table-cell>
          <table:table-cell table:style-name="ce47" table:formula="of:=[.V36]+[.W36]+[.X36]+[.AA36]" office:value-type="float" office:value="5294.82200379867" calcext:value-type="float">
            <text:p><text:s/>$5,294.82 </text:p>
          </table:table-cell>
          <table:table-cell table:style-name="ce47" table:formula="of:=[.V36]+[.W36]" office:value-type="float" office:value="4833.92456790124" calcext:value-type="float">
            <text:p><text:s/>$4,833.92 </text:p>
          </table:table-cell>
          <table:table-cell table:style-name="ce47" table:formula="of:=[.AN36]+[.AE36]+[.AF36]+[.AG36]" office:value-type="float" office:value="5304.82200379867" calcext:value-type="float">
            <text:p><text:s/>$5,304.82 </text:p>
          </table:table-cell>
          <table:table-cell table:style-name="ce47" table:formula="of:=[.AN36]+[.AH36]+[.AI36]+[.AJ36]" office:value-type="float" office:value="5304.82200379867" calcext:value-type="float">
            <text:p><text:s/>$5,304.82 </text:p>
          </table:table-cell>
          <table:table-cell table:style-name="ce46" table:formula="of:=[.AK36]+[.AL36]+[.AM36]+[.BQ36]+[.CD36]+[.CR36]" office:value-type="float" office:value="5304.82200379867" calcext:value-type="float">
            <text:p><text:s/>$5,304.82 </text:p>
          </table:table-cell>
          <table:table-cell table:style-name="ce50" office:value-type="float" office:value="27" calcext:value-type="float">
            <text:p>27</text:p>
          </table:table-cell>
          <table:table-cell table:style-name="ce54" office:value-type="string" calcext:value-type="string">
            <text:p>London Gateway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8" calcext:value-type="float">
            <text:p><text:s/>USD898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7" calcext:value-type="float">
            <text:p><text:s/>USD897.00 </text:p>
          </table:table-cell>
          <table:table-cell table:style-name="ce66" office:value-type="float" office:value="123" calcext:value-type="float">
            <text:p><text:s/>USD123.00 </text:p>
          </table:table-cell>
          <table:table-cell table:style-name="ce66" office:value-type="float" office:value="76" calcext:value-type="float">
            <text:p><text:s/>USD76.00 </text:p>
          </table:table-cell>
          <table:table-cell table:style-name="ce79"/>
          <table:table-cell table:number-columns-repeated="2" table:style-name="ce80" office:value-type="currency" office:currency="USD" office:value="153" calcext:value-type="currency">
            <text:p><text:s/>USD 153.00 </text:p>
          </table:table-cell>
          <table:table-cell table:style-name="ce80" office:value-type="currency" office:currency="USD" office:value="43" calcext:value-type="currency">
            <text:p><text:s/>USD 43.00 </text:p>
          </table:table-cell>
          <table:table-cell table:style-name="ce80" office:value-type="currency" office:currency="USD" office:value="23" calcext:value-type="currency">
            <text:p><text:s/>USD 23.00 </text:p>
          </table:table-cell>
          <table:table-cell table:style-name="ce79" office:value-type="currency" office:currency="GBP" office:value="20" calcext:value-type="currency">
            <text:p><text:s/>GBP 20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7" calcext:value-type="currency">
            <text:p><text:s/>EUR 2,607.00 </text:p>
          </table:table-cell>
          <table:table-cell table:style-name="ce82" office:value-type="currency" office:currency="EUR" office:value="48" calcext:value-type="currency">
            <text:p><text:s/>EUR 48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8" calcext:value-type="currency">
            <text:p><text:s/>USD 78.00 </text:p>
          </table:table-cell>
          <table:table-cell table:style-name="ce91" table:formula="of:=SUM([.AZ36]+[.BB36]+[.BC36]+[.BF36]+[.BG36]+[.BH36]+[.BL36])" office:value-type="currency" office:currency="CNY" office:value="1216" calcext:value-type="currency">
            <text:p><text:s/>CNY 1,216.00 </text:p>
          </table:table-cell>
          <table:table-cell table:style-name="ce93" office:value-type="float" office:value="1.23456790123457" calcext:value-type="float">
            <text:p>1.235</text:p>
          </table:table-cell>
          <table:table-cell table:style-name="ce96" table:formula="of:=SUM([.BO36]*[.BP36])" office:value-type="currency" office:currency="USD" office:value="1501.23456790124" calcext:value-type="currency">
            <text:p><text:s/>USD 1,501.23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820" calcext:value-type="currency">
            <text:p><text:s/>USD 820.00 </text:p>
          </table:table-cell>
          <table:table-cell table:style-name="ce105" office:value-type="currency" office:currency="USD" office:value="227" calcext:value-type="currency">
            <text:p><text:s/>USD 227.00 </text:p>
          </table:table-cell>
          <table:table-cell table:style-name="ce105" office:value-type="currency" office:currency="USD" office:value="24.69" calcext:value-type="currency">
            <text:p><text:s/>USD 24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7" calcext:value-type="currency">
            <text:p><text:s/>USD 2,217.00 </text:p>
          </table:table-cell>
          <table:table-cell table:style-name="ce105" office:value-type="currency" office:currency="USD" office:value="17" calcext:value-type="currency">
            <text:p><text:s/>USD 17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7" calcext:value-type="currency">
            <text:p><text:s/>USD 27.00 </text:p>
          </table:table-cell>
          <table:table-cell table:style-name="ce114" table:formula="of:=SUM([.BT36:.CA36])" office:value-type="currency" office:currency="USD" office:value="3332.69" calcext:value-type="currency">
            <text:p><text:s/>USD 3,332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6]*[.CC36])" office:value-type="currency" office:currency="USD" office:value="3332.69" calcext:value-type="currency">
            <text:p><text:s/>USD 3,332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6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7" office:value-type="string" calcext:value-type="string">
            <text:p>Nelson Way Industrial Park, Nelson Way, Ne23 1Jr</text:p>
          </table:table-cell>
          <table:table-cell table:style-name="ce7" office:value-type="string" calcext:value-type="string">
            <text:p>United Kingdom</text:p>
          </table:table-cell>
          <table:table-cell table:style-name="ce6" office:value-type="string" calcext:value-type="string">
            <text:p>Cramlington</text:p>
          </table:table-cell>
          <table:table-cell table:style-name="ce6" office:value-type="string" calcext:value-type="string">
            <text:p>GB004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London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7]" office:value-type="float" office:value="1509.87654320988" calcext:value-type="float">
            <text:p><text:s/>$1,509.88 </text:p>
          </table:table-cell>
          <table:table-cell table:style-name="ce42" table:formula="of:=[.CD37]" office:value-type="float" office:value="3956.69" calcext:value-type="float">
            <text:p><text:s/>$3,956.69 </text:p>
          </table:table-cell>
          <table:table-cell table:style-name="ce42" table:formula="of:=[.CR37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00" calcext:value-type="float">
            <text:p><text:s/>$1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20" calcext:value-type="float">
            <text:p><text:s/>$120.00 </text:p>
          </table:table-cell>
          <table:table-cell table:style-name="ce42" table:number-columns-repeated="2"/>
          <table:table-cell table:style-name="ce41" table:formula="of:=[.AH37]" office:value-type="float" office:value="120" calcext:value-type="float">
            <text:p><text:s/>$120.00 </text:p>
          </table:table-cell>
          <table:table-cell table:number-columns-repeated="2" table:style-name="ce42" office:value-type="float" office:value="0" calcext:value-type="float">
            <text:p><text:s/>$-   </text:p>
          </table:table-cell>
          <table:table-cell table:style-name="ce47" table:formula="of:=SUM([.V37:.X37])" office:value-type="float" office:value="5877.46397910732" calcext:value-type="float">
            <text:p><text:s/>$5,877.46 </text:p>
          </table:table-cell>
          <table:table-cell table:style-name="ce47" table:formula="of:=[.V37]+[.W37]+[.X37]+[.AA37]" office:value-type="float" office:value="5977.46397910732" calcext:value-type="float">
            <text:p><text:s/>$5,977.46 </text:p>
          </table:table-cell>
          <table:table-cell table:style-name="ce47" table:formula="of:=[.V37]+[.W37]" office:value-type="float" office:value="5466.56654320988" calcext:value-type="float">
            <text:p><text:s/>$5,466.57 </text:p>
          </table:table-cell>
          <table:table-cell table:style-name="ce47" table:formula="of:=[.AN37]+[.AE37]+[.AF37]+[.AG37]" office:value-type="float" office:value="5997.46397910732" calcext:value-type="float">
            <text:p><text:s/>$5,997.46 </text:p>
          </table:table-cell>
          <table:table-cell table:style-name="ce47" table:formula="of:=[.AN37]+[.AH37]+[.AI37]+[.AJ37]" office:value-type="float" office:value="5997.46397910732" calcext:value-type="float">
            <text:p><text:s/>$5,997.46 </text:p>
          </table:table-cell>
          <table:table-cell table:style-name="ce46" table:formula="of:=[.AK37]+[.AL37]+[.AM37]+[.BQ37]+[.CD37]+[.CR37]" office:value-type="float" office:value="5997.46397910732" calcext:value-type="float">
            <text:p><text:s/>$5,997.46 </text:p>
          </table:table-cell>
          <table:table-cell table:style-name="ce50" office:value-type="float" office:value="27" calcext:value-type="float">
            <text:p>27</text:p>
          </table:table-cell>
          <table:table-cell table:style-name="ce54" office:value-type="string" calcext:value-type="string">
            <text:p>London Gateway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899" calcext:value-type="float">
            <text:p><text:s/>USD899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8" calcext:value-type="float">
            <text:p><text:s/>USD898.00 </text:p>
          </table:table-cell>
          <table:table-cell table:style-name="ce66" office:value-type="float" office:value="124" calcext:value-type="float">
            <text:p><text:s/>USD124.00 </text:p>
          </table:table-cell>
          <table:table-cell table:style-name="ce66" office:value-type="float" office:value="77" calcext:value-type="float">
            <text:p><text:s/>USD77.00 </text:p>
          </table:table-cell>
          <table:table-cell table:style-name="ce79"/>
          <table:table-cell table:number-columns-repeated="2" table:style-name="ce80" office:value-type="currency" office:currency="USD" office:value="154" calcext:value-type="currency">
            <text:p><text:s/>USD 154.00 </text:p>
          </table:table-cell>
          <table:table-cell table:style-name="ce80" office:value-type="currency" office:currency="USD" office:value="44" calcext:value-type="currency">
            <text:p><text:s/>USD 44.00 </text:p>
          </table:table-cell>
          <table:table-cell table:style-name="ce80" office:value-type="currency" office:currency="USD" office:value="24" calcext:value-type="currency">
            <text:p><text:s/>USD 24.00 </text:p>
          </table:table-cell>
          <table:table-cell table:style-name="ce79" office:value-type="currency" office:currency="GBP" office:value="20" calcext:value-type="currency">
            <text:p><text:s/>GBP 20.00 </text:p>
          </table:table-cell>
          <table:table-cell table:style-name="ce85" office:value-type="string" calcext:value-type="string">
            <text:p>0</text:p>
          </table:table-cell>
          <table:table-cell table:style-name="ce82" office:value-type="currency" office:currency="EUR" office:value="2608" calcext:value-type="currency">
            <text:p><text:s/>EUR 2,608.00 </text:p>
          </table:table-cell>
          <table:table-cell table:style-name="ce82" office:value-type="currency" office:currency="EUR" office:value="49" calcext:value-type="currency">
            <text:p><text:s/>EUR 49.00 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currency" office:currency="USD" office:value="79" calcext:value-type="currency">
            <text:p><text:s/>USD 79.00 </text:p>
          </table:table-cell>
          <table:table-cell table:style-name="ce91" table:formula="of:=SUM([.AZ37]+[.BB37]+[.BC37]+[.BF37]+[.BG37]+[.BH37]+[.BL37])" office:value-type="currency" office:currency="CNY" office:value="1223" calcext:value-type="currency">
            <text:p><text:s/>CNY 1,223.00 </text:p>
          </table:table-cell>
          <table:table-cell table:style-name="ce93" office:value-type="float" office:value="1.23456790123457" calcext:value-type="float">
            <text:p>1.235</text:p>
          </table:table-cell>
          <table:table-cell table:style-name="ce96" table:formula="of:=SUM([.BO37]*[.BP37])" office:value-type="currency" office:currency="USD" office:value="1509.87654320988" calcext:value-type="currency">
            <text:p><text:s/>USD 1,509.88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440" calcext:value-type="currency">
            <text:p><text:s/>USD 1,440.00 </text:p>
          </table:table-cell>
          <table:table-cell table:style-name="ce105" office:value-type="currency" office:currency="USD" office:value="228" calcext:value-type="currency">
            <text:p><text:s/>USD 228.00 </text:p>
          </table:table-cell>
          <table:table-cell table:style-name="ce105" office:value-type="currency" office:currency="USD" office:value="24.69" calcext:value-type="currency">
            <text:p><text:s/>USD 24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8" calcext:value-type="currency">
            <text:p><text:s/>USD 2,218.00 </text:p>
          </table:table-cell>
          <table:table-cell table:style-name="ce105" office:value-type="currency" office:currency="USD" office:value="18" calcext:value-type="currency">
            <text:p><text:s/>USD 18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8" calcext:value-type="currency">
            <text:p><text:s/>USD 28.00 </text:p>
          </table:table-cell>
          <table:table-cell table:style-name="ce114" table:formula="of:=SUM([.BT37:.CA37])" office:value-type="currency" office:currency="USD" office:value="3956.69" calcext:value-type="currency">
            <text:p><text:s/>USD 3,956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7]*[.CC37])" office:value-type="currency" office:currency="USD" office:value="3956.69" calcext:value-type="currency">
            <text:p><text:s/>USD 3,956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7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3011 Independence Drive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Fort Wayne, IN</text:p>
          </table:table-cell>
          <table:table-cell table:style-name="ce6" office:value-type="string" calcext:value-type="string">
            <text:p>US009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8]" office:value-type="float" office:value="1180" calcext:value-type="float">
            <text:p><text:s/>$1,180.00 </text:p>
          </table:table-cell>
          <table:table-cell table:style-name="ce42" table:formula="of:=[.CD38]" office:value-type="float" office:value="3217.69" calcext:value-type="float">
            <text:p><text:s/>$3,217.69 </text:p>
          </table:table-cell>
          <table:table-cell table:style-name="ce42" table:formula="of:=[.CR38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38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38]" office:value-type="float" office:value="0" calcext:value-type="float">
            <text:p><text:s/>$-   </text:p>
          </table:table-cell>
          <table:table-cell table:style-name="ce47" table:formula="of:=SUM([.V38:.X38])" office:value-type="float" office:value="4884.54897435897" calcext:value-type="float">
            <text:p><text:s/>$4,884.55 </text:p>
          </table:table-cell>
          <table:table-cell table:style-name="ce47" table:formula="of:=[.AN38]+[.Y38]+[.Z38]+[.AA38]" office:value-type="float" office:value="5184.54897435897" calcext:value-type="float">
            <text:p><text:s/>$5,184.55 </text:p>
          </table:table-cell>
          <table:table-cell table:style-name="ce47" table:formula="of:=[.AN38]+[.AB38]+[.AC38]+[.AD38]" office:value-type="float" office:value="5184.54897435897" calcext:value-type="float">
            <text:p><text:s/>$5,184.55 </text:p>
          </table:table-cell>
          <table:table-cell table:style-name="ce47" table:formula="of:=[.AN38]+[.AE38]+[.AF38]+[.AG38]" office:value-type="float" office:value="4974.54897435897" calcext:value-type="float">
            <text:p><text:s/>$4,974.55 </text:p>
          </table:table-cell>
          <table:table-cell table:style-name="ce47" table:formula="of:=[.AN38]+[.AH38]+[.AI38]+[.AJ38]" office:value-type="float" office:value="4974.54897435897" calcext:value-type="float">
            <text:p><text:s/>$4,974.55 </text:p>
          </table:table-cell>
          <table:table-cell table:style-name="ce46" table:formula="of:=[.AK38]+[.AL38]+[.AM38]+[.BQ38]+[.CD38]+[.CR38]" office:value-type="float" office:value="4974.54897435897" calcext:value-type="float">
            <text:p><text:s/>$4,974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0" calcext:value-type="float">
            <text:p><text:s/>USD90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899" calcext:value-type="float">
            <text:p><text:s/>USD899.00 </text:p>
          </table:table-cell>
          <table:table-cell table:style-name="ce66" office:value-type="float" office:value="125" calcext:value-type="float">
            <text:p><text:s/>USD125.00 </text:p>
          </table:table-cell>
          <table:table-cell table:style-name="ce66" office:value-type="float" office:value="78" calcext:value-type="float">
            <text:p><text:s/>USD78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45" calcext:value-type="currency">
            <text:p><text:s/>USD 45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38]+[.BB38]+[.BC38]+[.BF38]+[.BG38]+[.BH38]+[.BL38])" office:value-type="currency" office:currency="CNY" office:value="1180" calcext:value-type="currency">
            <text:p><text:s/>CNY 1,180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38]*[.BP38])" office:value-type="currency" office:currency="USD" office:value="1180" calcext:value-type="currency">
            <text:p><text:s/>USD 1,180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696" calcext:value-type="currency">
            <text:p><text:s/>USD 696.00 </text:p>
          </table:table-cell>
          <table:table-cell table:style-name="ce105" office:value-type="currency" office:currency="USD" office:value="229" calcext:value-type="currency">
            <text:p><text:s/>USD 229.00 </text:p>
          </table:table-cell>
          <table:table-cell table:style-name="ce105" office:value-type="currency" office:currency="USD" office:value="25.69" calcext:value-type="currency">
            <text:p><text:s/>USD 25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19" calcext:value-type="currency">
            <text:p><text:s/>USD 2,219.00 </text:p>
          </table:table-cell>
          <table:table-cell table:style-name="ce105" office:value-type="currency" office:currency="USD" office:value="19" calcext:value-type="currency">
            <text:p><text:s/>USD 19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9" calcext:value-type="currency">
            <text:p><text:s/>USD 29.00 </text:p>
          </table:table-cell>
          <table:table-cell table:style-name="ce114" table:formula="of:=SUM([.BT38:.CA38])" office:value-type="currency" office:currency="USD" office:value="3217.69" calcext:value-type="currency">
            <text:p><text:s/>USD 3,217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8]*[.CC38])" office:value-type="currency" office:currency="USD" office:value="3217.69" calcext:value-type="currency">
            <text:p><text:s/>USD 3,217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8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Mitsubishi Polyester</text:p>
          </table:table-cell>
          <table:table-cell table:style-name="ce6" office:value-type="string" calcext:value-type="string">
            <text:p>2001 Hood rd, PO BOX 1400, 29652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Greer, SC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Charleston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7" calcext:value-type="float">
            <text:p>27</text:p>
          </table:table-cell>
          <table:table-cell table:style-name="ce36" table:number-columns-repeated="2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39]" office:value-type="float" office:value="1184" calcext:value-type="float">
            <text:p><text:s/>$1,184.00 </text:p>
          </table:table-cell>
          <table:table-cell table:style-name="ce42" table:formula="of:=[.CD39]" office:value-type="float" office:value="3200.69" calcext:value-type="float">
            <text:p><text:s/>$3,200.69 </text:p>
          </table:table-cell>
          <table:table-cell table:style-name="ce42" table:formula="of:=[.CR39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 table:number-columns-repeated="2"/>
          <table:table-cell table:style-name="ce41" table:formula="of:=[.AH39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39]" office:value-type="float" office:value="0" calcext:value-type="float">
            <text:p><text:s/>$-   </text:p>
          </table:table-cell>
          <table:table-cell table:style-name="ce47" table:formula="of:=SUM([.V39:.X39])" office:value-type="float" office:value="4828.27974358974" calcext:value-type="float">
            <text:p><text:s/>$4,828.28 </text:p>
          </table:table-cell>
          <table:table-cell table:style-name="ce47" table:formula="of:=[.AN39]+[.Y39]+[.Z39]+[.AA39]" office:value-type="float" office:value="4978.27974358974" calcext:value-type="float">
            <text:p><text:s/>$4,978.28 </text:p>
          </table:table-cell>
          <table:table-cell table:style-name="ce47" table:formula="of:=[.AN39]+[.AB39]+[.AC39]+[.AD39]" office:value-type="float" office:value="4978.27974358974" calcext:value-type="float">
            <text:p><text:s/>$4,978.28 </text:p>
          </table:table-cell>
          <table:table-cell table:style-name="ce47" table:formula="of:=[.AN39]+[.AE39]+[.AF39]+[.AG39]" office:value-type="float" office:value="4873.27974358974" calcext:value-type="float">
            <text:p><text:s/>$4,873.28 </text:p>
          </table:table-cell>
          <table:table-cell table:style-name="ce47" table:formula="of:=[.AN39]+[.AH39]+[.AI39]+[.AJ39]" office:value-type="float" office:value="4873.27974358974" calcext:value-type="float">
            <text:p><text:s/>$4,873.28 </text:p>
          </table:table-cell>
          <table:table-cell table:style-name="ce46" table:formula="of:=[.AK39]+[.AL39]+[.AM39]+[.BQ39]+[.CD39]+[.CR39]" office:value-type="float" office:value="4873.27974358974" calcext:value-type="float">
            <text:p><text:s/>$4,873.28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Charleston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1" calcext:value-type="float">
            <text:p><text:s/>USD901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0" calcext:value-type="float">
            <text:p><text:s/>USD900.00 </text:p>
          </table:table-cell>
          <table:table-cell table:style-name="ce66" office:value-type="float" office:value="126" calcext:value-type="float">
            <text:p><text:s/>USD126.00 </text:p>
          </table:table-cell>
          <table:table-cell table:style-name="ce66" office:value-type="float" office:value="79" calcext:value-type="float">
            <text:p><text:s/>USD79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46" calcext:value-type="currency">
            <text:p><text:s/>USD 46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39]+[.BB39]+[.BC39]+[.BF39]+[.BG39]+[.BH39]+[.BL39])" office:value-type="currency" office:currency="CNY" office:value="1184" calcext:value-type="currency">
            <text:p><text:s/>CNY 1,184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39]*[.BP39])" office:value-type="currency" office:currency="USD" office:value="1184" calcext:value-type="currency">
            <text:p><text:s/>USD 1,184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674" calcext:value-type="currency">
            <text:p><text:s/>USD 674.00 </text:p>
          </table:table-cell>
          <table:table-cell table:style-name="ce105" office:value-type="currency" office:currency="USD" office:value="230" calcext:value-type="currency">
            <text:p><text:s/>USD 230.00 </text:p>
          </table:table-cell>
          <table:table-cell table:style-name="ce105" office:value-type="currency" office:currency="USD" office:value="26.69" calcext:value-type="currency">
            <text:p><text:s/>USD 26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0" calcext:value-type="currency">
            <text:p><text:s/>USD 2,220.00 </text:p>
          </table:table-cell>
          <table:table-cell table:style-name="ce105" office:value-type="currency" office:currency="USD" office:value="20" calcext:value-type="currency">
            <text:p><text:s/>USD 20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0" calcext:value-type="currency">
            <text:p><text:s/>USD 30.00 </text:p>
          </table:table-cell>
          <table:table-cell table:style-name="ce114" table:formula="of:=SUM([.BT39:.CA39])" office:value-type="currency" office:currency="USD" office:value="3200.69" calcext:value-type="currency">
            <text:p><text:s/>USD 3,200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39]*[.CC39])" office:value-type="currency" office:currency="USD" office:value="3200.69" calcext:value-type="currency">
            <text:p><text:s/>USD 3,200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39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Mitsubishi Polyester</text:p>
          </table:table-cell>
          <table:table-cell table:style-name="ce6" office:value-type="string" calcext:value-type="string">
            <text:p>2001 Hood rd, PO BOX 1400, 29652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Greer, SC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Charleston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0]" office:value-type="float" office:value="1188" calcext:value-type="float">
            <text:p><text:s/>$1,188.00 </text:p>
          </table:table-cell>
          <table:table-cell table:style-name="ce42" table:formula="of:=[.CD40]" office:value-type="float" office:value="3305.69" calcext:value-type="float">
            <text:p><text:s/>$3,305.69 </text:p>
          </table:table-cell>
          <table:table-cell table:style-name="ce42" table:formula="of:=[.CR40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0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0]" office:value-type="float" office:value="0" calcext:value-type="float">
            <text:p><text:s/>$-   </text:p>
          </table:table-cell>
          <table:table-cell table:style-name="ce47" table:formula="of:=SUM([.V40:.X40])" office:value-type="float" office:value="4937.27974358974" calcext:value-type="float">
            <text:p><text:s/>$4,937.28 </text:p>
          </table:table-cell>
          <table:table-cell table:style-name="ce47" table:formula="of:=[.AN40]+[.Y40]+[.Z40]+[.AA40]" office:value-type="float" office:value="5237.27974358974" calcext:value-type="float">
            <text:p><text:s/>$5,237.28 </text:p>
          </table:table-cell>
          <table:table-cell table:style-name="ce47" table:formula="of:=[.AN40]+[.AB40]+[.AC40]+[.AD40]" office:value-type="float" office:value="5237.27974358974" calcext:value-type="float">
            <text:p><text:s/>$5,237.28 </text:p>
          </table:table-cell>
          <table:table-cell table:style-name="ce47" table:formula="of:=[.AN40]+[.AE40]+[.AF40]+[.AG40]" office:value-type="float" office:value="5027.27974358974" calcext:value-type="float">
            <text:p><text:s/>$5,027.28 </text:p>
          </table:table-cell>
          <table:table-cell table:style-name="ce47" table:formula="of:=[.AN40]+[.AH40]+[.AI40]+[.AJ40]" office:value-type="float" office:value="5027.27974358974" calcext:value-type="float">
            <text:p><text:s/>$5,027.28 </text:p>
          </table:table-cell>
          <table:table-cell table:style-name="ce46" table:formula="of:=[.AK40]+[.AL40]+[.AM40]+[.BQ40]+[.CD40]+[.CR40]" office:value-type="float" office:value="5027.27974358974" calcext:value-type="float">
            <text:p><text:s/>$5,027.28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Charleston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2" calcext:value-type="float">
            <text:p><text:s/>USD902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1" calcext:value-type="float">
            <text:p><text:s/>USD901.00 </text:p>
          </table:table-cell>
          <table:table-cell table:style-name="ce66" office:value-type="float" office:value="127" calcext:value-type="float">
            <text:p><text:s/>USD127.00 </text:p>
          </table:table-cell>
          <table:table-cell table:style-name="ce66" office:value-type="float" office:value="80" calcext:value-type="float">
            <text:p><text:s/>USD80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47" calcext:value-type="currency">
            <text:p><text:s/>USD 47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0]+[.BB40]+[.BC40]+[.BF40]+[.BG40]+[.BH40]+[.BL40])" office:value-type="currency" office:currency="CNY" office:value="1188" calcext:value-type="currency">
            <text:p><text:s/>CNY 1,188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0]*[.BP40])" office:value-type="currency" office:currency="USD" office:value="1188" calcext:value-type="currency">
            <text:p><text:s/>USD 1,188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74" calcext:value-type="currency">
            <text:p><text:s/>USD 774.00 </text:p>
          </table:table-cell>
          <table:table-cell table:style-name="ce105" office:value-type="currency" office:currency="USD" office:value="231" calcext:value-type="currency">
            <text:p><text:s/>USD 231.00 </text:p>
          </table:table-cell>
          <table:table-cell table:style-name="ce105" office:value-type="currency" office:currency="USD" office:value="27.69" calcext:value-type="currency">
            <text:p><text:s/>USD 27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1" calcext:value-type="currency">
            <text:p><text:s/>USD 2,221.00 </text:p>
          </table:table-cell>
          <table:table-cell table:style-name="ce105" office:value-type="currency" office:currency="USD" office:value="21" calcext:value-type="currency">
            <text:p><text:s/>USD 21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1" calcext:value-type="currency">
            <text:p><text:s/>USD 31.00 </text:p>
          </table:table-cell>
          <table:table-cell table:style-name="ce114" table:formula="of:=SUM([.BT40:.CA40])" office:value-type="currency" office:currency="USD" office:value="3305.69" calcext:value-type="currency">
            <text:p><text:s/>USD 3,305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0]*[.CC40])" office:value-type="currency" office:currency="USD" office:value="3305.69" calcext:value-type="currency">
            <text:p><text:s/>USD 3,305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0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8100 Tyler Blvd., Suite 120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entor, OH</text:p>
          </table:table-cell>
          <table:table-cell table:style-name="ce6" office:value-type="string" calcext:value-type="string">
            <text:p>US15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1]" office:value-type="float" office:value="1192" calcext:value-type="float">
            <text:p><text:s/>$1,192.00 </text:p>
          </table:table-cell>
          <table:table-cell table:style-name="ce42" table:formula="of:=[.CD41]" office:value-type="float" office:value="3135.69" calcext:value-type="float">
            <text:p><text:s/>$3,135.69 </text:p>
          </table:table-cell>
          <table:table-cell table:style-name="ce42" table:formula="of:=[.CR41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 table:number-columns-repeated="2"/>
          <table:table-cell table:style-name="ce41" table:formula="of:=[.AH41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1]" office:value-type="float" office:value="0" calcext:value-type="float">
            <text:p><text:s/>$-   </text:p>
          </table:table-cell>
          <table:table-cell table:style-name="ce47" table:formula="of:=SUM([.V41:.X41])" office:value-type="float" office:value="4814.54897435897" calcext:value-type="float">
            <text:p><text:s/>$4,814.55 </text:p>
          </table:table-cell>
          <table:table-cell table:style-name="ce47" table:formula="of:=[.AN41]+[.Y41]+[.Z41]+[.AA41]" office:value-type="float" office:value="4964.54897435897" calcext:value-type="float">
            <text:p><text:s/>$4,964.55 </text:p>
          </table:table-cell>
          <table:table-cell table:style-name="ce47" table:formula="of:=[.AN41]+[.AB41]+[.AC41]+[.AD41]" office:value-type="float" office:value="4964.54897435897" calcext:value-type="float">
            <text:p><text:s/>$4,964.55 </text:p>
          </table:table-cell>
          <table:table-cell table:style-name="ce47" table:formula="of:=[.AN41]+[.AE41]+[.AF41]+[.AG41]" office:value-type="float" office:value="4859.54897435897" calcext:value-type="float">
            <text:p><text:s/>$4,859.55 </text:p>
          </table:table-cell>
          <table:table-cell table:style-name="ce47" table:formula="of:=[.AN41]+[.AH41]+[.AI41]+[.AJ41]" office:value-type="float" office:value="4859.54897435897" calcext:value-type="float">
            <text:p><text:s/>$4,859.55 </text:p>
          </table:table-cell>
          <table:table-cell table:style-name="ce46" table:formula="of:=[.AK41]+[.AL41]+[.AM41]+[.BQ41]+[.CD41]+[.CR41]" office:value-type="float" office:value="4859.54897435897" calcext:value-type="float">
            <text:p><text:s/>$4,859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3" calcext:value-type="float">
            <text:p><text:s/>USD903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2" calcext:value-type="float">
            <text:p><text:s/>USD902.00 </text:p>
          </table:table-cell>
          <table:table-cell table:style-name="ce66" office:value-type="float" office:value="128" calcext:value-type="float">
            <text:p><text:s/>USD128.00 </text:p>
          </table:table-cell>
          <table:table-cell table:style-name="ce66" office:value-type="float" office:value="81" calcext:value-type="float">
            <text:p><text:s/>USD81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48" calcext:value-type="currency">
            <text:p><text:s/>USD 48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1]+[.BB41]+[.BC41]+[.BF41]+[.BG41]+[.BH41]+[.BL41])" office:value-type="currency" office:currency="CNY" office:value="1192" calcext:value-type="currency">
            <text:p><text:s/>CNY 1,192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1]*[.BP41])" office:value-type="currency" office:currency="USD" office:value="1192" calcext:value-type="currency">
            <text:p><text:s/>USD 1,192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599" calcext:value-type="currency">
            <text:p><text:s/>USD 599.00 </text:p>
          </table:table-cell>
          <table:table-cell table:style-name="ce105" office:value-type="currency" office:currency="USD" office:value="232" calcext:value-type="currency">
            <text:p><text:s/>USD 232.00 </text:p>
          </table:table-cell>
          <table:table-cell table:style-name="ce105" office:value-type="currency" office:currency="USD" office:value="28.69" calcext:value-type="currency">
            <text:p><text:s/>USD 28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2" calcext:value-type="currency">
            <text:p><text:s/>USD 2,222.00 </text:p>
          </table:table-cell>
          <table:table-cell table:style-name="ce105" office:value-type="currency" office:currency="USD" office:value="22" calcext:value-type="currency">
            <text:p><text:s/>USD 22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2" calcext:value-type="currency">
            <text:p><text:s/>USD 32.00 </text:p>
          </table:table-cell>
          <table:table-cell table:style-name="ce114" table:formula="of:=SUM([.BT41:.CA41])" office:value-type="currency" office:currency="USD" office:value="3135.69" calcext:value-type="currency">
            <text:p><text:s/>USD 3,135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1]*[.CC41])" office:value-type="currency" office:currency="USD" office:value="3135.69" calcext:value-type="currency">
            <text:p><text:s/>USD 3,135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1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8100 Tyler Blvd., Suite 120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entor, OH</text:p>
          </table:table-cell>
          <table:table-cell table:style-name="ce6" office:value-type="string" calcext:value-type="string">
            <text:p>US157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2]" office:value-type="float" office:value="1196" calcext:value-type="float">
            <text:p><text:s/>$1,196.00 </text:p>
          </table:table-cell>
          <table:table-cell table:style-name="ce42" table:formula="of:=[.CD42]" office:value-type="float" office:value="3272.69" calcext:value-type="float">
            <text:p><text:s/>$3,272.69 </text:p>
          </table:table-cell>
          <table:table-cell table:style-name="ce42" table:formula="of:=[.CR42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2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2]" office:value-type="float" office:value="0" calcext:value-type="float">
            <text:p><text:s/>$-   </text:p>
          </table:table-cell>
          <table:table-cell table:style-name="ce47" table:formula="of:=SUM([.V42:.X42])" office:value-type="float" office:value="4955.54897435897" calcext:value-type="float">
            <text:p><text:s/>$4,955.55 </text:p>
          </table:table-cell>
          <table:table-cell table:style-name="ce47" table:formula="of:=[.AN42]+[.Y42]+[.Z42]+[.AA42]" office:value-type="float" office:value="5255.54897435897" calcext:value-type="float">
            <text:p><text:s/>$5,255.55 </text:p>
          </table:table-cell>
          <table:table-cell table:style-name="ce47" table:formula="of:=[.AN42]+[.AB42]+[.AC42]+[.AD42]" office:value-type="float" office:value="5255.54897435897" calcext:value-type="float">
            <text:p><text:s/>$5,255.55 </text:p>
          </table:table-cell>
          <table:table-cell table:style-name="ce47" table:formula="of:=[.AN42]+[.AE42]+[.AF42]+[.AG42]" office:value-type="float" office:value="5045.54897435897" calcext:value-type="float">
            <text:p><text:s/>$5,045.55 </text:p>
          </table:table-cell>
          <table:table-cell table:style-name="ce47" table:formula="of:=[.AN42]+[.AH42]+[.AI42]+[.AJ42]" office:value-type="float" office:value="5045.54897435897" calcext:value-type="float">
            <text:p><text:s/>$5,045.55 </text:p>
          </table:table-cell>
          <table:table-cell table:style-name="ce46" table:formula="of:=[.AK42]+[.AL42]+[.AM42]+[.BQ42]+[.CD42]+[.CR42]" office:value-type="float" office:value="5045.54897435897" calcext:value-type="float">
            <text:p><text:s/>$5,045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4" calcext:value-type="float">
            <text:p><text:s/>USD904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3" calcext:value-type="float">
            <text:p><text:s/>USD903.00 </text:p>
          </table:table-cell>
          <table:table-cell table:style-name="ce66" office:value-type="float" office:value="129" calcext:value-type="float">
            <text:p><text:s/>USD129.00 </text:p>
          </table:table-cell>
          <table:table-cell table:style-name="ce66" office:value-type="float" office:value="82" calcext:value-type="float">
            <text:p><text:s/>USD82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49" calcext:value-type="currency">
            <text:p><text:s/>USD 49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2]+[.BB42]+[.BC42]+[.BF42]+[.BG42]+[.BH42]+[.BL42])" office:value-type="currency" office:currency="CNY" office:value="1196" calcext:value-type="currency">
            <text:p><text:s/>CNY 1,196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2]*[.BP42])" office:value-type="currency" office:currency="USD" office:value="1196" calcext:value-type="currency">
            <text:p><text:s/>USD 1,196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31" calcext:value-type="currency">
            <text:p><text:s/>USD 731.00 </text:p>
          </table:table-cell>
          <table:table-cell table:style-name="ce105" office:value-type="currency" office:currency="USD" office:value="233" calcext:value-type="currency">
            <text:p><text:s/>USD 233.00 </text:p>
          </table:table-cell>
          <table:table-cell table:style-name="ce105" office:value-type="currency" office:currency="USD" office:value="29.69" calcext:value-type="currency">
            <text:p><text:s/>USD 29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3" calcext:value-type="currency">
            <text:p><text:s/>USD 2,223.00 </text:p>
          </table:table-cell>
          <table:table-cell table:style-name="ce105" office:value-type="currency" office:currency="USD" office:value="23" calcext:value-type="currency">
            <text:p><text:s/>USD 23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3" calcext:value-type="currency">
            <text:p><text:s/>USD 33.00 </text:p>
          </table:table-cell>
          <table:table-cell table:style-name="ce114" table:formula="of:=SUM([.BT42:.CA42])" office:value-type="currency" office:currency="USD" office:value="3272.69" calcext:value-type="currency">
            <text:p><text:s/>USD 3,272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2]*[.CC42])" office:value-type="currency" office:currency="USD" office:value="3272.69" calcext:value-type="currency">
            <text:p><text:s/>USD 3,272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2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7600 Auburn Road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entor, OH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50" calcext:value-type="float">
            <text:p>50</text:p>
          </table:table-cell>
          <table:table-cell table:style-name="ce36"/>
          <table:table-cell table:style-name="ce30" office:value-type="string" calcext:value-type="string">
            <text:p>40HQ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3]" office:value-type="float" office:value="1200" calcext:value-type="float">
            <text:p><text:s/>$1,200.00 </text:p>
          </table:table-cell>
          <table:table-cell table:style-name="ce42" table:formula="of:=[.CD43]" office:value-type="float" office:value="3277.69" calcext:value-type="float">
            <text:p><text:s/>$3,277.69 </text:p>
          </table:table-cell>
          <table:table-cell table:style-name="ce42" table:formula="of:=[.CR43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3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3]" office:value-type="float" office:value="0" calcext:value-type="float">
            <text:p><text:s/>$-   </text:p>
          </table:table-cell>
          <table:table-cell table:style-name="ce47" table:formula="of:=SUM([.V43:.X43])" office:value-type="float" office:value="4964.54897435897" calcext:value-type="float">
            <text:p><text:s/>$4,964.55 </text:p>
          </table:table-cell>
          <table:table-cell table:style-name="ce47" table:formula="of:=[.AN43]+[.Y43]+[.Z43]+[.AA43]" office:value-type="float" office:value="5264.54897435897" calcext:value-type="float">
            <text:p><text:s/>$5,264.55 </text:p>
          </table:table-cell>
          <table:table-cell table:style-name="ce47" table:formula="of:=[.AN43]+[.AB43]+[.AC43]+[.AD43]" office:value-type="float" office:value="5264.54897435897" calcext:value-type="float">
            <text:p><text:s/>$5,264.55 </text:p>
          </table:table-cell>
          <table:table-cell table:style-name="ce47" table:formula="of:=[.AN43]+[.AE43]+[.AF43]+[.AG43]" office:value-type="float" office:value="5054.54897435897" calcext:value-type="float">
            <text:p><text:s/>$5,054.55 </text:p>
          </table:table-cell>
          <table:table-cell table:style-name="ce47" table:formula="of:=[.AN43]+[.AH43]+[.AI43]+[.AJ43]" office:value-type="float" office:value="5054.54897435897" calcext:value-type="float">
            <text:p><text:s/>$5,054.55 </text:p>
          </table:table-cell>
          <table:table-cell table:style-name="ce46" table:formula="of:=[.AK43]+[.AL43]+[.AM43]+[.BQ43]+[.CD43]+[.CR43]" office:value-type="float" office:value="5054.54897435897" calcext:value-type="float">
            <text:p><text:s/>$5,054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5" calcext:value-type="float">
            <text:p><text:s/>USD905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4" calcext:value-type="float">
            <text:p><text:s/>USD904.00 </text:p>
          </table:table-cell>
          <table:table-cell table:style-name="ce66" office:value-type="float" office:value="130" calcext:value-type="float">
            <text:p><text:s/>USD130.00 </text:p>
          </table:table-cell>
          <table:table-cell table:style-name="ce66" office:value-type="float" office:value="83" calcext:value-type="float">
            <text:p><text:s/>USD83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0" calcext:value-type="currency">
            <text:p><text:s/>USD 50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3]+[.BB43]+[.BC43]+[.BF43]+[.BG43]+[.BH43]+[.BL43])" office:value-type="currency" office:currency="CNY" office:value="1200" calcext:value-type="currency">
            <text:p><text:s/>CNY 1,200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3]*[.BP43])" office:value-type="currency" office:currency="USD" office:value="1200" calcext:value-type="currency">
            <text:p><text:s/>USD 1,200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31" calcext:value-type="currency">
            <text:p><text:s/>USD 731.00 </text:p>
          </table:table-cell>
          <table:table-cell table:style-name="ce105" office:value-type="currency" office:currency="USD" office:value="234" calcext:value-type="currency">
            <text:p><text:s/>USD 234.00 </text:p>
          </table:table-cell>
          <table:table-cell table:style-name="ce105" office:value-type="currency" office:currency="USD" office:value="30.69" calcext:value-type="currency">
            <text:p><text:s/>USD 30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4" calcext:value-type="currency">
            <text:p><text:s/>USD 2,224.00 </text:p>
          </table:table-cell>
          <table:table-cell table:style-name="ce105" office:value-type="currency" office:currency="USD" office:value="24" calcext:value-type="currency">
            <text:p><text:s/>USD 24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4" calcext:value-type="currency">
            <text:p><text:s/>USD 34.00 </text:p>
          </table:table-cell>
          <table:table-cell table:style-name="ce114" table:formula="of:=SUM([.BT43:.CA43])" office:value-type="currency" office:currency="USD" office:value="3277.69" calcext:value-type="currency">
            <text:p><text:s/>USD 3,277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3]*[.CC43])" office:value-type="currency" office:currency="USD" office:value="3277.69" calcext:value-type="currency">
            <text:p><text:s/>USD 3,277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3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171 Draketown Rd.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ill Hall, PA</text:p>
          </table:table-cell>
          <table:table-cell table:style-name="ce6" office:value-type="string" calcext:value-type="string">
            <text:p>US045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PHILADELPHIA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4]" office:value-type="float" office:value="1204" calcext:value-type="float">
            <text:p><text:s/>$1,204.00 </text:p>
          </table:table-cell>
          <table:table-cell table:style-name="ce42" table:formula="of:=[.CD44]" office:value-type="float" office:value="3511.69" calcext:value-type="float">
            <text:p><text:s/>$3,511.69 </text:p>
          </table:table-cell>
          <table:table-cell table:style-name="ce42" table:formula="of:=[.CR44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4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4]" office:value-type="float" office:value="0" calcext:value-type="float">
            <text:p><text:s/>$-   </text:p>
          </table:table-cell>
          <table:table-cell table:style-name="ce47" table:formula="of:=SUM([.V44:.X44])" office:value-type="float" office:value="5159.27974358974" calcext:value-type="float">
            <text:p><text:s/>$5,159.28 </text:p>
          </table:table-cell>
          <table:table-cell table:style-name="ce47" table:formula="of:=[.AN44]+[.Y44]+[.Z44]+[.AA44]" office:value-type="float" office:value="5459.27974358974" calcext:value-type="float">
            <text:p><text:s/>$5,459.28 </text:p>
          </table:table-cell>
          <table:table-cell table:style-name="ce47" table:formula="of:=[.AN44]+[.AB44]+[.AC44]+[.AD44]" office:value-type="float" office:value="5459.27974358974" calcext:value-type="float">
            <text:p><text:s/>$5,459.28 </text:p>
          </table:table-cell>
          <table:table-cell table:style-name="ce47" table:formula="of:=[.AN44]+[.AE44]+[.AF44]+[.AG44]" office:value-type="float" office:value="5249.27974358974" calcext:value-type="float">
            <text:p><text:s/>$5,249.28 </text:p>
          </table:table-cell>
          <table:table-cell table:style-name="ce47" table:formula="of:=[.AN44]+[.AH44]+[.AI44]+[.AJ44]" office:value-type="float" office:value="5249.27974358974" calcext:value-type="float">
            <text:p><text:s/>$5,249.28 </text:p>
          </table:table-cell>
          <table:table-cell table:style-name="ce46" table:formula="of:=[.AK44]+[.AL44]+[.AM44]+[.BQ44]+[.CD44]+[.CR44]" office:value-type="float" office:value="5249.27974358975" calcext:value-type="float">
            <text:p><text:s/>$5,249.28 </text:p>
          </table:table-cell>
          <table:table-cell table:style-name="ce50" office:value-type="float" office:value="23" calcext:value-type="float">
            <text:p>23</text:p>
          </table:table-cell>
          <table:table-cell table:style-name="ce54" office:value-type="string" calcext:value-type="string">
            <text:p>PHILADELPHIA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6" calcext:value-type="float">
            <text:p><text:s/>USD906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5" calcext:value-type="float">
            <text:p><text:s/>USD905.00 </text:p>
          </table:table-cell>
          <table:table-cell table:style-name="ce66" office:value-type="float" office:value="131" calcext:value-type="float">
            <text:p><text:s/>USD131.00 </text:p>
          </table:table-cell>
          <table:table-cell table:style-name="ce66" office:value-type="float" office:value="84" calcext:value-type="float">
            <text:p><text:s/>USD84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1" calcext:value-type="currency">
            <text:p><text:s/>USD 51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4]+[.BB44]+[.BC44]+[.BF44]+[.BG44]+[.BH44]+[.BL44])" office:value-type="currency" office:currency="CNY" office:value="1204" calcext:value-type="currency">
            <text:p><text:s/>CNY 1,204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4]*[.BP44])" office:value-type="currency" office:currency="USD" office:value="1204" calcext:value-type="currency">
            <text:p><text:s/>USD 1,204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960" calcext:value-type="currency">
            <text:p><text:s/>USD 960.00 </text:p>
          </table:table-cell>
          <table:table-cell table:style-name="ce105" office:value-type="currency" office:currency="USD" office:value="235" calcext:value-type="currency">
            <text:p><text:s/>USD 235.00 </text:p>
          </table:table-cell>
          <table:table-cell table:style-name="ce105" office:value-type="currency" office:currency="USD" office:value="31.69" calcext:value-type="currency">
            <text:p><text:s/>USD 31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5" calcext:value-type="currency">
            <text:p><text:s/>USD 2,225.00 </text:p>
          </table:table-cell>
          <table:table-cell table:style-name="ce105" office:value-type="currency" office:currency="USD" office:value="25" calcext:value-type="currency">
            <text:p><text:s/>USD 25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5" calcext:value-type="currency">
            <text:p><text:s/>USD 35.00 </text:p>
          </table:table-cell>
          <table:table-cell table:style-name="ce114" table:formula="of:=SUM([.BT44:.CA44])" office:value-type="currency" office:currency="USD" office:value="3511.69" calcext:value-type="currency">
            <text:p><text:s/>USD 3,511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4]*[.CC44])" office:value-type="currency" office:currency="USD" office:value="3511.69" calcext:value-type="currency">
            <text:p><text:s/>USD 3,511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4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171 Draketown Rd.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ill Hall, PA</text:p>
          </table:table-cell>
          <table:table-cell table:style-name="ce6" office:value-type="string" calcext:value-type="string">
            <text:p>US045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PHILADELPHIA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0" office:value-type="string" calcext:value-type="string">
            <text:p>40RF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5]" office:value-type="float" office:value="1383" calcext:value-type="float">
            <text:p><text:s/>$1,383.00 </text:p>
          </table:table-cell>
          <table:table-cell table:style-name="ce42" table:formula="of:=[.CD45]" office:value-type="float" office:value="5395.69" calcext:value-type="float">
            <text:p><text:s/>$5,395.69 </text:p>
          </table:table-cell>
          <table:table-cell table:style-name="ce42" table:formula="of:=[.CR45]" office:value-type="float" office:value="410.897435897436" calcext:value-type="float">
            <text:p><text:s/>$410.9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5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5]" office:value-type="float" office:value="0" calcext:value-type="float">
            <text:p><text:s/>$-   </text:p>
          </table:table-cell>
          <table:table-cell table:style-name="ce47" table:formula="of:=SUM([.V45:.X45])" office:value-type="float" office:value="7189.58743589744" calcext:value-type="float">
            <text:p><text:s/>$7,189.59 </text:p>
          </table:table-cell>
          <table:table-cell table:style-name="ce47" table:formula="of:=[.AN45]+[.Y45]+[.Z45]+[.AA45]" office:value-type="float" office:value="7189.58743589744" calcext:value-type="float">
            <text:p><text:s/>$7,189.59 </text:p>
          </table:table-cell>
          <table:table-cell table:style-name="ce47" table:formula="of:=[.AN45]+[.AB45]+[.AC45]+[.AD45]" office:value-type="float" office:value="7189.58743589744" calcext:value-type="float">
            <text:p><text:s/>$7,189.59 </text:p>
          </table:table-cell>
          <table:table-cell table:style-name="ce47" table:formula="of:=[.AN45]+[.AE45]+[.AF45]+[.AG45]" office:value-type="float" office:value="7279.58743589744" calcext:value-type="float">
            <text:p><text:s/>$7,279.59 </text:p>
          </table:table-cell>
          <table:table-cell table:style-name="ce47" table:formula="of:=[.AN45]+[.AH45]+[.AI45]+[.AJ45]" office:value-type="float" office:value="7279.58743589744" calcext:value-type="float">
            <text:p><text:s/>$7,279.59 </text:p>
          </table:table-cell>
          <table:table-cell table:style-name="ce46" table:formula="of:=[.AK45]+[.AL45]+[.AM45]+[.BQ45]+[.CD45]+[.CR45]" office:value-type="float" office:value="7279.58743589744" calcext:value-type="float">
            <text:p><text:s/>$7,279.59 </text:p>
          </table:table-cell>
          <table:table-cell table:style-name="ce50" office:value-type="float" office:value="23" calcext:value-type="float">
            <text:p>23</text:p>
          </table:table-cell>
          <table:table-cell table:style-name="ce54" office:value-type="string" calcext:value-type="string">
            <text:p>PHILADELPHIA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60" calcext:value-type="float">
            <text:p><text:s/>USD9,06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6" calcext:value-type="float">
            <text:p><text:s/>USD906.00 </text:p>
          </table:table-cell>
          <table:table-cell table:style-name="ce66" office:value-type="float" office:value="132" calcext:value-type="float">
            <text:p><text:s/>USD132.00 </text:p>
          </table:table-cell>
          <table:table-cell table:style-name="ce66" office:value-type="float" office:value="85" calcext:value-type="float">
            <text:p><text:s/>USD85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2" calcext:value-type="currency">
            <text:p><text:s/>USD 52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<text:s/>Reefer Surcharge</text:p>
          </table:table-cell>
          <table:table-cell table:number-columns-repeated="2" table:style-name="ce80" office:value-type="currency" office:currency="USD" office:value="175" calcext:value-type="currency">
            <text:p><text:s/>USD 175.00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5]+[.BB45]+[.BC45]+[.BF45]+[.BG45]+[.BH45]+[.BL45])" office:value-type="currency" office:currency="CNY" office:value="1383" calcext:value-type="currency">
            <text:p><text:s/>CNY 1,383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5]*[.BP45])" office:value-type="currency" office:currency="USD" office:value="1383" calcext:value-type="currency">
            <text:p><text:s/>USD 1,383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2839" calcext:value-type="currency">
            <text:p><text:s/>USD 2,839.00 </text:p>
          </table:table-cell>
          <table:table-cell table:style-name="ce105" office:value-type="currency" office:currency="USD" office:value="236" calcext:value-type="currency">
            <text:p><text:s/>USD 236.00 </text:p>
          </table:table-cell>
          <table:table-cell table:style-name="ce105" office:value-type="currency" office:currency="USD" office:value="32.69" calcext:value-type="currency">
            <text:p><text:s/>USD 32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6" calcext:value-type="currency">
            <text:p><text:s/>USD 2,226.00 </text:p>
          </table:table-cell>
          <table:table-cell table:style-name="ce105" office:value-type="currency" office:currency="USD" office:value="26" calcext:value-type="currency">
            <text:p><text:s/>USD 26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6" calcext:value-type="currency">
            <text:p><text:s/>USD 36.00 </text:p>
          </table:table-cell>
          <table:table-cell table:style-name="ce114" table:formula="of:=SUM([.BT45:.CA45])" office:value-type="currency" office:currency="USD" office:value="5395.69" calcext:value-type="currency">
            <text:p><text:s/>USD 5,395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5]*[.CC45])" office:value-type="currency" office:currency="USD" office:value="5395.69" calcext:value-type="currency">
            <text:p><text:s/>USD 5,395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10.897435897436" calcext:value-type="currency">
            <text:p><text:s/>USD 410.90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5]" office:value-type="currency" office:currency="USD" office:value="410.897435897436" calcext:value-type="currency">
            <text:p><text:s/>USD 410.90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Viam</text:p>
          </table:table-cell>
          <table:table-cell table:style-name="ce6" office:value-type="string" calcext:value-type="string">
            <text:p>149 Pope Road 37814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Morristown, TN</text:p>
          </table:table-cell>
          <table:table-cell table:style-name="ce6"/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Charleston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6]" office:value-type="float" office:value="1212" calcext:value-type="float">
            <text:p><text:s/>$1,212.00 </text:p>
          </table:table-cell>
          <table:table-cell table:style-name="ce42" table:formula="of:=[.CD46]" office:value-type="float" office:value="3184.69" calcext:value-type="float">
            <text:p><text:s/>$3,184.69 </text:p>
          </table:table-cell>
          <table:table-cell table:style-name="ce42" table:formula="of:=[.CR46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6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6]" office:value-type="float" office:value="0" calcext:value-type="float">
            <text:p><text:s/>$-   </text:p>
          </table:table-cell>
          <table:table-cell table:style-name="ce47" table:formula="of:=SUM([.V46:.X46])" office:value-type="float" office:value="4840.27974358974" calcext:value-type="float">
            <text:p><text:s/>$4,840.28 </text:p>
          </table:table-cell>
          <table:table-cell table:style-name="ce47" table:formula="of:=[.AN46]+[.Y46]+[.Z46]+[.AA46]" office:value-type="float" office:value="5140.27974358974" calcext:value-type="float">
            <text:p><text:s/>$5,140.28 </text:p>
          </table:table-cell>
          <table:table-cell table:style-name="ce47" table:formula="of:=[.AN46]+[.AB46]+[.AC46]+[.AD46]" office:value-type="float" office:value="5140.27974358974" calcext:value-type="float">
            <text:p><text:s/>$5,140.28 </text:p>
          </table:table-cell>
          <table:table-cell table:style-name="ce47" table:formula="of:=[.AN46]+[.AE46]+[.AF46]+[.AG46]" office:value-type="float" office:value="4930.27974358974" calcext:value-type="float">
            <text:p><text:s/>$4,930.28 </text:p>
          </table:table-cell>
          <table:table-cell table:style-name="ce47" table:formula="of:=[.AN46]+[.AH46]+[.AI46]+[.AJ46]" office:value-type="float" office:value="4930.27974358974" calcext:value-type="float">
            <text:p><text:s/>$4,930.28 </text:p>
          </table:table-cell>
          <table:table-cell table:style-name="ce46" table:formula="of:=[.AK46]+[.AL46]+[.AM46]+[.BQ46]+[.CD46]+[.CR46]" office:value-type="float" office:value="4930.27974358975" calcext:value-type="float">
            <text:p><text:s/>$4,930.28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Charleston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70" calcext:value-type="float">
            <text:p><text:s/>USD9,07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7" calcext:value-type="float">
            <text:p><text:s/>USD907.00 </text:p>
          </table:table-cell>
          <table:table-cell table:style-name="ce66" office:value-type="float" office:value="133" calcext:value-type="float">
            <text:p><text:s/>USD133.00 </text:p>
          </table:table-cell>
          <table:table-cell table:style-name="ce66" office:value-type="float" office:value="86" calcext:value-type="float">
            <text:p><text:s/>USD86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3" calcext:value-type="currency">
            <text:p><text:s/>USD 53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6]+[.BB46]+[.BC46]+[.BF46]+[.BG46]+[.BH46]+[.BL46])" office:value-type="currency" office:currency="CNY" office:value="1212" calcext:value-type="currency">
            <text:p><text:s/>CNY 1,212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6]*[.BP46])" office:value-type="currency" office:currency="USD" office:value="1212" calcext:value-type="currency">
            <text:p><text:s/>USD 1,212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623" calcext:value-type="currency">
            <text:p><text:s/>USD 623.00 </text:p>
          </table:table-cell>
          <table:table-cell table:style-name="ce105" office:value-type="currency" office:currency="USD" office:value="237" calcext:value-type="currency">
            <text:p><text:s/>USD 237.00 </text:p>
          </table:table-cell>
          <table:table-cell table:style-name="ce105" office:value-type="currency" office:currency="USD" office:value="33.69" calcext:value-type="currency">
            <text:p><text:s/>USD 33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7" calcext:value-type="currency">
            <text:p><text:s/>USD 2,227.00 </text:p>
          </table:table-cell>
          <table:table-cell table:style-name="ce105" office:value-type="currency" office:currency="USD" office:value="27" calcext:value-type="currency">
            <text:p><text:s/>USD 27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7" calcext:value-type="currency">
            <text:p><text:s/>USD 37.00 </text:p>
          </table:table-cell>
          <table:table-cell table:style-name="ce114" table:formula="of:=SUM([.BT46:.CA46])" office:value-type="currency" office:currency="USD" office:value="3184.69" calcext:value-type="currency">
            <text:p><text:s/>USD 3,184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6]*[.CC46])" office:value-type="currency" office:currency="USD" office:value="3184.69" calcext:value-type="currency">
            <text:p><text:s/>USD 3,184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6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7542 N Natchez Ave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Niles, IL</text:p>
          </table:table-cell>
          <table:table-cell table:style-name="ce6" office:value-type="string" calcext:value-type="string">
            <text:p>US050S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Jacksonville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8" calcext:value-type="float">
            <text:p>28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7]" office:value-type="float" office:value="1216" calcext:value-type="float">
            <text:p><text:s/>$1,216.00 </text:p>
          </table:table-cell>
          <table:table-cell table:style-name="ce42" table:formula="of:=[.CD47]" office:value-type="float" office:value="3372.69" calcext:value-type="float">
            <text:p><text:s/>$3,372.69 </text:p>
          </table:table-cell>
          <table:table-cell table:style-name="ce42" table:formula="of:=[.CR47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 table:number-columns-repeated="2"/>
          <table:table-cell table:style-name="ce41" table:formula="of:=[.AH47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7]" office:value-type="float" office:value="0" calcext:value-type="float">
            <text:p><text:s/>$-   </text:p>
          </table:table-cell>
          <table:table-cell table:style-name="ce47" table:formula="of:=SUM([.V47:.X47])" office:value-type="float" office:value="5032.27974358974" calcext:value-type="float">
            <text:p><text:s/>$5,032.28 </text:p>
          </table:table-cell>
          <table:table-cell table:style-name="ce47" table:formula="of:=[.AN47]+[.Y47]+[.Z47]+[.AA47]" office:value-type="float" office:value="5182.27974358974" calcext:value-type="float">
            <text:p><text:s/>$5,182.28 </text:p>
          </table:table-cell>
          <table:table-cell table:style-name="ce47" table:formula="of:=[.AN47]+[.AB47]+[.AC47]+[.AD47]" office:value-type="float" office:value="5182.27974358974" calcext:value-type="float">
            <text:p><text:s/>$5,182.28 </text:p>
          </table:table-cell>
          <table:table-cell table:style-name="ce47" table:formula="of:=[.AN47]+[.AE47]+[.AF47]+[.AG47]" office:value-type="float" office:value="5077.27974358974" calcext:value-type="float">
            <text:p><text:s/>$5,077.28 </text:p>
          </table:table-cell>
          <table:table-cell table:style-name="ce47" table:formula="of:=[.AN47]+[.AH47]+[.AI47]+[.AJ47]" office:value-type="float" office:value="5077.27974358974" calcext:value-type="float">
            <text:p><text:s/>$5,077.28 </text:p>
          </table:table-cell>
          <table:table-cell table:style-name="ce46" table:formula="of:=[.AK47]+[.AL47]+[.AM47]+[.BQ47]+[.CD47]+[.CR47]" office:value-type="float" office:value="5077.27974358974" calcext:value-type="float">
            <text:p><text:s/>$5,077.28 </text:p>
          </table:table-cell>
          <table:table-cell table:style-name="ce50" office:value-type="float" office:value="22" calcext:value-type="float">
            <text:p>22</text:p>
          </table:table-cell>
          <table:table-cell table:style-name="ce54" office:value-type="string" calcext:value-type="string">
            <text:p>Jacksonville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80" calcext:value-type="float">
            <text:p><text:s/>USD9,08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8" calcext:value-type="float">
            <text:p><text:s/>USD908.00 </text:p>
          </table:table-cell>
          <table:table-cell table:style-name="ce66" office:value-type="float" office:value="134" calcext:value-type="float">
            <text:p><text:s/>USD134.00 </text:p>
          </table:table-cell>
          <table:table-cell table:style-name="ce66" office:value-type="float" office:value="87" calcext:value-type="float">
            <text:p><text:s/>USD87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4" calcext:value-type="currency">
            <text:p><text:s/>USD 54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7]+[.BB47]+[.BC47]+[.BF47]+[.BG47]+[.BH47]+[.BL47])" office:value-type="currency" office:currency="CNY" office:value="1216" calcext:value-type="currency">
            <text:p><text:s/>CNY 1,216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7]*[.BP47])" office:value-type="currency" office:currency="USD" office:value="1216" calcext:value-type="currency">
            <text:p><text:s/>USD 1,216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806" calcext:value-type="currency">
            <text:p><text:s/>USD 806.00 </text:p>
          </table:table-cell>
          <table:table-cell table:style-name="ce105" office:value-type="currency" office:currency="USD" office:value="238" calcext:value-type="currency">
            <text:p><text:s/>USD 238.00 </text:p>
          </table:table-cell>
          <table:table-cell table:style-name="ce105" office:value-type="currency" office:currency="USD" office:value="34.69" calcext:value-type="currency">
            <text:p><text:s/>USD 34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8" calcext:value-type="currency">
            <text:p><text:s/>USD 2,228.00 </text:p>
          </table:table-cell>
          <table:table-cell table:style-name="ce105" office:value-type="currency" office:currency="USD" office:value="28" calcext:value-type="currency">
            <text:p><text:s/>USD 28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8" calcext:value-type="currency">
            <text:p><text:s/>USD 38.00 </text:p>
          </table:table-cell>
          <table:table-cell table:style-name="ce114" table:formula="of:=SUM([.BT47:.CA47])" office:value-type="currency" office:currency="USD" office:value="3372.69" calcext:value-type="currency">
            <text:p><text:s/>USD 3,372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7]*[.CC47])" office:value-type="currency" office:currency="USD" office:value="3372.69" calcext:value-type="currency">
            <text:p><text:s/>USD 3,372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7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7542 N Natchez Ave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Niles, IL</text:p>
          </table:table-cell>
          <table:table-cell table:style-name="ce6" office:value-type="string" calcext:value-type="string">
            <text:p>US050S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Jacksonville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 office:value-type="float" office:value="28" calcext:value-type="float">
            <text:p>28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8]" office:value-type="float" office:value="1220" calcext:value-type="float">
            <text:p><text:s/>$1,220.00 </text:p>
          </table:table-cell>
          <table:table-cell table:style-name="ce42" table:formula="of:=[.CD48]" office:value-type="float" office:value="3287.69" calcext:value-type="float">
            <text:p><text:s/>$3,287.69 </text:p>
          </table:table-cell>
          <table:table-cell table:style-name="ce42" table:formula="of:=[.CR48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48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8]" office:value-type="float" office:value="0" calcext:value-type="float">
            <text:p><text:s/>$-   </text:p>
          </table:table-cell>
          <table:table-cell table:style-name="ce47" table:formula="of:=SUM([.V48:.X48])" office:value-type="float" office:value="4951.27974358974" calcext:value-type="float">
            <text:p><text:s/>$4,951.28 </text:p>
          </table:table-cell>
          <table:table-cell table:style-name="ce47" table:formula="of:=[.AN48]+[.Y48]+[.Z48]+[.AA48]" office:value-type="float" office:value="5251.27974358974" calcext:value-type="float">
            <text:p><text:s/>$5,251.28 </text:p>
          </table:table-cell>
          <table:table-cell table:style-name="ce47" table:formula="of:=[.AN48]+[.AB48]+[.AC48]+[.AD48]" office:value-type="float" office:value="5251.27974358974" calcext:value-type="float">
            <text:p><text:s/>$5,251.28 </text:p>
          </table:table-cell>
          <table:table-cell table:style-name="ce47" table:formula="of:=[.AN48]+[.AE48]+[.AF48]+[.AG48]" office:value-type="float" office:value="5041.27974358974" calcext:value-type="float">
            <text:p><text:s/>$5,041.28 </text:p>
          </table:table-cell>
          <table:table-cell table:style-name="ce47" table:formula="of:=[.AN48]+[.AH48]+[.AI48]+[.AJ48]" office:value-type="float" office:value="5041.27974358974" calcext:value-type="float">
            <text:p><text:s/>$5,041.28 </text:p>
          </table:table-cell>
          <table:table-cell table:style-name="ce46" table:formula="of:=[.AK48]+[.AL48]+[.AM48]+[.BQ48]+[.CD48]+[.CR48]" office:value-type="float" office:value="5041.27974358975" calcext:value-type="float">
            <text:p><text:s/>$5,041.28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090" calcext:value-type="float">
            <text:p><text:s/>USD9,09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09" calcext:value-type="float">
            <text:p><text:s/>USD909.00 </text:p>
          </table:table-cell>
          <table:table-cell table:style-name="ce66" office:value-type="float" office:value="135" calcext:value-type="float">
            <text:p><text:s/>USD135.00 </text:p>
          </table:table-cell>
          <table:table-cell table:style-name="ce66" office:value-type="float" office:value="88" calcext:value-type="float">
            <text:p><text:s/>USD88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5" calcext:value-type="currency">
            <text:p><text:s/>USD 55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8]+[.BB48]+[.BC48]+[.BF48]+[.BG48]+[.BH48]+[.BL48])" office:value-type="currency" office:currency="CNY" office:value="1220" calcext:value-type="currency">
            <text:p><text:s/>CNY 1,220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8]*[.BP48])" office:value-type="currency" office:currency="USD" office:value="1220" calcext:value-type="currency">
            <text:p><text:s/>USD 1,220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16" calcext:value-type="currency">
            <text:p><text:s/>USD 716.00 </text:p>
          </table:table-cell>
          <table:table-cell table:style-name="ce105" office:value-type="currency" office:currency="USD" office:value="239" calcext:value-type="currency">
            <text:p><text:s/>USD 239.00 </text:p>
          </table:table-cell>
          <table:table-cell table:style-name="ce105" office:value-type="currency" office:currency="USD" office:value="35.69" calcext:value-type="currency">
            <text:p><text:s/>USD 35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29" calcext:value-type="currency">
            <text:p><text:s/>USD 2,229.00 </text:p>
          </table:table-cell>
          <table:table-cell table:style-name="ce105" office:value-type="currency" office:currency="USD" office:value="29" calcext:value-type="currency">
            <text:p><text:s/>USD 29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39" calcext:value-type="currency">
            <text:p><text:s/>USD 39.00 </text:p>
          </table:table-cell>
          <table:table-cell table:style-name="ce114" table:formula="of:=SUM([.BT48:.CA48])" office:value-type="currency" office:currency="USD" office:value="3287.69" calcext:value-type="currency">
            <text:p><text:s/>USD 3,287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8]*[.CC48])" office:value-type="currency" office:currency="USD" office:value="3287.69" calcext:value-type="currency">
            <text:p><text:s/>USD 3,287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8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250 Chester Street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Painesville, OH</text:p>
          </table:table-cell>
          <table:table-cell table:style-name="ce6" office:value-type="string" calcext:value-type="string">
            <text:p>US056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49]" office:value-type="float" office:value="1224" calcext:value-type="float">
            <text:p><text:s/>$1,224.00 </text:p>
          </table:table-cell>
          <table:table-cell table:style-name="ce42" table:formula="of:=[.CD49]" office:value-type="float" office:value="3199.69" calcext:value-type="float">
            <text:p><text:s/>$3,199.69 </text:p>
          </table:table-cell>
          <table:table-cell table:style-name="ce42" table:formula="of:=[.CR49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 table:number-columns-repeated="2"/>
          <table:table-cell table:style-name="ce41" table:formula="of:=[.AH49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49]" office:value-type="float" office:value="0" calcext:value-type="float">
            <text:p><text:s/>$-   </text:p>
          </table:table-cell>
          <table:table-cell table:style-name="ce47" table:formula="of:=SUM([.V49:.X49])" office:value-type="float" office:value="4910.54897435897" calcext:value-type="float">
            <text:p><text:s/>$4,910.55 </text:p>
          </table:table-cell>
          <table:table-cell table:style-name="ce47" table:formula="of:=[.AN49]+[.Y49]+[.Z49]+[.AA49]" office:value-type="float" office:value="5060.54897435897" calcext:value-type="float">
            <text:p><text:s/>$5,060.55 </text:p>
          </table:table-cell>
          <table:table-cell table:style-name="ce47" table:formula="of:=[.AN49]+[.AB49]+[.AC49]+[.AD49]" office:value-type="float" office:value="5060.54897435897" calcext:value-type="float">
            <text:p><text:s/>$5,060.55 </text:p>
          </table:table-cell>
          <table:table-cell table:style-name="ce47" table:formula="of:=[.AN49]+[.AE49]+[.AF49]+[.AG49]" office:value-type="float" office:value="4955.54897435897" calcext:value-type="float">
            <text:p><text:s/>$4,955.55 </text:p>
          </table:table-cell>
          <table:table-cell table:style-name="ce47" table:formula="of:=[.AN49]+[.AH49]+[.AI49]+[.AJ49]" office:value-type="float" office:value="4955.54897435897" calcext:value-type="float">
            <text:p><text:s/>$4,955.55 </text:p>
          </table:table-cell>
          <table:table-cell table:style-name="ce46" table:formula="of:=[.AK49]+[.AL49]+[.AM49]+[.BQ49]+[.CD49]+[.CR49]" office:value-type="float" office:value="4955.54897435897" calcext:value-type="float">
            <text:p><text:s/>$4,955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00" calcext:value-type="float">
            <text:p><text:s/>USD9,10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0" calcext:value-type="float">
            <text:p><text:s/>USD910.00 </text:p>
          </table:table-cell>
          <table:table-cell table:style-name="ce66" office:value-type="float" office:value="136" calcext:value-type="float">
            <text:p><text:s/>USD136.00 </text:p>
          </table:table-cell>
          <table:table-cell table:style-name="ce66" office:value-type="float" office:value="89" calcext:value-type="float">
            <text:p><text:s/>USD89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6" calcext:value-type="currency">
            <text:p><text:s/>USD 56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49]+[.BB49]+[.BC49]+[.BF49]+[.BG49]+[.BH49]+[.BL49])" office:value-type="currency" office:currency="CNY" office:value="1224" calcext:value-type="currency">
            <text:p><text:s/>CNY 1,224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49]*[.BP49])" office:value-type="currency" office:currency="USD" office:value="1224" calcext:value-type="currency">
            <text:p><text:s/>USD 1,224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623" calcext:value-type="currency">
            <text:p><text:s/>USD 623.00 </text:p>
          </table:table-cell>
          <table:table-cell table:style-name="ce105" office:value-type="currency" office:currency="USD" office:value="240" calcext:value-type="currency">
            <text:p><text:s/>USD 240.00 </text:p>
          </table:table-cell>
          <table:table-cell table:style-name="ce105" office:value-type="currency" office:currency="USD" office:value="36.69" calcext:value-type="currency">
            <text:p><text:s/>USD 36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30" calcext:value-type="currency">
            <text:p><text:s/>USD 2,230.00 </text:p>
          </table:table-cell>
          <table:table-cell table:style-name="ce105" office:value-type="currency" office:currency="USD" office:value="30" calcext:value-type="currency">
            <text:p><text:s/>USD 30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0" calcext:value-type="currency">
            <text:p><text:s/>USD 40.00 </text:p>
          </table:table-cell>
          <table:table-cell table:style-name="ce114" table:formula="of:=SUM([.BT49:.CA49])" office:value-type="currency" office:currency="USD" office:value="3199.69" calcext:value-type="currency">
            <text:p><text:s/>USD 3,199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49]*[.CC49])" office:value-type="currency" office:currency="USD" office:value="3199.69" calcext:value-type="currency">
            <text:p><text:s/>USD 3,199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49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250 Chester Street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Painesville, OH</text:p>
          </table:table-cell>
          <table:table-cell table:style-name="ce6" office:value-type="string" calcext:value-type="string">
            <text:p>US056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50]" office:value-type="float" office:value="1228" calcext:value-type="float">
            <text:p><text:s/>$1,228.00 </text:p>
          </table:table-cell>
          <table:table-cell table:style-name="ce42" table:formula="of:=[.CD50]" office:value-type="float" office:value="3339.69" calcext:value-type="float">
            <text:p><text:s/>$3,339.69 </text:p>
          </table:table-cell>
          <table:table-cell table:style-name="ce42" table:formula="of:=[.CR50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50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50]" office:value-type="float" office:value="0" calcext:value-type="float">
            <text:p><text:s/>$-   </text:p>
          </table:table-cell>
          <table:table-cell table:style-name="ce47" table:formula="of:=SUM([.V50:.X50])" office:value-type="float" office:value="5054.54897435897" calcext:value-type="float">
            <text:p><text:s/>$5,054.55 </text:p>
          </table:table-cell>
          <table:table-cell table:style-name="ce47" table:formula="of:=[.AN50]+[.Y50]+[.Z50]+[.AA50]" office:value-type="float" office:value="5354.54897435897" calcext:value-type="float">
            <text:p><text:s/>$5,354.55 </text:p>
          </table:table-cell>
          <table:table-cell table:style-name="ce47" table:formula="of:=[.AN50]+[.AB50]+[.AC50]+[.AD50]" office:value-type="float" office:value="5354.54897435897" calcext:value-type="float">
            <text:p><text:s/>$5,354.55 </text:p>
          </table:table-cell>
          <table:table-cell table:style-name="ce47" table:formula="of:=[.AN50]+[.AE50]+[.AF50]+[.AG50]" office:value-type="float" office:value="5144.54897435897" calcext:value-type="float">
            <text:p><text:s/>$5,144.55 </text:p>
          </table:table-cell>
          <table:table-cell table:style-name="ce47" table:formula="of:=[.AN50]+[.AH50]+[.AI50]+[.AJ50]" office:value-type="float" office:value="5144.54897435897" calcext:value-type="float">
            <text:p><text:s/>$5,144.55 </text:p>
          </table:table-cell>
          <table:table-cell table:style-name="ce46" table:formula="of:=[.AK50]+[.AL50]+[.AM50]+[.BQ50]+[.CD50]+[.CR50]" office:value-type="float" office:value="5144.54897435897" calcext:value-type="float">
            <text:p><text:s/>$5,144.55 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10" calcext:value-type="float">
            <text:p><text:s/>USD9,11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1" calcext:value-type="float">
            <text:p><text:s/>USD911.00 </text:p>
          </table:table-cell>
          <table:table-cell table:style-name="ce66" office:value-type="float" office:value="137" calcext:value-type="float">
            <text:p><text:s/>USD137.00 </text:p>
          </table:table-cell>
          <table:table-cell table:style-name="ce66" office:value-type="float" office:value="90" calcext:value-type="float">
            <text:p><text:s/>USD90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7" calcext:value-type="currency">
            <text:p><text:s/>USD 57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50]+[.BB50]+[.BC50]+[.BF50]+[.BG50]+[.BH50]+[.BL50])" office:value-type="currency" office:currency="CNY" office:value="1228" calcext:value-type="currency">
            <text:p><text:s/>CNY 1,228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50]*[.BP50])" office:value-type="currency" office:currency="USD" office:value="1228" calcext:value-type="currency">
            <text:p><text:s/>USD 1,228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758" calcext:value-type="currency">
            <text:p><text:s/>USD 758.00 </text:p>
          </table:table-cell>
          <table:table-cell table:style-name="ce105" office:value-type="currency" office:currency="USD" office:value="241" calcext:value-type="currency">
            <text:p><text:s/>USD 241.00 </text:p>
          </table:table-cell>
          <table:table-cell table:style-name="ce105" office:value-type="currency" office:currency="USD" office:value="37.69" calcext:value-type="currency">
            <text:p><text:s/>USD 37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31" calcext:value-type="currency">
            <text:p><text:s/>USD 2,231.00 </text:p>
          </table:table-cell>
          <table:table-cell table:style-name="ce105" office:value-type="currency" office:currency="USD" office:value="31" calcext:value-type="currency">
            <text:p><text:s/>USD 31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1" calcext:value-type="currency">
            <text:p><text:s/>USD 41.00 </text:p>
          </table:table-cell>
          <table:table-cell table:style-name="ce114" table:formula="of:=SUM([.BT50:.CA50])" office:value-type="currency" office:currency="USD" office:value="3339.69" calcext:value-type="currency">
            <text:p><text:s/>USD 3,339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50]*[.CC50])" office:value-type="currency" office:currency="USD" office:value="3339.69" calcext:value-type="currency">
            <text:p><text:s/>USD 3,339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50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513 Highway 74 South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Peachtree City, GA</text:p>
          </table:table-cell>
          <table:table-cell table:style-name="ce6" office:value-type="string" calcext:value-type="string">
            <text:p>US068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avannah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0" office:value-type="string" calcext:value-type="string">
            <text:p>2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51]" office:value-type="float" office:value="1232" calcext:value-type="float">
            <text:p><text:s/>$1,232.00 </text:p>
          </table:table-cell>
          <table:table-cell table:style-name="ce42" table:formula="of:=[.CD51]" office:value-type="float" office:value="3067.69" calcext:value-type="float">
            <text:p><text:s/>$3,067.69 </text:p>
          </table:table-cell>
          <table:table-cell table:style-name="ce42" table:formula="of:=[.CR51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150" calcext:value-type="float">
            <text:p><text:s/>$150.00 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45" calcext:value-type="float">
            <text:p><text:s/>$45.00 </text:p>
          </table:table-cell>
          <table:table-cell table:style-name="ce42" table:number-columns-repeated="2"/>
          <table:table-cell table:style-name="ce41" table:formula="of:=[.AH51]" office:value-type="float" office:value="45" calcext:value-type="float">
            <text:p><text:s/>$45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51]" office:value-type="float" office:value="0" calcext:value-type="float">
            <text:p><text:s/>$-   </text:p>
          </table:table-cell>
          <table:table-cell table:style-name="ce47" table:formula="of:=SUM([.V51:.X51])" office:value-type="float" office:value="4786.54897435897" calcext:value-type="float">
            <text:p><text:s/>$4,786.55 </text:p>
          </table:table-cell>
          <table:table-cell table:style-name="ce47" table:formula="of:=[.AN51]+[.Y51]+[.Z51]+[.AA51]" office:value-type="float" office:value="4936.54897435897" calcext:value-type="float">
            <text:p><text:s/>$4,936.55 </text:p>
          </table:table-cell>
          <table:table-cell table:style-name="ce47" table:formula="of:=[.AN51]+[.AB51]+[.AC51]+[.AD51]" office:value-type="float" office:value="4936.54897435897" calcext:value-type="float">
            <text:p><text:s/>$4,936.55 </text:p>
          </table:table-cell>
          <table:table-cell table:style-name="ce47" table:formula="of:=[.AN51]+[.AE51]+[.AF51]+[.AG51]" office:value-type="float" office:value="4831.54897435897" calcext:value-type="float">
            <text:p><text:s/>$4,831.55 </text:p>
          </table:table-cell>
          <table:table-cell table:style-name="ce47" table:formula="of:=[.AN51]+[.AH51]+[.AI51]+[.AJ51]" office:value-type="float" office:value="4831.54897435897" calcext:value-type="float">
            <text:p><text:s/>$4,831.55 </text:p>
          </table:table-cell>
          <table:table-cell table:style-name="ce46" table:formula="of:=[.AK51]+[.AL51]+[.AM51]+[.BQ51]+[.CD51]+[.CR51]" office:value-type="float" office:value="4831.54897435897" calcext:value-type="float">
            <text:p><text:s/>$4,831.55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Savannah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20" calcext:value-type="float">
            <text:p><text:s/>USD9,12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2" calcext:value-type="float">
            <text:p><text:s/>USD912.00 </text:p>
          </table:table-cell>
          <table:table-cell table:style-name="ce66" office:value-type="float" office:value="138" calcext:value-type="float">
            <text:p><text:s/>USD138.00 </text:p>
          </table:table-cell>
          <table:table-cell table:style-name="ce66" office:value-type="float" office:value="91" calcext:value-type="float">
            <text:p><text:s/>USD91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8" calcext:value-type="currency">
            <text:p><text:s/>USD 58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51]+[.BB51]+[.BC51]+[.BF51]+[.BG51]+[.BH51]+[.BL51])" office:value-type="currency" office:currency="CNY" office:value="1232" calcext:value-type="currency">
            <text:p><text:s/>CNY 1,232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51]*[.BP51])" office:value-type="currency" office:currency="USD" office:value="1232" calcext:value-type="currency">
            <text:p><text:s/>USD 1,232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481" calcext:value-type="currency">
            <text:p><text:s/>USD 481.00 </text:p>
          </table:table-cell>
          <table:table-cell table:style-name="ce105" office:value-type="currency" office:currency="USD" office:value="242" calcext:value-type="currency">
            <text:p><text:s/>USD 242.00 </text:p>
          </table:table-cell>
          <table:table-cell table:style-name="ce105" office:value-type="currency" office:currency="USD" office:value="38.69" calcext:value-type="currency">
            <text:p><text:s/>USD 38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32" calcext:value-type="currency">
            <text:p><text:s/>USD 2,232.00 </text:p>
          </table:table-cell>
          <table:table-cell table:style-name="ce105" office:value-type="currency" office:currency="USD" office:value="32" calcext:value-type="currency">
            <text:p><text:s/>USD 32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2" calcext:value-type="currency">
            <text:p><text:s/>USD 42.00 </text:p>
          </table:table-cell>
          <table:table-cell table:style-name="ce114" table:formula="of:=SUM([.BT51:.CA51])" office:value-type="currency" office:currency="USD" office:value="3067.69" calcext:value-type="currency">
            <text:p><text:s/>USD 3,067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51]*[.CC51])" office:value-type="currency" office:currency="USD" office:value="3067.69" calcext:value-type="currency">
            <text:p><text:s/>USD 3,067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40" calcext:value-type="float">
            <text:p>4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51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513 Highway 74 South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Peachtree City, GA</text:p>
          </table:table-cell>
          <table:table-cell table:style-name="ce6" office:value-type="string" calcext:value-type="string">
            <text:p>US068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Savannah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52]" office:value-type="float" office:value="1236" calcext:value-type="float">
            <text:p><text:s/>$1,236.00 </text:p>
          </table:table-cell>
          <table:table-cell table:style-name="ce42" table:formula="of:=[.CD52]" office:value-type="float" office:value="3177.69" calcext:value-type="float">
            <text:p><text:s/>$3,177.69 </text:p>
          </table:table-cell>
          <table:table-cell table:style-name="ce42" table:formula="of:=[.CR52]" office:value-type="float" office:value="486.858974358974" calcext:value-type="float">
            <text:p><text:s/>$486.86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52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52]" office:value-type="float" office:value="0" calcext:value-type="float">
            <text:p><text:s/>$-   </text:p>
          </table:table-cell>
          <table:table-cell table:style-name="ce47" table:formula="of:=SUM([.V52:.X52])" office:value-type="float" office:value="4900.54897435897" calcext:value-type="float">
            <text:p><text:s/>$4,900.55 </text:p>
          </table:table-cell>
          <table:table-cell table:style-name="ce47" table:formula="of:=[.AN52]+[.Y52]+[.Z52]+[.AA52]" office:value-type="float" office:value="5200.54897435897" calcext:value-type="float">
            <text:p><text:s/>$5,200.55 </text:p>
          </table:table-cell>
          <table:table-cell table:style-name="ce47" table:formula="of:=[.AN52]+[.AB52]+[.AC52]+[.AD52]" office:value-type="float" office:value="5200.54897435897" calcext:value-type="float">
            <text:p><text:s/>$5,200.55 </text:p>
          </table:table-cell>
          <table:table-cell table:style-name="ce47" table:formula="of:=[.AN52]+[.AE52]+[.AF52]+[.AG52]" office:value-type="float" office:value="4990.54897435897" calcext:value-type="float">
            <text:p><text:s/>$4,990.55 </text:p>
          </table:table-cell>
          <table:table-cell table:style-name="ce47" table:formula="of:=[.AN52]+[.AH52]+[.AI52]+[.AJ52]" office:value-type="float" office:value="4990.54897435897" calcext:value-type="float">
            <text:p><text:s/>$4,990.55 </text:p>
          </table:table-cell>
          <table:table-cell table:style-name="ce46" table:formula="of:=[.AK52]+[.AL52]+[.AM52]+[.BQ52]+[.CD52]+[.CR52]" office:value-type="float" office:value="4990.54897435897" calcext:value-type="float">
            <text:p><text:s/>$4,990.55 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string" calcext:value-type="string">
            <text:p>Savannah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30" calcext:value-type="float">
            <text:p><text:s/>USD9,13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3" calcext:value-type="float">
            <text:p><text:s/>USD913.00 </text:p>
          </table:table-cell>
          <table:table-cell table:style-name="ce66" office:value-type="float" office:value="139" calcext:value-type="float">
            <text:p><text:s/>USD139.00 </text:p>
          </table:table-cell>
          <table:table-cell table:style-name="ce66" office:value-type="float" office:value="92" calcext:value-type="float">
            <text:p><text:s/>USD92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59" calcext:value-type="currency">
            <text:p><text:s/>USD 59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52]+[.BB52]+[.BC52]+[.BF52]+[.BG52]+[.BH52]+[.BL52])" office:value-type="currency" office:currency="CNY" office:value="1236" calcext:value-type="currency">
            <text:p><text:s/>CNY 1,236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52]*[.BP52])" office:value-type="currency" office:currency="USD" office:value="1236" calcext:value-type="currency">
            <text:p><text:s/>USD 1,236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586" calcext:value-type="currency">
            <text:p><text:s/>USD 586.00 </text:p>
          </table:table-cell>
          <table:table-cell table:style-name="ce105" office:value-type="currency" office:currency="USD" office:value="243" calcext:value-type="currency">
            <text:p><text:s/>USD 243.00 </text:p>
          </table:table-cell>
          <table:table-cell table:style-name="ce105" office:value-type="currency" office:currency="USD" office:value="39.69" calcext:value-type="currency">
            <text:p><text:s/>USD 39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33" calcext:value-type="currency">
            <text:p><text:s/>USD 2,233.00 </text:p>
          </table:table-cell>
          <table:table-cell table:style-name="ce105" office:value-type="currency" office:currency="USD" office:value="33" calcext:value-type="currency">
            <text:p><text:s/>USD 33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3" calcext:value-type="currency">
            <text:p><text:s/>USD 43.00 </text:p>
          </table:table-cell>
          <table:table-cell table:style-name="ce114" table:formula="of:=SUM([.BT52:.CA52])" office:value-type="currency" office:currency="USD" office:value="3177.69" calcext:value-type="currency">
            <text:p><text:s/>USD 3,177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52]*[.CC52])" office:value-type="currency" office:currency="USD" office:value="3177.69" calcext:value-type="currency">
            <text:p><text:s/>USD 3,177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80" calcext:value-type="float">
            <text:p>80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86.858974358974" calcext:value-type="currency">
            <text:p><text:s/>USD 486.86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52]" office:value-type="currency" office:currency="USD" office:value="486.858974358974" calcext:value-type="currency">
            <text:p><text:s/>USD 486.86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35 Penn-Am Drive</text:p>
          </table:table-cell>
          <table:table-cell table:style-name="ce7" office:value-type="string" calcext:value-type="string">
            <text:p>United States</text:p>
          </table:table-cell>
          <table:table-cell table:style-name="ce6" office:value-type="string" calcext:value-type="string">
            <text:p>Quakertown, PA</text:p>
          </table:table-cell>
          <table:table-cell table:style-name="ce6" office:value-type="string" calcext:value-type="string">
            <text:p>US069L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Rodovia Vinhedo-Vira Copos, Km77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Vinhedo</text:p>
          </table:table-cell>
          <table:table-cell table:style-name="ce19"/>
          <table:table-cell table:style-name="ce22" office:value-type="string" calcext:value-type="string">
            <text:p>New York</text:p>
          </table:table-cell>
          <table:table-cell table:style-name="ce22" office:value-type="string" calcext:value-type="string">
            <text:p>Santos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FCA</text:p>
          </table:table-cell>
          <table:table-cell table:style-name="ce32" office:value-type="float" office:value="33" calcext:value-type="float">
            <text:p>33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0" office:value-type="string" calcext:value-type="string">
            <text:p>40GP</text:p>
          </table:table-cell>
          <table:table-cell table:style-name="ce29" office:value-type="string" calcext:value-type="string">
            <text:p>LAM 6</text:p>
          </table:table-cell>
          <table:table-cell table:style-name="ce42" table:formula="of:=[.BQ53]" office:value-type="float" office:value="1240" calcext:value-type="float">
            <text:p><text:s/>$1,240.00 </text:p>
          </table:table-cell>
          <table:table-cell table:style-name="ce42" table:formula="of:=[.CD53]" office:value-type="float" office:value="2882.69" calcext:value-type="float">
            <text:p><text:s/>$2,882.69 </text:p>
          </table:table-cell>
          <table:table-cell table:style-name="ce42" table:formula="of:=[.CR53]" office:value-type="float" office:value="443.589743589744" calcext:value-type="float">
            <text:p><text:s/>$443.59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300" calcext:value-type="float">
            <text:p><text:s/>$300.00 </text:p>
          </table:table-cell>
          <table:table-cell table:style-name="ce41" office:value-type="float" office:value="90" calcext:value-type="float">
            <text:p><text:s/>$9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90" calcext:value-type="float">
            <text:p><text:s/>$90.00 </text:p>
          </table:table-cell>
          <table:table-cell table:style-name="ce42" table:number-columns-repeated="2"/>
          <table:table-cell table:style-name="ce41" table:formula="of:=[.AH53]" office:value-type="float" office:value="90" calcext:value-type="float">
            <text:p><text:s/>$9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table:formula="of:=[.AJ53]" office:value-type="float" office:value="0" calcext:value-type="float">
            <text:p><text:s/>$-   </text:p>
          </table:table-cell>
          <table:table-cell table:style-name="ce47" table:formula="of:=SUM([.V53:.X53])" office:value-type="float" office:value="4566.27974358974" calcext:value-type="float">
            <text:p><text:s/>$4,566.28 </text:p>
          </table:table-cell>
          <table:table-cell table:style-name="ce47" table:formula="of:=[.AN53]+[.Y53]+[.Z53]+[.AA53]" office:value-type="float" office:value="4866.27974358974" calcext:value-type="float">
            <text:p><text:s/>$4,866.28 </text:p>
          </table:table-cell>
          <table:table-cell table:style-name="ce47" table:formula="of:=[.AN53]+[.AB53]+[.AC53]+[.AD53]" office:value-type="float" office:value="4866.27974358974" calcext:value-type="float">
            <text:p><text:s/>$4,866.28 </text:p>
          </table:table-cell>
          <table:table-cell table:style-name="ce47" table:formula="of:=[.AN53]+[.AE53]+[.AF53]+[.AG53]" office:value-type="float" office:value="4656.27974358974" calcext:value-type="float">
            <text:p><text:s/>$4,656.28 </text:p>
          </table:table-cell>
          <table:table-cell table:style-name="ce47" table:formula="of:=[.AN53]+[.AH53]+[.AI53]+[.AJ53]" office:value-type="float" office:value="4656.27974358974" calcext:value-type="float">
            <text:p><text:s/>$4,656.28 </text:p>
          </table:table-cell>
          <table:table-cell table:style-name="ce46" table:formula="of:=[.AK53]+[.AL53]+[.AM53]+[.BQ53]+[.CD53]+[.CR53]" office:value-type="float" office:value="4656.27974358975" calcext:value-type="float">
            <text:p><text:s/>$4,656.28 </text:p>
          </table:table-cell>
          <table:table-cell table:style-name="ce50" office:value-type="float" office:value="23" calcext:value-type="float">
            <text:p>23</text:p>
          </table:table-cell>
          <table:table-cell table:style-name="ce54" office:value-type="string" calcext:value-type="string">
            <text:p>NEW YORK (NYC) </text:p>
          </table:table-cell>
          <table:table-cell table:style-name="ce57" office:value-type="string" calcext:value-type="string">
            <text:p>Santos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40" calcext:value-type="float">
            <text:p><text:s/>USD9,14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4" calcext:value-type="float">
            <text:p><text:s/>USD914.00 </text:p>
          </table:table-cell>
          <table:table-cell table:style-name="ce66" office:value-type="float" office:value="140" calcext:value-type="float">
            <text:p><text:s/>USD140.00 </text:p>
          </table:table-cell>
          <table:table-cell table:style-name="ce66" office:value-type="float" office:value="93" calcext:value-type="float">
            <text:p><text:s/>USD93.00 </text:p>
          </table:table-cell>
          <table:table-cell table:style-name="ce80"/>
          <table:table-cell table:number-columns-repeated="2" table:style-name="ce80" office:value-type="currency" office:currency="USD" office:value="155" calcext:value-type="currency">
            <text:p><text:s/>USD 155.00 </text:p>
          </table:table-cell>
          <table:table-cell table:style-name="ce80" office:value-type="currency" office:currency="USD" office:value="60" calcext:value-type="currency">
            <text:p><text:s/>USD 60.00 </text:p>
          </table:table-cell>
          <table:table-cell table:style-name="ce80" office:value-type="currency" office:currency="USD" office:value="25" calcext:value-type="currency">
            <text:p><text:s/>USD 25.00 </text:p>
          </table:table-cell>
          <table:table-cell table:style-name="ce80" office:value-type="currency" office:currency="USD" office:value="15" calcext:value-type="currency">
            <text:p><text:s/>USD 15.00 </text:p>
          </table:table-cell>
          <table:table-cell table:style-name="ce85" office:value-type="string" calcext:value-type="string">
            <text:p>Legalization (if needed)</text:p>
          </table:table-cell>
          <table:table-cell table:style-name="ce80" office:value-type="currency" office:currency="USD" office:value="290" calcext:value-type="currency">
            <text:p><text:s/>USD 290.00 </text:p>
          </table:table-cell>
          <table:table-cell table:style-name="ce80" office:value-type="currency" office:currency="USD" office:value="0" calcext:value-type="currency">
            <text:p><text:s/>USD -   </text:p>
          </table:table-cell>
          <table:table-cell table:style-name="ce85" office:value-type="string" calcext:value-type="string">
            <text:p>COO - Courier</text:p>
          </table:table-cell>
          <table:table-cell table:style-name="ce80" office:value-type="currency" office:currency="USD" office:value="80" calcext:value-type="currency">
            <text:p><text:s/>USD 80.00 </text:p>
          </table:table-cell>
          <table:table-cell table:style-name="ce91" table:formula="of:=SUM([.AZ53]+[.BB53]+[.BC53]+[.BF53]+[.BG53]+[.BH53]+[.BL53])" office:value-type="currency" office:currency="CNY" office:value="1240" calcext:value-type="currency">
            <text:p><text:s/>CNY 1,240.00 </text:p>
          </table:table-cell>
          <table:table-cell table:style-name="ce62" office:value-type="float" office:value="1" calcext:value-type="float">
            <text:p>1</text:p>
          </table:table-cell>
          <table:table-cell table:style-name="ce96" table:formula="of:=SUM([.BO53]*[.BP53])" office:value-type="currency" office:currency="USD" office:value="1240" calcext:value-type="currency">
            <text:p><text:s/>USD 1,240.00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286" calcext:value-type="currency">
            <text:p><text:s/>USD 286.00 </text:p>
          </table:table-cell>
          <table:table-cell table:style-name="ce105" office:value-type="currency" office:currency="USD" office:value="244" calcext:value-type="currency">
            <text:p><text:s/>USD 244.00 </text:p>
          </table:table-cell>
          <table:table-cell table:style-name="ce105" office:value-type="currency" office:currency="USD" office:value="40.69" calcext:value-type="currency">
            <text:p><text:s/>USD 40.69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2234" calcext:value-type="currency">
            <text:p><text:s/>USD 2,234.00 </text:p>
          </table:table-cell>
          <table:table-cell table:style-name="ce105" office:value-type="currency" office:currency="USD" office:value="34" calcext:value-type="currency">
            <text:p><text:s/>USD 34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4" calcext:value-type="currency">
            <text:p><text:s/>USD 44.00 </text:p>
          </table:table-cell>
          <table:table-cell table:style-name="ce114" table:formula="of:=SUM([.BT53:.CA53])" office:value-type="currency" office:currency="USD" office:value="2882.69" calcext:value-type="currency">
            <text:p><text:s/>USD 2,882.69 </text:p>
          </table:table-cell>
          <table:table-cell table:style-name="ce100" office:value-type="float" office:value="1" calcext:value-type="float">
            <text:p>1</text:p>
          </table:table-cell>
          <table:table-cell table:style-name="ce118" table:formula="of:=SUM([.CB53]*[.CC53])" office:value-type="currency" office:currency="USD" office:value="2882.69" calcext:value-type="currency">
            <text:p><text:s/>USD 2,882.69 </text:p>
          </table:table-cell>
          <table:table-cell table:style-name="ce121" office:value-type="string" calcext:value-type="string">
            <text:p>BRL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4" office:value-type="float" office:value="271" calcext:value-type="float">
            <text:p>271.00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0" office:value-type="currency" office:currency="BRL" office:value="0" calcext:value-type="currency">
            <text:p><text:s/>BRL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443.589743589744" calcext:value-type="currency">
            <text:p><text:s/>USD 443.59 </text:p>
          </table:table-cell>
          <table:table-cell table:number-columns-repeated="2" table:style-name="ce130" office:value-type="currency" office:currency="BRL" office:value="0" calcext:value-type="currency">
            <text:p><text:s/>BRL -   </text:p>
          </table:table-cell>
          <table:table-cell table:style-name="ce142" office:value-type="float" office:value="0.320512820512821" calcext:value-type="float">
            <text:p>0.321</text:p>
          </table:table-cell>
          <table:table-cell table:style-name="ce145" table:formula="of:=[.CN53]" office:value-type="currency" office:currency="USD" office:value="443.589743589744" calcext:value-type="currency">
            <text:p><text:s/>USD 443.59 </text:p>
          </table:table-cell>
          <table:table-cell table:style-name="ce146" table:number-columns-repeated="2"/>
          <table:table-cell table:number-columns-repeated="1628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EMEA</text:p>
          </table:table-cell>
          <table:table-cell table:style-name="ce6" office:value-type="string" calcext:value-type="string">
            <text:p>Avery Dennison</text:p>
          </table:table-cell>
          <table:table-cell table:style-name="ce6" office:value-type="string" calcext:value-type="string">
            <text:p>Tieblokkenlaan 1</text:p>
          </table:table-cell>
          <table:table-cell table:style-name="ce7" office:value-type="string" calcext:value-type="string">
            <text:p>Belgium</text:p>
          </table:table-cell>
          <table:table-cell table:style-name="ce6" office:value-type="string" calcext:value-type="string">
            <text:p>Turnhout</text:p>
          </table:table-cell>
          <table:table-cell table:style-name="ce6" office:value-type="string" calcext:value-type="string">
            <text:p>BE002S</text:p>
          </table:table-cell>
          <table:table-cell table:style-name="ce13" office:value-type="string" calcext:value-type="string">
            <text:p>LA</text:p>
          </table:table-cell>
          <table:table-cell table:style-name="ce15" office:value-type="string" calcext:value-type="string">
            <text:p>Calle Antillanca N 560</text:p>
          </table:table-cell>
          <table:table-cell table:style-name="ce15" office:value-type="string" calcext:value-type="string">
            <text:p>Chile</text:p>
          </table:table-cell>
          <table:table-cell table:style-name="ce15" office:value-type="string" calcext:value-type="string">
            <text:p>Pudahuel</text:p>
          </table:table-cell>
          <table:table-cell table:style-name="ce19"/>
          <table:table-cell table:style-name="ce22" office:value-type="string" calcext:value-type="string">
            <text:p>Antwerp</text:p>
          </table:table-cell>
          <table:table-cell table:style-name="ce22" office:value-type="string" calcext:value-type="string">
            <text:p>VALPARAISO</text:p>
          </table:table-cell>
          <table:table-cell table:style-name="ce26" office:value-type="string" calcext:value-type="string">
            <text:p>Door to Port</text:p>
          </table:table-cell>
          <table:table-cell table:style-name="ce29" office:value-type="string" calcext:value-type="string">
            <text:p>EXW</text:p>
          </table:table-cell>
          <table:table-cell table:style-name="ce32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0" office:value-type="string" calcext:value-type="string">
            <text:p>40HQ</text:p>
          </table:table-cell>
          <table:table-cell table:style-name="ce29" office:value-type="string" calcext:value-type="string">
            <text:p>LAM 2</text:p>
          </table:table-cell>
          <table:table-cell table:style-name="ce42" table:formula="of:=[.BQ54]" office:value-type="float" office:value="1388.17204301075" calcext:value-type="float">
            <text:p><text:s/>$1,388.17 </text:p>
          </table:table-cell>
          <table:table-cell table:style-name="ce42" table:formula="of:=[.CD54]" office:value-type="float" office:value="1730.13" calcext:value-type="float">
            <text:p><text:s/>$1,730.13 </text:p>
          </table:table-cell>
          <table:table-cell table:style-name="ce42" table:formula="of:=[.CR54]" office:value-type="float" office:value="241" calcext:value-type="float">
            <text:p><text:s/>$241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number-columns-repeated="2" table:style-name="ce41" office:value-type="float" office:value="0" calcext:value-type="float">
            <text:p><text:s/>$-   </text:p>
          </table:table-cell>
          <table:table-cell table:style-name="ce41" office:value-type="float" office:value="110" calcext:value-type="float">
            <text:p><text:s/>$110.00 </text:p>
          </table:table-cell>
          <table:table-cell table:style-name="ce42" table:number-columns-repeated="2"/>
          <table:table-cell table:style-name="ce41" office:value-type="float" office:value="220" calcext:value-type="float">
            <text:p><text:s/>$220.00 </text:p>
          </table:table-cell>
          <table:table-cell table:style-name="ce42" office:value-type="float" office:value="0" calcext:value-type="float">
            <text:p><text:s/>$-   </text:p>
          </table:table-cell>
          <table:table-cell table:style-name="ce42" office:value-type="float" office:value="400" calcext:value-type="float">
            <text:p><text:s/>$400.00 </text:p>
          </table:table-cell>
          <table:table-cell table:style-name="ce47" table:formula="of:=SUM([.V54:.X54])" office:value-type="float" office:value="3359.30204301075" calcext:value-type="float">
            <text:p><text:s/>$3,359.30 </text:p>
          </table:table-cell>
          <table:table-cell table:style-name="ce47" table:formula="of:=[.V54]+[.W54]+[.X54]+[.AA54]" office:value-type="float" office:value="3359.30204301075" calcext:value-type="float">
            <text:p><text:s/>$3,359.30 </text:p>
          </table:table-cell>
          <table:table-cell table:style-name="ce47" table:formula="of:=[.AO54]" office:value-type="float" office:value="3359.30204301075" calcext:value-type="float">
            <text:p><text:s/>$3,359.30 </text:p>
          </table:table-cell>
          <table:table-cell table:style-name="ce47" table:formula="of:=[.AN54]+[.AE54]+[.AF54]+[.AG54]" office:value-type="float" office:value="3469.30204301075" calcext:value-type="float">
            <text:p><text:s/>$3,469.30 </text:p>
          </table:table-cell>
          <table:table-cell table:style-name="ce47" table:formula="of:=[.AN54]+[.AH54]+[.AI54]+[.AJ54]" office:value-type="float" office:value="3469.30204301075" calcext:value-type="float">
            <text:p><text:s/>$3,469.30 </text:p>
          </table:table-cell>
          <table:table-cell table:style-name="ce46" table:formula="of:=[.AK54]+[.AL54]+[.AM54]+[.BQ54]+[.CD54]+[.CR54]" office:value-type="float" office:value="3979.30204301075" calcext:value-type="float">
            <text:p><text:s/>$3,979.30 </text:p>
          </table:table-cell>
          <table:table-cell table:style-name="ce50" office:value-type="float" office:value="33" calcext:value-type="float">
            <text:p>33</text:p>
          </table:table-cell>
          <table:table-cell table:style-name="ce54" office:value-type="string" calcext:value-type="string">
            <text:p>Antwerp</text:p>
          </table:table-cell>
          <table:table-cell table:style-name="ce57" office:value-type="string" calcext:value-type="string">
            <text:p>VALPARAISO</text:p>
          </table:table-cell>
          <table:table-cell table:style-name="ce62" office:value-type="string" calcext:value-type="string">
            <text:p>USD</text:p>
          </table:table-cell>
          <table:table-cell table:style-name="ce66" office:value-type="float" office:value="182" calcext:value-type="float">
            <text:p><text:s/>USD182.00 </text:p>
          </table:table-cell>
          <table:table-cell table:style-name="ce66" office:value-type="float" office:value="9150" calcext:value-type="float">
            <text:p><text:s/>USD9,150.00 </text:p>
          </table:table-cell>
          <table:table-cell table:style-name="ce66" office:value-type="float" office:value="719" calcext:value-type="float">
            <text:p><text:s/>USD719.00 </text:p>
          </table:table-cell>
          <table:table-cell table:style-name="ce66" office:value-type="float" office:value="915" calcext:value-type="float">
            <text:p><text:s/>USD915.00 </text:p>
          </table:table-cell>
          <table:table-cell table:style-name="ce66" office:value-type="float" office:value="141" calcext:value-type="float">
            <text:p><text:s/>USD141.00 </text:p>
          </table:table-cell>
          <table:table-cell table:style-name="ce66" office:value-type="float" office:value="94" calcext:value-type="float">
            <text:p><text:s/>USD94.00 </text:p>
          </table:table-cell>
          <table:table-cell table:style-name="ce76"/>
          <table:table-cell table:number-columns-repeated="2" table:style-name="ce80" office:value-type="currency" office:currency="USD" office:value="156" calcext:value-type="currency">
            <text:p><text:s/>USD 156.00 </text:p>
          </table:table-cell>
          <table:table-cell table:style-name="ce80" office:value-type="currency" office:currency="USD" office:value="61" calcext:value-type="currency">
            <text:p><text:s/>USD 61.00 </text:p>
          </table:table-cell>
          <table:table-cell table:style-name="ce80" office:value-type="currency" office:currency="USD" office:value="26" calcext:value-type="currency">
            <text:p><text:s/>USD 26.00 </text:p>
          </table:table-cell>
          <table:table-cell table:style-name="ce82" office:value-type="currency" office:currency="EUR" office:value="50" calcext:value-type="currency">
            <text:p><text:s/>EUR 50.00 </text:p>
          </table:table-cell>
          <table:table-cell table:style-name="ce85" office:value-type="string" calcext:value-type="string">
            <text:p>Left Bank Surcharge </text:p>
          </table:table-cell>
          <table:table-cell table:number-columns-repeated="2" table:style-name="ce82" office:value-type="currency" office:currency="EUR" office:value="45" calcext:value-type="currency">
            <text:p><text:s/>EUR 45.00 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currency" office:currency="EUR" office:value="0" calcext:value-type="currency">
            <text:p><text:s/>EUR -   </text:p>
          </table:table-cell>
          <table:table-cell table:style-name="ce91" table:formula="of:=SUM([.AZ54]+[.BB54]+[.BC54]+[.BF54]+[.BG54]+[.BH54]+[.BL54])" office:value-type="currency" office:currency="CNY" office:value="1291" calcext:value-type="currency">
            <text:p><text:s/>CNY 1,291.00 </text:p>
          </table:table-cell>
          <table:table-cell table:style-name="ce93" office:value-type="float" office:value="1.0752688172043" calcext:value-type="float">
            <text:p>1.075</text:p>
          </table:table-cell>
          <table:table-cell table:style-name="ce96" table:formula="of:=SUM([.BO54]*[.BP54])" office:value-type="currency" office:currency="USD" office:value="1388.17204301075" calcext:value-type="currency">
            <text:p><text:s/>USD 1,388.17 </text:p>
          </table:table-cell>
          <table:table-cell table:style-name="ce100" office:value-type="string" calcext:value-type="string">
            <text:p>USD</text:p>
          </table:table-cell>
          <table:table-cell table:number-columns-repeated="2" table:style-name="ce105" office:value-type="currency" office:currency="USD" office:value="1200" calcext:value-type="currency">
            <text:p><text:s/>USD 1,200.00 </text:p>
          </table:table-cell>
          <table:table-cell table:style-name="ce105" office:value-type="currency" office:currency="USD" office:value="245" calcext:value-type="currency">
            <text:p><text:s/>USD 245.00 </text:p>
          </table:table-cell>
          <table:table-cell table:style-name="ce105" office:value-type="currency" office:currency="USD" office:value="16.13" calcext:value-type="currency">
            <text:p><text:s/>USD 16.13 </text:p>
          </table:table-cell>
          <table:table-cell table:style-name="ce109" office:value-type="string" calcext:value-type="string">
            <text:p>Chili Porteo</text:p>
          </table:table-cell>
          <table:table-cell table:number-columns-repeated="2" table:style-name="ce105" office:value-type="currency" office:currency="USD" office:value="112" calcext:value-type="currency">
            <text:p><text:s/>USD 112.00 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currency" office:currency="USD" office:value="45" calcext:value-type="currency">
            <text:p><text:s/>USD 45.00 </text:p>
          </table:table-cell>
          <table:table-cell table:style-name="ce114" table:formula="of:=SUM([.BT54:.CA54])" office:value-type="currency" office:currency="USD" office:value="1730.13" calcext:value-type="currency">
            <text:p><text:s/>USD 1,730.13 </text:p>
          </table:table-cell>
          <table:table-cell table:style-name="ce116" office:value-type="float" office:value="1" calcext:value-type="float">
            <text:p>1</text:p>
          </table:table-cell>
          <table:table-cell table:style-name="ce118" table:formula="of:=SUM([.CB54]*[.CC54])" office:value-type="currency" office:currency="USD" office:value="1730.13" calcext:value-type="currency">
            <text:p><text:s/>USD 1,730.13 </text:p>
          </table:table-cell>
          <table:table-cell table:style-name="ce121" office:value-type="string" calcext:value-type="string">
            <text:p>CLP</text:p>
          </table:table-cell>
          <table:table-cell table:number-columns-repeated="2" table:style-name="ce131" office:value-type="currency" office:currency="CLP" office:value="0" calcext:value-type="currency">
            <text:p><text:s/>CLP -   </text:p>
          </table:table-cell>
          <table:table-cell table:style-name="ce134" office:value-type="float" office:value="542" calcext:value-type="float">
            <text:p>542.00</text:p>
          </table:table-cell>
          <table:table-cell table:number-columns-repeated="2" table:style-name="ce13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31" office:value-type="currency" office:currency="CLP" office:value="0" calcext:value-type="currency">
            <text:p><text:s/>CLP -   </text:p>
          </table:table-cell>
          <table:table-cell table:style-name="ce138" office:value-type="float" office:value="0" calcext:value-type="float">
            <text:p>0</text:p>
          </table:table-cell>
          <table:table-cell table:style-name="ce128" office:value-type="currency" office:currency="USD" office:value="241" calcext:value-type="currency">
            <text:p><text:s/>USD 241.00 </text:p>
          </table:table-cell>
          <table:table-cell table:number-columns-repeated="2" table:style-name="ce131" office:value-type="currency" office:currency="CLP" office:value="0" calcext:value-type="currency">
            <text:p><text:s/>CLP -   </text:p>
          </table:table-cell>
          <table:table-cell table:style-name="ce142" office:value-type="float" office:value="0.00150416654131945" calcext:value-type="float">
            <text:p>0.002</text:p>
          </table:table-cell>
          <table:table-cell table:style-name="ce145" table:formula="of:=[.CN54]" office:value-type="currency" office:currency="USD" office:value="241" calcext:value-type="currency">
            <text:p><text:s/>USD 241.00 </text:p>
          </table:table-cell>
          <table:table-cell table:style-name="ce146" table:number-columns-repeated="2"/>
          <table:table-cell table:number-columns-repeated="16286"/>
        </table:table-row>
        <table:table-row table:style-name="ro5" table:number-rows-repeated="1048521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USD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0P1" style:volatile="true">
      <number:text loext:blank-width-char="("> $USD</number:text>
      <number:fill-character> </number:fill-character>
      <number:text>(</number:text>
      <number:number number:decimal-places="2" number:min-decimal-places="2" number:min-integer-digits="1" number:grouping="true"/>
      <number:text>))</number:text>
    </number:number-style>
    <number:number-style style:name="N130P2" style:volatile="true">
      <number:text loext:blank-width-char="("> USD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("> </number:text>
      <number:currency-symbol>CNY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1P1" style:volatile="true">
      <number:text loext:blank-width-char="("> </number:text>
      <number:currency-symbol>CNY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text loext:blank-width-char="("> </number:text>
      <number:currency-symbol>CNY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3" number:min-decimal-places="3" number:min-integer-digits="1"/>
    </number:number-style>
    <number:currency-style style:name="N133P0" style:volatile="true">
      <number:text loext:blank-width-char="("> </number:text>
      <number:currency-symbol>USD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3P1" style:volatile="true">
      <number:text loext:blank-width-char="("> </number:text>
      <number:currency-symbol>USD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text loext:blank-width-char="("> </number:text>
      <number:currency-symbol>USD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text loext:blank-width-char="("> </number:text>
      <number:currency-symbol>EUR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4P1" style:volatile="true">
      <number:text loext:blank-width-char="("> </number:text>
      <number:currency-symbol>EUR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text loext:blank-width-char="("> </number:text>
      <number:currency-symbol>EUR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text loext:blank-width-char="("> </number:text>
      <number:currency-symbol>BRL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5P1" style:volatile="true">
      <number:text loext:blank-width-char="("> </number:text>
      <number:currency-symbol>BRL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text loext:blank-width-char="("> </number:text>
      <number:currency-symbol>BRL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 loext:blank-width-char="("> </number:text>
      <number:currency-symbol>MXN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6P1" style:volatile="true">
      <number:text loext:blank-width-char="("> </number:text>
      <number:currency-symbol>MXN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text loext:blank-width-char="("> </number:text>
      <number:currency-symbol>MXN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text loext:blank-width-char="("> </number:text>
      <number:currency-symbol>CLP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8P1" style:volatile="true">
      <number:text loext:blank-width-char="("> </number:text>
      <number:currency-symbol>CLP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text loext:blank-width-char="("> </number:text>
      <number:currency-symbol>CLP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 loext:blank-width-char="("> </number:text>
      <number:currency-symbol>TRY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9P1" style:volatile="true">
      <number:text loext:blank-width-char="("> </number:text>
      <number:currency-symbol>TRY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 loext:blank-width-char="("> </number:text>
      <number:currency-symbol>TRY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text loext:blank-width-char="("> </number:text>
      <number:currency-symbol>GBP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0P1" style:volatile="true">
      <number:text loext:blank-width-char="("> </number:text>
      <number:currency-symbol>GBP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text loext:blank-width-char="("> </number:text>
      <number:currency-symbol>GBP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표준_5f_0034OFFER_28_NEW_29_" style:display-name="표준_0034OFFER(NEW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CL_20_Rate_20_File" style:display-name="PageStyle_FCL Rate Fil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7:42:26</meta:creation-date>
    <dc:language>en-IN</dc:language>
    <dc:date>2024-01-31T16:55:34</dc:date>
    <meta:editing-cycles>10</meta:editing-cycles>
    <meta:editing-duration>PT5H3M</meta:editing-duration>
    <meta:generator>LibreOffice/24.8.4.2$MacOSX_X86_64 LibreOffice_project/bb3cfa12c7b1bf994ecc5649a80400d06cd71002</meta:generator>
    <meta:document-statistic meta:table-count="1" meta:cell-count="4703" meta:object-count="0"/>
    <meta:user-defined meta:name="AppVersion">15.0000</meta:user-defined>
  </office:meta>
</office:document-meta>
</file>